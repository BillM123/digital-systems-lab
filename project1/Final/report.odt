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82000005F617C21050.png" manifest:media-type="image/png"/>
  <manifest:file-entry manifest:full-path="Pictures/10000001000004CF000003EA4BE3091B.png" manifest:media-type="image/png"/>
  <manifest:file-entry manifest:full-path="Pictures/1000000100000A82000005F6A1C9A1B3.png" manifest:media-type="image/png"/>
  <manifest:file-entry manifest:full-path="Pictures/10000001000004CF000003EAE6F85BC4.png" manifest:media-type="image/png"/>
  <manifest:file-entry manifest:full-path="Pictures/1000000100000A82000005F654B08604.png" manifest:media-type="image/png"/>
  <manifest:file-entry manifest:full-path="Pictures/1000000100000A82000005F6D01B547A.png" manifest:media-type="image/png"/>
  <manifest:file-entry manifest:full-path="Pictures/10000001000004D9000003E974BFBAED.png" manifest:media-type="image/png"/>
  <manifest:file-entry manifest:full-path="Pictures/1000000100000A82000005F6AF0711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size="18pt" style:text-underline-style="none" officeooo:rsid="000a518e" officeooo:paragraph-rsid="0008792d" style:font-size-asian="15.75pt" style:font-size-complex="18pt"/>
    </style:style>
    <style:style style:name="P2" style:family="paragraph" style:parent-style-name="Standard">
      <style:paragraph-properties fo:text-align="center" style:justify-single-word="false"/>
      <style:text-properties fo:font-size="18pt" fo:font-style="normal" style:text-underline-style="none" fo:font-weight="bold" officeooo:rsid="000ab5ce" officeooo:paragraph-rsid="000ab5ce" style:font-size-asian="15.75pt" style:font-style-asian="normal" style:font-weight-asian="bold" style:font-size-complex="18pt" style:font-style-complex="normal" style:font-weight-complex="bold"/>
    </style:style>
    <style:style style:name="P3" style:family="paragraph" style:parent-style-name="Standard">
      <style:paragraph-properties fo:text-align="center" style:justify-single-word="false"/>
      <style:text-properties fo:font-size="12pt" officeooo:rsid="0008792d" officeooo:paragraph-rsid="000ab5ce" style:font-size-asian="10.5pt" style:font-size-complex="12pt"/>
    </style:style>
    <style:style style:name="P4" style:family="paragraph" style:parent-style-name="Standard">
      <style:paragraph-properties fo:text-align="center" style:justify-single-word="false"/>
      <style:text-properties fo:font-size="12pt" officeooo:rsid="006965b2" officeooo:paragraph-rsid="006965b2" style:font-size-asian="10.5pt" style:font-size-complex="12pt"/>
    </style:style>
    <style:style style:name="P5" style:family="paragraph" style:parent-style-name="Standard">
      <style:paragraph-properties fo:text-align="center" style:justify-single-word="false"/>
      <style:text-properties fo:font-size="12pt" fo:font-style="normal" style:text-underline-style="none" fo:font-weight="normal" officeooo:rsid="000a518e" officeooo:paragraph-rsid="000ab5c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style:text-underline-style="none" officeooo:rsid="000a518e" officeooo:paragraph-rsid="000ab5ce" style:font-size-asian="10.5pt" style:font-size-complex="12pt"/>
    </style:style>
    <style:style style:name="P7" style:family="paragraph" style:parent-style-name="Standard" style:list-style-name="L1">
      <style:paragraph-properties fo:text-align="left" style:justify-single-word="false"/>
      <style:text-properties fo:font-size="14pt" fo:font-style="italic" style:text-underline-style="none" fo:font-weight="bold" officeooo:rsid="000c7975" officeooo:paragraph-rsid="000c7975" style:font-size-asian="12.25pt" style:font-style-asian="italic" style:font-weight-asian="bold" style:font-size-complex="14pt" style:font-style-complex="italic" style:font-weight-complex="bold"/>
    </style:style>
    <style:style style:name="P8" style:family="paragraph" style:parent-style-name="Standard">
      <style:paragraph-properties fo:text-align="left" style:justify-single-word="false"/>
      <style:text-properties fo:font-size="14pt" fo:font-style="italic" style:text-underline-style="none" fo:font-weight="bold" officeooo:rsid="000c7975" officeooo:paragraph-rsid="000c7975" style:font-size-asian="12.25pt" style:font-style-asian="italic" style:font-weight-asian="bold" style:font-size-complex="14pt" style:font-style-complex="italic" style:font-weight-complex="bold"/>
    </style:style>
    <style:style style:name="P9" style:family="paragraph" style:parent-style-name="Standard">
      <style:paragraph-properties fo:text-align="left" style:justify-single-word="false"/>
      <style:text-properties fo:font-size="12pt" fo:font-style="normal" fo:font-weight="normal" officeooo:rsid="000d1f15" officeooo:paragraph-rsid="000d1f15" style:font-size-asian="10.5pt" style:font-style-asian="normal" style:font-weight-asian="normal" style:font-size-complex="12pt" style:font-style-complex="normal" style:font-weight-complex="normal"/>
    </style:style>
    <style:style style:name="P10" style:family="paragraph" style:parent-style-name="Standard" style:list-style-name="L2">
      <style:paragraph-properties fo:text-align="left" style:justify-single-word="false"/>
      <style:text-properties fo:font-size="14pt" fo:font-style="italic" fo:font-weight="bold" officeooo:rsid="000d1f15" officeooo:paragraph-rsid="000d1f15" style:font-size-asian="12.25pt" style:font-style-asian="italic" style:font-weight-asian="bold" style:font-size-complex="14pt" style:font-style-complex="italic" style:font-weight-complex="bold"/>
    </style:style>
    <style:style style:name="P11" style:family="paragraph" style:parent-style-name="Standard">
      <style:paragraph-properties fo:text-align="left" style:justify-single-word="false"/>
      <style:text-properties fo:font-size="14pt" fo:font-style="italic" fo:font-weight="bold" officeooo:rsid="000d1f15" officeooo:paragraph-rsid="000d1f15" style:font-size-asian="12.25pt" style:font-style-asian="italic" style:font-weight-asian="bold" style:font-size-complex="14pt" style:font-style-complex="italic" style:font-weight-complex="bold"/>
    </style:style>
    <style:style style:name="P12" style:family="paragraph" style:parent-style-name="Standard" style:list-style-name="L2">
      <style:paragraph-properties fo:text-align="left" style:justify-single-word="false"/>
      <style:text-properties fo:font-size="14pt" fo:font-style="italic" style:text-underline-style="none" fo:font-weight="bold" officeooo:rsid="000d1f15" officeooo:paragraph-rsid="000d1f15" style:font-size-asian="12.25pt" style:font-style-asian="italic" style:font-weight-asian="bold" style:font-size-complex="14pt" style:font-style-complex="italic" style:font-weight-complex="bold"/>
    </style:style>
    <style:style style:name="P13" style:family="paragraph" style:parent-style-name="Standard">
      <style:paragraph-properties fo:text-align="left" style:justify-single-word="false"/>
      <style:text-properties fo:font-size="12pt" fo:font-style="normal" fo:font-weight="normal" officeooo:rsid="000d8d63" officeooo:paragraph-rsid="000d8d6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left" style:justify-single-word="false"/>
      <style:text-properties fo:font-size="12pt" fo:font-style="normal" style:text-underline-style="none" fo:font-weight="normal" officeooo:rsid="000d8d63" officeooo:paragraph-rsid="000d8d6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font-size="12pt" fo:font-style="italic" fo:font-weight="normal" officeooo:rsid="00430c04" officeooo:paragraph-rsid="00430c04"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center" style:justify-single-word="false"/>
      <style:text-properties fo:font-size="12pt" fo:font-style="normal" fo:font-weight="normal" officeooo:rsid="000d8d63" officeooo:paragraph-rsid="000d8d6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left" style:justify-single-word="false"/>
      <style:text-properties fo:font-size="12pt" fo:font-style="normal" fo:font-weight="normal" officeooo:rsid="000d8d63" officeooo:paragraph-rsid="0019e71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left" style:justify-single-word="false"/>
      <style:text-properties fo:font-size="14pt" fo:font-style="italic" fo:font-weight="bold" officeooo:rsid="000d1f15" officeooo:paragraph-rsid="000d8d63" style:font-size-asian="12.25pt" style:font-style-asian="italic" style:font-weight-asian="bold" style:font-size-complex="14pt" style:font-style-complex="italic" style:font-weight-complex="bold"/>
    </style:style>
    <style:style style:name="P19" style:family="paragraph" style:parent-style-name="Standard">
      <style:paragraph-properties fo:text-align="left" style:justify-single-word="false"/>
      <style:text-properties fo:font-size="12pt" fo:font-style="normal" fo:font-weight="normal" officeooo:rsid="001a9e6f" officeooo:paragraph-rsid="001a9e6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font-size="12pt" fo:font-style="italic" fo:font-weight="normal" officeooo:rsid="0061851d" officeooo:paragraph-rsid="0061851d"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left" style:justify-single-word="false"/>
      <style:text-properties fo:font-size="12pt" fo:font-style="normal" fo:font-weight="normal" officeooo:rsid="001a9e6f" officeooo:paragraph-rsid="001ddb9f"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left" style:justify-single-word="false"/>
      <style:text-properties officeooo:paragraph-rsid="0024ce5e"/>
    </style:style>
    <style:style style:name="P23" style:family="paragraph" style:parent-style-name="Standard">
      <style:paragraph-properties fo:text-align="center" style:justify-single-word="false"/>
      <style:text-properties officeooo:rsid="003f57f9" officeooo:paragraph-rsid="003f57f9"/>
    </style:style>
    <style:style style:name="P24" style:family="paragraph" style:parent-style-name="Standard">
      <style:paragraph-properties fo:text-align="center" style:justify-single-word="false"/>
      <style:text-properties fo:font-style="italic" officeooo:rsid="0040cc1f" officeooo:paragraph-rsid="0040cc1f" style:font-style-asian="italic" style:font-style-complex="italic"/>
    </style:style>
    <style:style style:name="P25" style:family="paragraph" style:parent-style-name="Standard">
      <style:paragraph-properties fo:text-align="left" style:justify-single-word="false"/>
      <style:text-properties style:text-underline-style="none" officeooo:rsid="00279265" officeooo:paragraph-rsid="00421ff5"/>
    </style:style>
    <style:style style:name="P26" style:family="paragraph" style:parent-style-name="Standard">
      <style:paragraph-properties fo:text-align="left" style:justify-single-word="false"/>
      <style:text-properties officeooo:rsid="0028e076" officeooo:paragraph-rsid="00421ff5"/>
    </style:style>
    <style:style style:name="P27" style:family="paragraph" style:parent-style-name="Standard">
      <style:paragraph-properties fo:text-align="left" style:justify-single-word="false"/>
      <style:text-properties fo:font-size="14pt" fo:font-style="italic" style:text-underline-style="none" fo:font-weight="bold" officeooo:rsid="000d1f15" officeooo:paragraph-rsid="000d1f15" style:font-size-asian="12.25pt" style:font-style-asian="italic" style:font-weight-asian="bold" style:font-size-complex="14pt" style:font-style-complex="italic" style:font-weight-complex="bold"/>
    </style:style>
    <style:style style:name="P28" style:family="paragraph" style:parent-style-name="Standard">
      <style:paragraph-properties fo:text-align="center" style:justify-single-word="false"/>
      <style:text-properties fo:font-size="14pt" fo:font-style="italic" fo:font-weight="bold" officeooo:rsid="000d1f15" officeooo:paragraph-rsid="000d1f15" style:font-size-asian="12.25pt" style:font-style-asian="italic" style:font-weight-asian="bold" style:font-size-complex="14pt" style:font-style-complex="italic" style:font-weight-complex="bold"/>
    </style:style>
    <style:style style:name="P29" style:family="paragraph" style:parent-style-name="Standard">
      <style:paragraph-properties fo:text-align="center" style:justify-single-word="false"/>
      <style:text-properties fo:font-size="14pt" fo:font-style="italic" fo:font-weight="bold" officeooo:rsid="0064ee11" officeooo:paragraph-rsid="0064ee11" style:font-size-asian="12.25pt" style:font-style-asian="italic" style:font-weight-asian="bold" style:font-size-complex="14pt" style:font-style-complex="italic" style:font-weight-complex="bold"/>
    </style:style>
    <style:style style:name="P30" style:family="paragraph" style:parent-style-name="Standard">
      <style:paragraph-properties fo:text-align="left" style:justify-single-word="false"/>
      <style:text-properties fo:font-size="12pt" fo:font-style="normal" style:text-underline-style="none" fo:font-weight="normal" officeooo:rsid="002ecd94" officeooo:paragraph-rsid="000d1f1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left" style:justify-single-word="false"/>
      <style:text-properties fo:font-size="14pt" fo:font-style="italic" fo:font-weight="bold" officeooo:rsid="000d1f15" officeooo:paragraph-rsid="003a9ddd" style:font-size-asian="12.25pt" style:font-style-asian="italic" style:font-weight-asian="bold" style:font-size-complex="14pt" style:font-style-complex="italic" style:font-weight-complex="bold"/>
    </style:style>
    <style:style style:name="P32" style:family="paragraph" style:parent-style-name="Standard">
      <style:paragraph-properties fo:text-align="left" style:justify-single-word="false"/>
      <style:text-properties fo:font-size="12pt" fo:font-style="normal" fo:font-weight="normal" officeooo:rsid="000d1f15" officeooo:paragraph-rsid="0043e80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left" style:justify-single-word="false"/>
      <style:text-properties fo:font-size="12pt" fo:font-style="normal" fo:font-weight="normal" officeooo:rsid="000d1f15" officeooo:paragraph-rsid="00652993"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left" style:justify-single-word="false"/>
      <style:text-properties fo:font-size="12pt" fo:font-style="normal" style:text-underline-style="none" fo:font-weight="normal" officeooo:rsid="0064ee11" officeooo:paragraph-rsid="00652993"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font-size="12pt" fo:font-style="italic" fo:font-weight="normal" officeooo:rsid="0068c06e" officeooo:paragraph-rsid="0068c06e"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left" style:justify-single-word="false"/>
      <style:text-properties fo:font-size="12pt" fo:font-style="normal" fo:font-weight="normal" officeooo:rsid="000d1f15" officeooo:paragraph-rsid="004b240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left" style:justify-single-word="false"/>
      <style:text-properties fo:font-size="12pt" fo:font-style="normal" fo:font-weight="normal" officeooo:rsid="000d1f15" officeooo:paragraph-rsid="004d0413"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fo:font-size="12pt" fo:font-style="italic" fo:font-weight="normal" officeooo:rsid="004d31e8" officeooo:paragraph-rsid="004d31e8"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left" style:justify-single-word="false"/>
      <style:text-properties fo:font-size="12pt" fo:font-style="normal" style:text-underline-style="none" fo:font-weight="normal" officeooo:rsid="00543d02" officeooo:paragraph-rsid="00543d02" style:font-size-asian="10.5pt" style:font-style-asian="normal" style:font-weight-asian="normal" style:font-size-complex="12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officeooo:rsid="006a9479"/>
    </style:style>
    <style:style style:name="T3" style:family="text">
      <style:text-properties officeooo:rsid="006965b2"/>
    </style:style>
    <style:style style:name="T4" style:family="text">
      <style:text-properties fo:font-size="12pt" fo:font-style="normal" fo:font-weight="normal" officeooo:rsid="005973a1" style:font-size-asian="10.5pt" style:font-style-asian="normal" style:font-weight-asian="normal" style:font-size-complex="12pt" style:font-style-complex="normal" style:font-weight-complex="normal"/>
    </style:style>
    <style:style style:name="T5" style:family="text">
      <style:text-properties fo:font-size="12pt" fo:font-style="normal" fo:font-weight="normal" officeooo:rsid="005af870" style:font-size-asian="10.5pt" style:font-style-asian="normal" style:font-weight-asian="normal" style:font-size-complex="12pt" style:font-style-complex="normal" style:font-weight-complex="normal"/>
    </style:style>
    <style:style style:name="T6" style:family="text">
      <style:text-properties style:text-underline-style="none" officeooo:rsid="000c7975"/>
    </style:style>
    <style:style style:name="T7" style:family="text">
      <style:text-properties style:text-underline-style="none"/>
    </style:style>
    <style:style style:name="T8" style:family="text">
      <style:text-properties fo:font-size="12pt" fo:font-style="normal" style:text-underline-style="none" fo:font-weight="normal" officeooo:rsid="005d7b37"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5f7a51" style:font-size-asian="10.5pt" style:font-style-asian="normal" style:font-weight-asian="normal" style:font-size-complex="12pt" style:font-style-complex="normal" style:font-weight-complex="normal"/>
    </style:style>
    <style:style style:name="T10" style:family="text">
      <style:text-properties style:text-underline-style="none" officeooo:rsid="000ec825"/>
    </style:style>
    <style:style style:name="T11" style:family="text">
      <style:text-properties style:text-underline-style="none" officeooo:rsid="000fbf10"/>
    </style:style>
    <style:style style:name="T12" style:family="text">
      <style:text-properties style:text-underline-style="none" officeooo:rsid="0011bd98"/>
    </style:style>
    <style:style style:name="T13" style:family="text">
      <style:text-properties style:text-underline-style="none" officeooo:rsid="0012a3dc"/>
    </style:style>
    <style:style style:name="T14" style:family="text">
      <style:text-properties style:text-underline-style="none" officeooo:rsid="0012f78c"/>
    </style:style>
    <style:style style:name="T15" style:family="text">
      <style:text-properties style:text-underline-style="none" officeooo:rsid="0012ff83"/>
    </style:style>
    <style:style style:name="T16" style:family="text">
      <style:text-properties officeooo:rsid="0046a689"/>
    </style:style>
    <style:style style:name="T17" style:family="text">
      <style:text-properties style:text-underline-style="none" officeooo:rsid="001836e2"/>
    </style:style>
    <style:style style:name="T18" style:family="text">
      <style:text-properties style:text-underline-style="none" officeooo:rsid="0019e711"/>
    </style:style>
    <style:style style:name="T19" style:family="text">
      <style:text-properties style:text-underline-style="none" officeooo:rsid="001aaa3f"/>
    </style:style>
    <style:style style:name="T20" style:family="text">
      <style:text-properties style:text-underline-style="none" officeooo:rsid="0020aa3e"/>
    </style:style>
    <style:style style:name="T21" style:family="text">
      <style:text-properties style:text-underline-style="none" officeooo:rsid="0020f7de"/>
    </style:style>
    <style:style style:name="T22" style:family="text">
      <style:text-properties style:text-underline-style="none" officeooo:rsid="0061851d"/>
    </style:style>
    <style:style style:name="T23" style:family="text">
      <style:text-properties style:text-underline-style="none" officeooo:rsid="0068e390"/>
    </style:style>
    <style:style style:name="T24" style:family="text">
      <style:text-properties style:text-underline-style="none" officeooo:rsid="00633c6d"/>
    </style:style>
    <style:style style:name="T25" style:family="text">
      <style:text-properties style:text-underline-style="none" officeooo:rsid="001ae18c"/>
    </style:style>
    <style:style style:name="T26" style:family="text">
      <style:text-properties style:text-underline-style="none" officeooo:rsid="001cc204"/>
    </style:style>
    <style:style style:name="T27" style:family="text">
      <style:text-properties style:text-underline-style="none" officeooo:rsid="001fa1c8"/>
    </style:style>
    <style:style style:name="T28" style:family="text">
      <style:text-properties style:text-underline-style="none" officeooo:rsid="001ddb9f"/>
    </style:style>
    <style:style style:name="T29" style:family="text">
      <style:text-properties style:text-underline-style="none" officeooo:rsid="001eb67c"/>
    </style:style>
    <style:style style:name="T30" style:family="text">
      <style:text-properties style:text-underline-style="none" officeooo:rsid="001f2a2b"/>
    </style:style>
    <style:style style:name="T31" style:family="text">
      <style:text-properties style:text-underline-style="none" officeooo:rsid="00226fa4"/>
    </style:style>
    <style:style style:name="T32" style:family="text">
      <style:text-properties fo:font-size="12pt" fo:font-style="normal" style:text-underline-style="none" fo:font-weight="normal" officeooo:rsid="001f2a2b"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1fa1c8"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20aa3e" style:font-size-asian="10.5pt" style:font-style-asian="normal" style:font-weight-asian="normal" style:font-size-complex="12pt" style:font-style-complex="normal" style:font-weight-complex="normal"/>
    </style:style>
    <style:style style:name="T35" style:family="text">
      <style:text-properties officeooo:rsid="001fa1c8"/>
    </style:style>
    <style:style style:name="T36" style:family="text">
      <style:text-properties officeooo:rsid="00237eaa"/>
    </style:style>
    <style:style style:name="T37" style:family="text">
      <style:text-properties officeooo:rsid="0024cd0d"/>
    </style:style>
    <style:style style:name="T38" style:family="text">
      <style:text-properties officeooo:rsid="00226fa4"/>
    </style:style>
    <style:style style:name="T39" style:family="text">
      <style:text-properties officeooo:rsid="0020aa3e"/>
    </style:style>
    <style:style style:name="T40" style:family="text">
      <style:text-properties officeooo:rsid="0024ce5e"/>
    </style:style>
    <style:style style:name="T41" style:family="text">
      <style:text-properties officeooo:rsid="002685c4"/>
    </style:style>
    <style:style style:name="T42" style:family="text">
      <style:text-properties officeooo:rsid="002717ed"/>
    </style:style>
    <style:style style:name="T43" style:family="text">
      <style:text-properties officeooo:rsid="00274e61"/>
    </style:style>
    <style:style style:name="T44" style:family="text">
      <style:text-properties officeooo:rsid="00279265"/>
    </style:style>
    <style:style style:name="T45" style:family="text">
      <style:text-properties fo:font-style="italic" style:font-style-asian="italic" style:font-style-complex="italic"/>
    </style:style>
    <style:style style:name="T46" style:family="text">
      <style:text-properties fo:font-style="italic" officeooo:rsid="00450e8a" style:font-style-asian="italic" style:font-style-complex="italic"/>
    </style:style>
    <style:style style:name="T47" style:family="text">
      <style:text-properties fo:font-style="italic" officeooo:rsid="0040cc1f" style:font-style-asian="italic" style:font-style-complex="italic"/>
    </style:style>
    <style:style style:name="T48" style:family="text">
      <style:text-properties style:text-underline-style="none" officeooo:rsid="00279265"/>
    </style:style>
    <style:style style:name="T49" style:family="text">
      <style:text-properties style:text-underline-style="none" officeooo:rsid="00440b5d"/>
    </style:style>
    <style:style style:name="T50" style:family="text">
      <style:text-properties style:text-underline-style="none" officeooo:rsid="002917ee"/>
    </style:style>
    <style:style style:name="T51" style:family="text">
      <style:text-properties fo:font-size="12pt" fo:font-style="normal" style:text-underline-style="none" fo:font-weight="normal" officeooo:rsid="002be470" style:font-size-asian="10.5pt" style:font-style-asian="normal" style:font-weight-asian="normal" style:font-size-complex="12pt" style:font-style-complex="normal" style:font-weight-complex="normal"/>
    </style:style>
    <style:style style:name="T52" style:family="text">
      <style:text-properties fo:font-size="12pt" fo:font-style="normal" style:text-underline-style="none" fo:font-weight="normal" officeooo:rsid="00344efb" style:font-size-asian="10.5pt" style:font-style-asian="normal" style:font-weight-asian="normal" style:font-size-complex="12pt" style:font-style-complex="normal" style:font-weight-complex="normal"/>
    </style:style>
    <style:style style:name="T53" style:family="text">
      <style:text-properties fo:font-size="12pt" fo:font-style="normal" style:text-underline-style="none" fo:font-weight="normal" officeooo:rsid="002cc86f" style:font-size-asian="10.5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normal" officeooo:rsid="0064ee11" style:font-size-asian="10.5pt" style:font-style-asian="normal" style:font-weight-asian="normal" style:font-size-complex="12pt" style:font-style-complex="normal" style:font-weight-complex="normal"/>
    </style:style>
    <style:style style:name="T55" style:family="text">
      <style:text-properties fo:font-size="12pt" style:text-underline-style="none" fo:font-weight="normal" officeooo:rsid="002be470" style:font-size-asian="10.5pt" style:font-weight-asian="normal" style:font-size-complex="12pt" style:font-weight-complex="normal"/>
    </style:style>
    <style:style style:name="T56" style:family="text">
      <style:text-properties fo:font-size="12pt" style:text-underline-style="none" fo:font-weight="normal" style:font-size-asian="10.5pt" style:font-weight-asian="normal" style:font-size-complex="12pt" style:font-weight-complex="normal"/>
    </style:style>
    <style:style style:name="T57" style:family="text">
      <style:text-properties fo:font-size="12pt" fo:font-style="normal" style:text-underline-style="none" fo:font-weight="normal" officeooo:rsid="002e1568" style:font-size-asian="10.5pt" style:font-style-asian="normal" style:font-weight-asian="normal" style:font-size-complex="12pt" style:font-style-complex="normal" style:font-weight-complex="normal"/>
    </style:style>
    <style:style style:name="T58" style:family="text">
      <style:text-properties fo:font-size="12pt" fo:font-style="normal" style:text-underline-style="none" fo:font-weight="normal" officeooo:rsid="002cfcc3" style:font-size-asian="10.5pt" style:font-style-asian="normal" style:font-weight-asian="normal" style:font-size-complex="12pt" style:font-style-complex="normal" style:font-weight-complex="normal"/>
    </style:style>
    <style:style style:name="T59" style:family="text">
      <style:text-properties fo:font-size="12pt" fo:font-style="normal" style:text-underline-style="none" fo:font-weight="normal" officeooo:rsid="002ecd94" style:font-size-asian="10.5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02f10bf" style:font-size-asian="10.5pt" style:font-style-asian="normal" style:font-weight-asian="normal" style:font-size-complex="12pt" style:font-style-complex="normal" style:font-weight-complex="normal"/>
    </style:style>
    <style:style style:name="T61" style:family="text">
      <style:text-properties fo:font-size="12pt" fo:font-style="normal" style:text-underline-style="none" fo:font-weight="normal" officeooo:rsid="0031ef25" style:font-size-asian="10.5pt" style:font-style-asian="normal" style:font-weight-asian="normal" style:font-size-complex="12pt" style:font-style-complex="normal" style:font-weight-complex="normal"/>
    </style:style>
    <style:style style:name="T62" style:family="text">
      <style:text-properties fo:font-size="12pt" fo:font-style="normal" style:text-underline-style="none" fo:font-weight="normal" officeooo:rsid="003a9ddd" style:font-size-asian="10.5pt" style:font-style-asian="normal" style:font-weight-asian="normal" style:font-size-complex="12pt" style:font-style-complex="normal" style:font-weight-complex="normal"/>
    </style:style>
    <style:style style:name="T63" style:family="text">
      <style:text-properties fo:font-size="12pt" fo:font-style="normal" style:text-underline-style="none" fo:font-weight="normal" officeooo:rsid="003ebc71" style:font-size-asian="10.5pt" style:font-style-asian="normal" style:font-weight-asian="normal" style:font-size-complex="12pt" style:font-style-complex="normal" style:font-weight-complex="normal"/>
    </style:style>
    <style:style style:name="T64" style:family="text">
      <style:text-properties fo:font-size="12pt" fo:font-style="normal" style:text-underline-style="none" fo:font-weight="normal" officeooo:rsid="0032bf59" style:font-size-asian="10.5pt" style:font-style-asian="normal" style:font-weight-asian="normal" style:font-size-complex="12pt" style:font-style-complex="normal" style:font-weight-complex="normal"/>
    </style:style>
    <style:style style:name="T65" style:family="text">
      <style:text-properties fo:font-size="12pt" fo:font-style="normal" style:text-underline-style="none" fo:font-weight="normal" officeooo:rsid="003c80bd" style:font-size-asian="10.5pt" style:font-style-asian="normal" style:font-weight-asian="normal" style:font-size-complex="12pt" style:font-style-complex="normal" style:font-weight-complex="normal"/>
    </style:style>
    <style:style style:name="T66" style:family="text">
      <style:text-properties fo:font-size="12pt" fo:font-style="normal" style:text-underline-style="none" fo:font-weight="normal" officeooo:rsid="0047ba91" style:font-size-asian="10.5pt" style:font-style-asian="normal" style:font-weight-asian="normal" style:font-size-complex="12pt" style:font-style-complex="normal" style:font-weight-complex="normal"/>
    </style:style>
    <style:style style:name="T67" style:family="text">
      <style:text-properties fo:font-size="12pt" fo:font-style="normal" style:text-underline-style="none" fo:font-weight="normal" officeooo:rsid="004b2405" style:font-size-asian="10.5pt" style:font-style-asian="normal" style:font-weight-asian="normal" style:font-size-complex="12pt" style:font-style-complex="normal" style:font-weight-complex="normal"/>
    </style:style>
    <style:style style:name="T68" style:family="text">
      <style:text-properties fo:font-size="12pt" fo:font-style="normal" style:text-underline-style="none" fo:font-weight="normal" officeooo:rsid="003d09fd" style:font-size-asian="10.5pt" style:font-style-asian="normal" style:font-weight-asian="normal" style:font-size-complex="12pt" style:font-style-complex="normal" style:font-weight-complex="normal"/>
    </style:style>
    <style:style style:name="T69" style:family="text">
      <style:text-properties fo:font-size="12pt" style:text-underline-style="none" fo:font-weight="normal" officeooo:rsid="0043246f" style:font-size-asian="10.5pt" style:font-weight-asian="normal" style:font-size-complex="12pt" style:font-weight-complex="normal"/>
    </style:style>
    <style:style style:name="T70" style:family="text">
      <style:text-properties fo:font-size="12pt" style:text-underline-style="none" fo:font-weight="normal" officeooo:rsid="0043e80b" style:font-size-asian="10.5pt" style:font-weight-asian="normal" style:font-size-complex="12pt" style:font-weight-complex="normal"/>
    </style:style>
    <style:style style:name="T71" style:family="text">
      <style:text-properties style:text-underline-style="none" officeooo:rsid="00382155"/>
    </style:style>
    <style:style style:name="T72" style:family="text">
      <style:text-properties style:text-underline-style="none" officeooo:rsid="0048dc23"/>
    </style:style>
    <style:style style:name="T73" style:family="text">
      <style:text-properties style:text-underline-style="none" officeooo:rsid="00344efb"/>
    </style:style>
    <style:style style:name="T74" style:family="text">
      <style:text-properties style:text-underline-style="none" officeooo:rsid="003619c3"/>
    </style:style>
    <style:style style:name="T75" style:family="text">
      <style:text-properties style:text-underline-style="none" officeooo:rsid="002cc86f"/>
    </style:style>
    <style:style style:name="T76" style:family="text">
      <style:text-properties style:text-underline-style="none" officeooo:rsid="0064ee11"/>
    </style:style>
    <style:style style:name="T77" style:family="text">
      <style:text-properties style:text-underline-style="none" officeooo:rsid="004a83a7"/>
    </style:style>
    <style:style style:name="T78" style:family="text">
      <style:text-properties style:text-underline-style="none" officeooo:rsid="004b2405"/>
    </style:style>
    <style:style style:name="T79" style:family="text">
      <style:text-properties style:text-underline-style="none" officeooo:rsid="004c1993"/>
    </style:style>
    <style:style style:name="T80" style:family="text">
      <style:text-properties style:text-underline-style="none" officeooo:rsid="003a9ddd"/>
    </style:style>
    <style:style style:name="T81" style:family="text">
      <style:text-properties style:text-underline-style="none" officeooo:rsid="003c80bd"/>
    </style:style>
    <style:style style:name="T82" style:family="text">
      <style:text-properties style:text-underline-style="none" officeooo:rsid="004d0413"/>
    </style:style>
    <style:style style:name="T83" style:family="text">
      <style:text-properties style:text-underline-style="none" officeooo:rsid="003d09fd"/>
    </style:style>
    <style:style style:name="T84" style:family="text">
      <style:text-properties style:text-underline-style="none" officeooo:rsid="004ea6c4"/>
    </style:style>
    <style:style style:name="T85" style:family="text">
      <style:text-properties style:text-underline-style="none" officeooo:rsid="00509172"/>
    </style:style>
    <style:style style:name="T86" style:family="text">
      <style:text-properties officeooo:rsid="00549615"/>
    </style:style>
    <style:style style:name="T87" style:family="text">
      <style:text-properties officeooo:rsid="005511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Αναφορά πάνω στην 1η εργασία</text:p>
      <text:p text:style-name="P3"/>
      <text:p text:style-name="P4">###### #####<text:span text:style-name="T2">#</text:span></text:p>
      <text:p text:style-name="P3">ΑΕΜ: <text:span text:style-name="T3">####</text:span></text:p>
      <text:p text:style-name="P5">25/10/2024</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list text:style-name="L1">
        <text:list-item>
          <text:p text:style-name="P7">Περίληψη:<text:tab/></text:p>
        </text:list-item>
      </text:list>
      <text:p text:style-name="P8"/>
      <text:p text:style-name="P8"><text:tab/><text:span text:style-name="T4">Στην αναφορά παρακάτω παρουσιάζεται </text:span><text:span text:style-name="T5">η πορεία μου στον προγραμματισμό ενός οδηγού ένδειξεων 7-τμημάτων της πλακέτας Nexys Α-7 100T καθώς και λεπτομέρειες όσον αφορά την υλοποίηση μου, την επαλήθευση και την δοκιμή αυτής, καθώς και προβλήματα που αντιμετώπισα στην εκτέλεση των παραπάνω. Αυτό περιλαμβάνει τον προγραμματισμό και τη δοκιμή ενός αποκωδικοποιητή 7-τμημάτων, μιας μονάδας συγχρονισμού και anti-bounce για τη σωστη λειτουργία των εισόδων-κουμπιών, έναν οδηγό τεσσάρων ανόδων και διαφόρων μηχανισμών εμφάνισης ενός μυνηματος στις ενδείξεις</text:span></text:p>
      <text:p text:style-name="P9"><text:span text:style-name="T6"/></text:p>
      <text:p text:style-name="P9"><text:span text:style-name="T6"/></text:p>
      <text:list text:style-name="L2">
        <text:list-item>
          <text:p text:style-name="P10"><text:span text:style-name="T6">Ε</text:span><text:span text:style-name="T7">ισαγωγή:</text:span></text:p>
        </text:list-item>
      </text:list>
      <text:p text:style-name="P11"><text:span text:style-name="T7"/></text:p>
      <text:p text:style-name="P11"><text:span text:style-name="T7"><text:tab/></text:span><text:span text:style-name="T8">Η εργασία είχε σαν κύριο στόχο την σωστή οδήγηση ένδειξεων επτά τμημάτων. Με τον διαχωρισμό της γίνεται ευκολότερη η διάκριση των επιμέρων στόχων της.</text:span></text:p>
      <text:p text:style-name="P11"><text:span text:style-name="T8"><text:tab/>Πρώτο στόχο αποτελούσε ο προγραμματισμός αποκωδικοποιητή και η σωστή οδήγηση των καθώδων των ενδείξεων, το οποίο επιτεύχθηκε εύκολα με τη χρήση ενός switch statement και μερικών αναθέσεων. Στόχος ήταν επίσης η σωστή οδήγηση των ανόδων, κάτι που επιτεύχθηκε με τη χρήση μετρητή. </text:span><text:span text:style-name="T9">Επιπλέον στόχο αποτέλεσε η αποτύπωση ενός μυνήματος με τη χρήση των ενδείξεων. Κρατώντας το μύνημα σε καταχωρητή, χρειάστηκε <text:s/>τρόπος για τη “περιστροφή” του, την οποία υλοποιήσαμε με δύο τρόπους: αρχικά με τη χρήση ενός κουμπιού και έπειτα με βηματική περιστροφή, χρησιμοποιώντας μετρητή.</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list text:continue-numbering="true" text:style-name="L2">
        <text:list-item>
          <text:p text:style-name="P12"><text:soft-page-break/>Μέρος 1ο – Υλοποίηση αποκωδικοποιητή 7-τμημάτων:</text:p>
        </text:list-item>
      </text:list>
      <text:p text:style-name="P13"><text:span text:style-name="T7"/></text:p>
      <text:p text:style-name="P13"><text:span text:style-name="T7"><text:tab/>Το κύκλωμα που φτιάχτηκε στο πρώτο κομμάτι της εργασίας είναι ένας απλός αποκωδικοποιητής. Σάν είσοδο του έχει έναν 4-bit αριθμό, ο οποίος περιγράφει ποιό δεκαεξαδικό ψηφίο θέλουμε να εμφανιστεί στην ένδειξη των 7 τμημάτων, και σαν έξοδο του έχει εναν 7-bit αριθμό που υποδεικνύει </text:span><text:span text:style-name="T10">ποιά στοιχεία της ένδειξς θα είναι ανοιχτά για να </text:span><text:span text:style-name="T11">εμφανιστεί σωστά ο αριθμός, η καλύτερα, ποιά σήματα καθόδων θα οδήγούνται στο 0.</text:span></text:p>
      <text:p text:style-name="P13"><text:span text:style-name="T7"><text:tab/></text:span><text:span text:style-name="T11">Η υλοποίηση του παραπάνω κυκλώματος συνδιαστικής λογικής μπορεί να επιτευχθεί με τη χρήση μίας μονάδας, η οποία περιέχει ένα switch case block, το οποίο περιέχεται μέσα σε ένα alwys block. </text:span><text:span text:style-name="T12">Και τα δύο έχουν την είσοδο</text:span><text:span text:style-name="T11"> </text:span><text:span text:style-name="T12">της μονάδας σάν μοναδικό στοιχείο της λίστας ευαισθησίας τους.</text:span></text:p>
      <text:p text:style-name="P13"><text:span text:style-name="T12"/></text:p>
      <text:p text:style-name="P13"><text:span text:style-name="T12"/></text:p>
      <text:p text:style-name="P13"><text:span text:style-name="T12"><text:tab/></text:span><text:span text:style-name="T13">Για να ελέ</text:span><text:span text:style-name="T14">γ</text:span><text:span text:style-name="T13">ξουμε την ορθή περιγραφή της μονάδας, αρκεί να ελέ</text:span><text:span text:style-name="T14">γ</text:span><text:span text:style-name="T13">ξουμε οτι κάθε είσοδος αποκωδικοποιείται στη σωστή έξοδο. Το testbench ελέγχει το παραπάνω εισάγοντας κάθε είσοδο στη μονάδα, με διαφορά 10ns, επιτρέποντάς μας να ελέ</text:span><text:span text:style-name="T15">γ</text:span><text:span text:style-name="T13">ξουμε την έξοδο διαμέσω των κυματομορφών. </text:span><text:span text:style-name="T14">Παρακάτω φαίνεται ένα στιγμιότυπο που αποτυπώνει τις κυματομορφές αυτές, μέσω behavioural simulation στο vivado.</text:span></text:p>
      <text:p text:style-name="P14"><text:tab/></text:p>
      <text:p text:style-name="P15"><draw:frame draw:style-name="fr1" draw:name="Image1" text:anchor-type="char" svg:x="-0.0835in" svg:y="0.098in" svg:width="6.6929in" svg:height="3.7965in" draw:z-index="0"><draw:image xlink:href="Pictures/1000000100000A82000005F6AF071108.png" xlink:type="simple" xlink:show="embed" xlink:actuate="onLoad" draw:mime-type="image/png"/></draw:frame>Part A <text:span text:style-name="T16">Top Module </text:span>Behavioural simulation</text:p>
      <text:p text:style-name="P16"><text:span text:style-name="T7"/></text:p>
      <text:p text:style-name="P17"><text:span text:style-name="T7"><text:tab/></text:span><text:span text:style-name="T17">Αν και δεν μπορεί να χρησιμοποιηθεί το FPGA για τον έλεγχο αυτού του κομματιού της εργασίας, </text:span><text:span text:style-name="T18">μπορούμε να διαβεβαιώσουμε οτι η σύνθεση και η υλοποίηση εκτελούνται επιτυχώς. Πράγματι, δεν προέκυψε κάποιο πρόβλημα κατα την σύνθεση ή την υλοποίηση.</text:span></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8"><text:span text:style-name="T7"/></text:p>
      <text:list text:continue-numbering="true" text:style-name="L2">
        <text:list-item>
          <text:p text:style-name="P12"><text:soft-page-break/>Μέρος 2ο – Οδήγηση τεσσάρων ψηφίων:</text:p>
        </text:list-item>
      </text:list>
      <text:p text:style-name="P19"><text:span text:style-name="T7"/></text:p>
      <text:p text:style-name="P19"><text:span text:style-name="T7"><text:tab/></text:span><text:span text:style-name="T19">Σε αυτό το κομμάτι της εργασίας, θα χρειαστεί να προσθέσουμε </text:span><text:span text:style-name="T20">τέσσερεις</text:span><text:span text:style-name="T19"> επιπλέον μονάδες στο κύκλωμα: </text:span><text:span text:style-name="T20">την μονάδα </text:span><text:span text:style-name="T21">MMCM</text:span><text:span text:style-name="T20"> που θα μας επιτρέψει να έχουμε ρολόι με διαφορετική περίοδο απο το αρχικό, </text:span><text:span text:style-name="T19">την μονάδα υπεύθυνη για την οδήγηση των ανόδων, μία μονάδα που θα λειτουργεί ώς συγχρονιστής και ως anti-bounce για το σημα reset ,καθώς το top module που θα είναι υπέυθυνο για το instantiation των υπόλοιπων μονάδων. Έ</text:span><text:span text:style-name="T22">να διάγραμα που αποτυπώνει τη ροή των </text:span><text:span text:style-name="T23">δεδομένων</text:span><text:span text:style-name="T22"> φαίτεται παρακάτω</text:span></text:p>
      <text:p text:style-name="P19"><text:span text:style-name="T22"/></text:p>
      <text:p text:style-name="P19"><text:span text:style-name="T22"/></text:p>
      <text:p text:style-name="P19"><text:span text:style-name="T22"><text:tab/></text:span><draw:frame draw:style-name="fr1" draw:name="Image6" text:anchor-type="char" svg:x="0in" svg:y="0.1457in" svg:width="6.6929in" svg:height="5.3984in" draw:z-index="5"><draw:image xlink:href="Pictures/10000001000004D9000003E974BFBAED.png" xlink:type="simple" xlink:show="embed" xlink:actuate="onLoad" draw:mime-type="image/png"/></draw:frame></text:p>
      <text:p text:style-name="P20"><text:span text:style-name="T19">P</text:span><text:span text:style-name="T7">art B Dataflow Diagra</text:span><text:span text:style-name="T24">mm</text:span></text:p>
      <text:p text:style-name="P19"><text:span text:style-name="T19"/></text:p>
      <text:p text:style-name="P19"><text:span text:style-name="T19"><text:tab/></text:span><text:span text:style-name="T25">Η μονάδα leddriver είναι υπεύθυνη για τη σωστή οδήγηση τ</text:span><text:span text:style-name="T26">ω</text:span><text:span text:style-name="T25">ν </text:span><text:span text:style-name="T26">τεσσάρων</text:span><text:span text:style-name="T25"> ανόδων, το οποίο γίνεται με τη χρήση ενός 4-bit μετρητή </text:span><text:span text:style-name="T27">και ένα switch case block</text:span><text:span text:style-name="T25">. </text:span><text:span text:style-name="T26">Αυτό επιτυγχάνεται με τη χρήση ενός always block με ασύγχρονο reset.</text:span><text:span text:style-name="T25"> Πρέπει τα σήματα τον ανόδων να μήν επικαλύπτονται όταν βρίσκονται στο 0 (δηλαδή είναι ενεργά), γιατί αυτό θα οδηγήσει στην αλλοίωση των ενδείξεων, οπότε κάθε άνοδος ανοίγει με </text:span><text:span text:style-name="T26">διαφορά τεσσάρων κύκλων ρολογιού απο τη προηγούμενη</text:span><text:span text:style-name="T25">. </text:span><text:span text:style-name="T28">Για παράδειγμα, όταν το reset δεν είναι πατημένο, και η τιμή του counter, είναι 4’b0010, τότε η τιμή της πρώτης ανόδου θα οδηγηθεί στο 0, ενώ η τιμή όλων των υπολοίπων θα οδηγηθούν στο 1. Άρα στον επόμενο κύκλο θα οδηγηθεί και αυτή στο 0, και μετά απο 4 κύκλους η τιμή της δεύτερης ανόδου θα οδηγηθεί στο 0 με τη σειρά της</text:span></text:p>
      <text:p text:style-name="P21"><text:soft-page-break/><text:span text:style-name="T28"><text:tab/>Η μονάδα anti-bounce είναι υπεύθυνη για τη σωστή καταγραφή μιας εισόδου, το οποίο περιλαμβάνει έναν συγχρονιστή και προφανώς μια μονάδα anti-bounce, έχοντας ενα always block για το καθένα απο αυτά </text:span><text:span text:style-name="T29">(καί τα δύο έχουν στη λίστα ευαισθησίας τους μόνο το ρολόι)</text:span><text:span text:style-name="T28">. </text:span><text:span text:style-name="T29">Υλοποιούμε τον συγχρονιστή με την χρήση δύο flip-flops, το οποίο στη verilog συνεπάγεται την ανάθεση της εισόδου σε ένα καταχωρητή, και την ανάθεση του καταχωρητή αυτού στην έξοδο, το οποίο θα γίνει μέσα στην always που αναφέρθηκε νωριτερα. Το anti-bounce υλοποιείται με τη χρήση ενός </text:span><text:span text:style-name="T30">32-bit </text:span><text:span text:style-name="T29">μετρητή, ο οποίος καθυστερεί την ανάθεση μέχρι ο μετρητής φτάσει σε μία συγκεκριμένη τιμή (εδώ μετά απο 2147483648 κύκλους), η τιμή της εξόδου θα γίνει ίση με τη τιμή της εισόδου και ο μετρητής θα ξαναμηδενιστεί. Ο counter θα αυξάνεται μόνο αν </text:span><text:span text:style-name="T30">οι καταχωρητές που έχουμε στα flip flops είναι ίσοι μεταξύ τους, αλλιώς θα μηδενίζεται.</text:span></text:p>
      <text:p text:style-name="P21"><text:span text:style-name="T30"><text:tab/></text:span><text:span text:style-name="T21">Η μονάδα MMCM είναι ήδη υλοποιημένη, οπότε για να πετύχουμε την επιθυμιτή </text:span><text:span text:style-name="T31">συχνότητα των 5MHz αντί της αρχικής συχνότητας 100MHz, προσαρμόζουμε αντίστοιχα τις εισόδους της.</text:span></text:p>
      <text:p text:style-name="P22"><text:span text:style-name="T32"><text:tab/></text:span><text:span text:style-name="T33">Η top μονάδα κάνει instantiate μία μονάδα MMCM (</text:span>MMCME2_BASE_inst<text:span text:style-name="T33">), η οποία μας δίνει ένα ρολόι </text:span><text:span text:style-name="T34">CLKOUT1 </text:span><text:span text:style-name="T33">με </text:span><text:span text:style-name="T34">συχνότητα </text:span><text:span text:style-name="T33">5MHz (δηλαδή με 20 φορές μικρότερη συχνότητα απο το αρχικό), μία μονάδα anti-bounce (</text:span>reset_synchroniser_antibounce<text:span text:style-name="T35">), </text:span><text:span text:style-name="T36">μία μονάδα leddecoder (leddecoder_inst), </text:span><text:span text:style-name="T37">αναθέτοντας κάθε bit της εξόδου της στη κατάλληλη κάθοδο (στο dp αναθέτει 1), </text:span><text:span text:style-name="T36">και μία μονάδα leddriver (leddriver_inst)</text:span><text:span text:style-name="T35">. </text:span><text:span text:style-name="T38">Μόνο το anti-bounce </text:span><text:span text:style-name="T39">χρησίμοποιεί το αρχικό ρολόι, </text:span><text:span text:style-name="T38">ενώ οι υπόλοιπες μονάδες χρησιμοποιούν το αργό ρολόι. </text:span><text:span text:style-name="T40">Αναθέτει επίσης δοκιμαστικά, την τιμή 5 σε ένα 4bit καλώδιο “char” (που θα αποτελέσει είσοδο στο </text:span><text:span text:style-name="T36">leddecoder_inst</text:span><text:span text:style-name="T40">). </text:span><text:span text:style-name="T41">(Με τον χαρακτήρα θα ασχοληθούμε κυρίως στα επόμενα κομμάτια της εργασίας)</text:span><text:span text:style-name="T40">.</text:span></text:p>
      <text:p text:style-name="P22"/>
      <text:p text:style-name="P22"/>
      <text:p text:style-name="P22"><text:tab/><text:span text:style-name="T41">Για να ελεγξουμέ σωστα το πρόγραμμα, κατασκεβάζουμε testbench για καθεμια απο τις υπομονάδες. Για το antibounce </text:span><text:span text:style-name="T42">αρχικά, μειώνουμε τη τιμή του counter στη μονάδα απο 32-bit σε 4-bit για να γίνει ο έλεγχος ευκολότερος. Για τις εισόδους, αναθέτουμε τυχαία το κουμπί, με μεγάλες και μικρές καθυστερήσεις μέχρι την απενεργοποίησή του, και βάζουμε το ρολόι να εναλλάσεται συνεχως μέσω ενός forever block </text:span><text:span text:style-name="T43">ανα 5ns </text:span><text:span text:style-name="T42">έ</text:span><text:span text:style-name="T43">τσι ωστε να έχει περίδο 100MHz</text:span><text:span text:style-name="T42">. </text:span><text:span text:style-name="T43">Για το leddriver κααι το top το testbench είναι όμοιο, αφού η μόνη είσοδος που μπορούμε να ελεγξουμε είναι και στα δύο το reset. Αναθέτουμε το ρολόι όπως και στο antibounce, ενώ ενεργοποιούμε το reset αρχικά ελάχιστα και έπειτα για μεγάλο χρονικό διάστημα.</text:span></text:p>
      <text:p text:style-name="P22"><text:tab/><text:span text:style-name="T43">Ο κύριος έλεγχος του κυκλώματος έ</text:span><text:span text:style-name="T44">γινε δια μέσω του vivado. Για τον έλεγχο της σωστής λειτουργίας έγινε έλεγχος με behavioural simulation, καθώς και με post synthesis και post implementation simulation (functional και timing). Για την εκμετάλευση των προσομοιώσεων αυτών, έγινε έλεγχος των κυματομορφών που παρήγαν μεταξύ τους </text:span></text:p>
      <text:p text:style-name="P22"><text:tab/><text:span text:style-name="T44">Το πλαίσιο δοκιμής αυτο έδειξε έναν αριθμό σχεδιαστικών προβλημάτων, κυρίως στην ανάθεση λανθασμένων τμών στην μονάδα MMCM, όπως και στη λανθασμένη χρήση δεύτερου always block στηn leddriver μονάδα, που παρατηρήθηκε λόγω της μη-λειτουργίας του reset.</text:span></text:p>
      <text:p text:style-name="P22"><text:span text:style-name="T39"><text:tab/> </text:span><text:span text:style-name="T44">Παρακάτω εμφανίζονται δύο στιγμιότηπα που εμφανίζουν το post-synthesis και post-implementation functional simulation:</text:span></text:p>
      <text:p text:style-name="P23"><draw:frame draw:style-name="fr2" draw:name="Image2" text:anchor-type="char" svg:width="6.6929in" svg:height="3.7965in" draw:z-index="1"><draw:image xlink:href="Pictures/1000000100000A82000005F6D01B547A.png" xlink:type="simple" xlink:show="embed" xlink:actuate="onLoad" draw:mime-type="image/png"/></draw:frame><text:soft-page-break/><text:span text:style-name="T45">Part B </text:span><text:span text:style-name="T46">Top Module</text:span><text:span text:style-name="T45"> Post-Implementation </text:span><text:span text:style-name="T47">Functional </text:span><text:span text:style-name="T45">Simulation</text:span><text:span text:style-name="T47">­</text:span></text:p>
      <text:p text:style-name="P24"><draw:frame draw:style-name="fr1" draw:name="Image3" text:anchor-type="char" svg:x="0in" svg:y="0.0772in" svg:width="6.6929in" svg:height="3.7965in" draw:z-index="2"><draw:image xlink:href="Pictures/1000000100000A82000005F654B08604.png" xlink:type="simple" xlink:show="embed" xlink:actuate="onLoad" draw:mime-type="image/png"/></draw:frame><text:span text:style-name="T48">P</text:span><text:span text:style-name="T7">art B </text:span><text:span text:style-name="T49">Top Module </text:span><text:span text:style-name="T7">Post-Synthesis Functional Simulation</text:span></text:p>
      <text:p text:style-name="P25"><text:tab/></text:p>
      <text:p text:style-name="P26"><text:span text:style-name="T48"/></text:p>
      <text:p text:style-name="P26"><text:span text:style-name="T48"/></text:p>
      <text:p text:style-name="P26"><text:span text:style-name="T48"/></text:p>
      <text:p text:style-name="P26"><text:span text:style-name="T48"><text:tab/>Σ</text:span><text:span text:style-name="T7">την FPGA χρειάστηκαν δυό επαναπρογραμματισμοί, καθώς στον πρώτο προγραμματισμό δεν λειτουργούσε το reset, κάτι που οδήγησε στην αλλαγή λογικής στην leddriver μονάδα που αναφέρθηκε και παραπάνω. Πέρα απο αυτό το πρόβλημα όμως </text:span><text:span text:style-name="T50">δέν παρουσιάστηκε κάποια άλλη δυσκολία, και δέν αντιμετωπίστικε κάποιο ηλεκτρικό πρόβλημα. Μετά τη διόρθωση του προβλήματος η πλακέτα έδειχνε 5 σε 4 απο τις ενδείξεις της, η στιγμιαία τίποτα αν πατούσαμε το reset, συμπεριφορά η οποία ήταν η αναμενόμενη</text:span></text:p>
      <text:p text:style-name="P11"><text:soft-page-break/><text:span text:style-name="T7"><text:tab/></text:span><text:span text:style-name="T7"/></text:p>
      <text:list text:continue-numbering="true" text:style-name="L2">
        <text:list-item>
          <text:p text:style-name="P12">Μέρος 3ο – Βηματική περιστροφή του μυνήματος με χρήση κουμπιού:</text:p>
        </text:list-item>
      </text:list>
      <text:p text:style-name="P27"/>
      <text:p text:style-name="P11"><text:span text:style-name="T7"><text:tab/></text:span><text:span text:style-name="T51">Σε αυτό το κομμάτι της εργασίας, θα προσαρμόσουμε τ</text:span><text:span text:style-name="T52">ο κύκλωμα</text:span><text:span text:style-name="T51"> ωστε να έχουμε ένα μύνημα (ένα σύνολο απο χαρακτήρες) σε έναν καταχωρητή, “περιστρέφοντάς το” με τη χρήση ενός κουμπιού (συγκεκριμένα του κουμπιού BTNR). Συγκεκριμένα θα επεκτείνουμε τη λειτουργιά της leddriver μονάδας ωστε να έχει τον καταχωρητή με το μύνημα και να αλλάζει την τιμή του χαρακτήρα που θα οδηγήσει τις καθόδους, ανάλογα με το πόσες φορές πατήθηκε το κουμπί καθώς και ανάλογα με τις τιμές των ανόδων. </text:span><text:span text:style-name="T53">Αξίζει να σημειωθεί οτι θα επεκτείνουμε τα constraints έτσι ωστε πλέον να αναγνωρίζεται το κουμπι BTNR (που αντιστοιχεί στην ακίδα <text:s/>M17) σαν είσοδος. Έ</text:span><text:span text:style-name="T54">να διάγραμμα για την ροή των δεδομένων σε αυτό το κομμάτι φαίνεται παρακάτω:</text:span></text:p>
      <text:p text:style-name="P11"><text:span text:style-name="T54"/></text:p>
      <text:p text:style-name="P28"><draw:frame draw:style-name="fr3" draw:name="Image7" text:anchor-type="char" svg:width="6.5472in" svg:height="5.3291in" draw:z-index="6"><draw:image xlink:href="Pictures/10000001000004CF000003EAE6F85BC4.png" xlink:type="simple" xlink:show="embed" xlink:actuate="onLoad" draw:mime-type="image/png"/></draw:frame><text:span text:style-name="T54"/></text:p>
      <text:p text:style-name="P29"><text:span text:style-name="T55">P</text:span><text:span text:style-name="T56">artC Dataflow Diagramm</text:span></text:p>
      <text:p text:style-name="P11"><text:span text:style-name="T51"/></text:p>
      <text:p text:style-name="P11"><text:span text:style-name="T51"><text:tab/></text:span><text:span text:style-name="T53">Για να το πετύχουμε αυτό προσθέτουμε στην leddriver μονάδα </text:span><text:span text:style-name="T57">το κουμπί σαν είσοδο, έναν χαρακτήρα σαν έξοδο, και </text:span><text:span text:style-name="T53">ένα δεύτερο always block </text:span><text:span text:style-name="T58">(με ασύγχρονο reset)</text:span><text:span text:style-name="T53">, το οποίο θα είναι υπεύθυνο για να υποδυκνύει ποιό κομμάτι του μυνήματος θα πρέπει να φαίνεται στη πλακέτα. Αρχικά θα χρειαστεί να κρατήσουμε </text:span><text:span text:style-name="T58">τέσσερεις θέσεις του καταχώρητή την μία δίπλα απο την άλλη, κάτι που επιτυγχάνεται με τη χρήση τεσσάρων μεταβλητών. Επίσης θα πρέπει να αλλάζουμε τις θέσεις αυτές κατα 1 κάθε φορά που θα χρησιμοποιείται το κουμπί. Θα κρατήσουμε </text:span><text:span text:style-name="T57">επίσης την προηγούμενη τιμή του κουμπιού έτσι ωστε να μήν αλλάζει συνεχώς το μύνημα αν το κουμπί μείνει πατημένο. Συγκεκριμένα, ό</text:span><text:span text:style-name="T59">ταν η προηγούμενη κατάσταση του κουμπιού είναι “μή παττημένο” αλλα το κουμπί πατιέται, τότε καθεμία απο τις επιμέρους μεταβλητές που δείχνουν τη θέση του </text:span><text:soft-page-break/><text:span text:style-name="T59">μυνήματος θα αυξηθούν κατα ένα. Στο reset, θα αρχικοποιήσουμε το μύνημα και θα αναθέσουμε στις μεταβλητές τις πρώτες θέσεις του μυνήματος</text:span></text:p>
      <text:p text:style-name="P30"><text:tab/>Θα χρειαστεί επίσης να προσαρμόσουμε ελαφρώς και την πρώτη always, ώστε να αναθέτουμε στην έξοδο τη σωστή θέση του μυνήματος, ανάλογα με την άνοδο που είναι ανοιχτή. Για παράδειγμα αν η πρώτη άνοδος είναι ανοιχτή, θα θέσουμε τον χαρακτήρα που θα έχουμε σαν έξοδο τη θέση του μυνήματος που υποδυκνύει η πρώτη μεταβλητή θέσης, άν η δεύτερη είναι ανοιχτή θα θέσουμε τη θέση που υποδυκνύει η δεύτερη μεταβλητή κ.α.</text:p>
      <text:p text:style-name="P11"><text:span text:style-name="T59"><text:tab/></text:span><text:span text:style-name="T60">Θα χρειαστεί να αλλάξουμε ελαφρώς και την top μονάδα. Θα συνδέσουμε πρώτα το νέο κουμπί με μια δεύτερη μονάδα anti-bounce. Επίσης θα βγάλουμε την ανάθεση που κάνουμε στον χαρακτήρα, καθώς για αυτό είναι πλέον υπεύθυνη η leddriver μονάδα.</text:span></text:p>
      <text:p text:style-name="P11"><text:span text:style-name="T60"/></text:p>
      <text:p text:style-name="P11"><text:span text:style-name="T60"/></text:p>
      <text:p text:style-name="P31"><text:span text:style-name="T60"><text:tab/></text:span><text:span text:style-name="T61">Θα χρειαστεί να προσαρμόσουμε ελαφρώς τις μονάδες δοκιμών της leddriver και της top μονάδας. Συγκεκριμένα, </text:span><text:span text:style-name="T62">και στα δύο testbench </text:span><text:span text:style-name="T61">θα </text:span><text:span text:style-name="T62">προσθέσουμε ένα forever block μέσα στο οποίο θα ενεργοποιούμε το κουμπί ανα </text:span><text:span text:style-name="T63">1</text:span><text:span text:style-name="T62">500ns και θα το απενεργοποιούμε μετά απο 200ns</text:span><text:span text:style-name="T64">. </text:span><text:span text:style-name="T65">Έτσι θα μπορούμε να ελεγξουμε και τις καινούριες προσαρμογές που έγιναν στο πρόγραμμα. </text:span><text:span text:style-name="T66">Θα αλλάξουμε επίσης ξανά τον μετρητή στο anti-bounce με μία μικρότερη τιμή για διευκόλυνση της δοκιμής. </text:span><text:span text:style-name="T62">Όπως και παραπάνω, θα δοκιμάσουμε τις μονάδες με behavioral, post-synthesis και post-implementation simulation </text:span><text:span text:style-name="T67">και θαα συγκρίνουμε τις κυμματομορφές των προσωμοιώσεων</text:span><text:span text:style-name="T62">.</text:span></text:p>
      <text:p text:style-name="P31"><text:span text:style-name="T64"><text:tab/></text:span><text:span text:style-name="T62">Δεν προέκυψε κάποια τεχνική δυσκολία κατα τη δοκιμή του κυκλώματος στο testbench. </text:span><text:span text:style-name="T65">Παρακάτω φαίνεται ένα simulation </text:span><text:span text:style-name="T68">στο οποίο φαίνεται η σωστή επιστροφή του μυνήματος απο το κύκλωμα. </text:span><text:span text:style-name="T67">Τα post-synthesis και post-implementation simulations δεν απέκλιναν απο το behavioural simulation αξιοσημείωτα οπότε παραλείπονται</text:span></text:p>
      <text:p text:style-name="P28"><text:span text:style-name="T69">Part C </text:span><text:span text:style-name="T70">Top Module </text:span><text:span text:style-name="T69">Behavioural Simulation</text:span><text:span text:style-name="T59"><text:tab/></text:span><draw:frame draw:style-name="fr1" draw:name="Image4" text:anchor-type="char" svg:x="-0.1146in" svg:y="0.0835in" svg:width="6.6929in" svg:height="3.7965in" draw:z-index="3"><draw:image xlink:href="Pictures/1000000100000A82000005F6A1C9A1B3.png" xlink:type="simple" xlink:show="embed" xlink:actuate="onLoad" draw:mime-type="image/png"/></draw:frame></text:p>
      <text:p text:style-name="P11"><text:span text:style-name="T7"/></text:p>
      <text:p text:style-name="P11"><text:span text:style-name="T7"/></text:p>
      <text:p text:style-name="P32"><text:span text:style-name="T71"><text:tab/></text:span><text:span text:style-name="T72">Για τη σωστή λειτουργία στη πλακέτα, χρειάστηκαν δύο επαναλήψεις, αυτό διοτι παρέλειψα να επαναφέρω αρχικά τον μεγαλύτερο μετρητή της anti-bounce μονάδας που άλλαξα λόγω διευκόλυνσης για το testbench. Αυτή όμως υπήρξε η μοναδική δυσκολία που αντιμετώπισα στον προγραμματισμό της, καθώς το κύκλωμα είχε την αναμενόμενη λειτουργία.</text:span></text:p>
      <text:p text:style-name="P32"><text:span text:style-name="T72"/></text:p>
      <text:p text:style-name="P32"><text:span text:style-name="T72"/></text:p>
      <text:p text:style-name="P11"><text:soft-page-break/><text:span text:style-name="T7"/></text:p>
      <text:list text:continue-numbering="true" text:style-name="L2">
        <text:list-item>
          <text:p text:style-name="P12">Μέρος 4ο - Βηματική περιστροφή του μυνήματος με σταθερή καθυστέρηση:</text:p>
        </text:list-item>
      </text:list>
      <text:p text:style-name="P9"><text:span text:style-name="T7"/></text:p>
      <text:p text:style-name="P9"><text:span text:style-name="T7"><text:tab/></text:span><text:span text:style-name="T73">Στο τελικό κομμάτι της εργασίας, θα προσαρμόσουμε ξανά τ</text:span><text:span text:style-name="T74">ο κύκλωμε έτσι ώστε η περιστροφή του μυνήματος να μήν εξαρτάται απο το κουμπί αλλα απο μια σταθερή καθυστέρηση. Αλλάζουμε ξανά τη μονάδα leddriver, συγκεκριμένα το δεύτερο always block, έτσι ώστε η περιστροφή να εξαρτάται απο έναν μετρητή 23-bit που μετράει 1,6777214 δευτερόλεπτα (το οποίο επιτυγχάνεται χρησιμοποιώντας το αργό ρολόι που χρησιμοποιεί η μονάδα). Συγκεκριμένα ο μετρητής γίνεται 1 στο reset, και </text:span><text:span text:style-name="T71">αυξάνεται με κάθε κύκλο του ρολογιού. Κ</text:span><text:span text:style-name="T74">άθε φορά που </text:span><text:span text:style-name="T71">ο μετρητής </text:span><text:span text:style-name="T74">μηδενίζεται το μύνημα περιστρέφεται.</text:span></text:p>
      <text:p text:style-name="P9"><text:span text:style-name="T74"><text:tab/></text:span><text:span text:style-name="T71">Απο την top μονάδα και το constraint, θα χρειαστεί απλώς να αφαιρέσουμε το κομμάτι της λογικής που αφορά το κουμπί. Δηλαδή απο το constraint θα αφαιρέσουμε την είσοδο που αφορά το κουμπί, και απο το top θα αφαιρέσουμε τη μονάδα anti-bounce που συνδέαμε στο κουμπί.</text:span></text:p>
      <text:p text:style-name="P33"><text:span text:style-name="T71"><text:tab/></text:span><text:span text:style-name="T75">Έ</text:span><text:span text:style-name="T76">να διάγραμμα για την ροή των δεδομένων σε αυτό το κομμάτι φαίνεται παρακάτω:</text:span></text:p>
      <text:p text:style-name="P33"><text:span text:style-name="T76"/></text:p>
      <text:p text:style-name="P34"><text:tab/></text:p>
      <text:p text:style-name="P33"><draw:frame draw:style-name="fr3" draw:name="Image8" text:anchor-type="char" svg:width="6.5327in" svg:height="5.3173in" draw:z-index="7"><draw:image xlink:href="Pictures/10000001000004CF000003EA4BE3091B.png" xlink:type="simple" xlink:show="embed" xlink:actuate="onLoad" draw:mime-type="image/png"/></draw:frame><text:span text:style-name="T71"/></text:p>
      <text:p text:style-name="P35"><text:span text:style-name="T71">P</text:span><text:span text:style-name="T7">artD Dataflow Diagramm</text:span></text:p>
      <text:p text:style-name="P36"><text:span text:style-name="T71"/></text:p>
      <text:p text:style-name="P36"><text:span text:style-name="T71"><text:tab/></text:span><text:span text:style-name="T77">Για τις μονάδες ελέγχου αρκεί να αφαιρέσουμε τα κομμάτια που αφορούσαν το κουμπί περιστροφής απο το top testbench και το leddriver testbench. </text:span><text:span text:style-name="T78">Τ</text:span><text:span text:style-name="T77">α διανύσματα ελέγχου δηλαδή θα είναι όμοια με αυτά που χρησιμοποιήσαμε για τη δοκιμή του δεύτερου κομματιού της εργασίας. </text:span><text:span text:style-name="T78">Θα μικρύνουμε επίσης πάλι, τον μετρητή της μονάδας anti-bounce, αλλα αυτή τη φορά και τον μετρητή που προσθέσαμε στην leddriver μονάδα σε αυτό το κομμάτι της εργασίας, για τον ίδιο </text:span><text:soft-page-break/><text:span text:style-name="T78">λόγο </text:span><text:span text:style-name="T79">(συγκεκριμένα, θα κάνουμε και τους δύο 4-bit)</text:span><text:span text:style-name="T78">. </text:span><text:span text:style-name="T80">Όπως και παραπάνω, θα δοκιμάσουμε τις μονάδες με behavioral, post-synthesis και post-implementation simulation </text:span><text:span text:style-name="T78">και θαα συγκρίνουμε τις κυμματομορφές των προσωμοιώσεων</text:span><text:span text:style-name="T80">.</text:span></text:p>
      <text:p text:style-name="P37"><text:span text:style-name="T80"><text:tab/></text:span><text:span text:style-name="T81">Παρακάτω φαίνεται </text:span><text:span text:style-name="T82">το </text:span><text:span text:style-name="T78">post-implementation </text:span><text:span text:style-name="T81">simulation </text:span><text:span text:style-name="T83">στο οποίο φαίνεται η σωστή επιστροφή του μυνήματος απο το κύκλωμα. Έ</text:span><text:span text:style-name="T84">χουν προστεθεί δύο κέρσορες σε σημεία οπου ο μετρητής μηδενίζεται, </text:span><text:span text:style-name="T85">δ</text:span><text:span text:style-name="T84">ηλαδή το μύνημα προχωράει. </text:span><text:span text:style-name="T85">Αξίζει να σημειωθεί οτι δέν αλλάζουν τιμή οι καταχωρητές-δείκτες μετά τον πρώτο μηδενισμό του μετρητή, δηλαδή χάνεται μία περιστροφή μετά το reset.</text:span></text:p>
      <text:p text:style-name="P37"><text:span text:style-name="T78"/></text:p>
      <text:p text:style-name="P38"><draw:frame draw:style-name="fr2" draw:name="Image5" text:anchor-type="char" svg:width="6.6929in" svg:height="3.7965in" draw:z-index="4"><draw:image xlink:href="Pictures/1000000100000A82000005F617C21050.png" xlink:type="simple" xlink:show="embed" xlink:actuate="onLoad" draw:mime-type="image/png"/></draw:frame><text:span text:style-name="T78">P</text:span><text:span text:style-name="T7">art D Top Module Post-Implementation Simulation</text:span></text:p>
      <text:p text:style-name="P36"><text:span text:style-name="T80"/></text:p>
      <text:p text:style-name="P36"><text:span text:style-name="T80"/></text:p>
      <text:p text:style-name="P36"><text:span text:style-name="T80"><text:tab/></text:span><text:span text:style-name="T85">Η πλακέτα χρειάστηκε να προγραμματιστεί μόνο μια φορά. Η συμπεριφορά που αναφέρθηκε νωρίτερα όμως, δηλαδή η μή περιστροφή του μυνήματος μετά τον πρώτο μηδενισμό του μετρητή παρατηρήθηκε και στη πλακέτα. Πέρα του προβλήματος αυτού, η δοκιμή διεξάχθηκε ομαλά.</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oft-page-break/><text:span text:style-name="T7"/></text:p>
      <text:list text:continue-numbering="true" text:style-name="L2">
        <text:list-item>
          <text:p text:style-name="P12">Συμπεράσματα:</text:p>
        </text:list-item>
      </text:list>
      <text:p text:style-name="P39"/>
      <text:p text:style-name="P39"><text:tab/><text:span text:style-name="T86">Η πορεία της εργασίας ήταν αρχικά ελαφρώς απότομη, κυρίως επειδή χρειαζόταν καινούριες γνώσεις, μετά την ολοκλήρωση του δεύτερου κομματιού όμως η εργασία συνέχισε ομαλά</text:span>. Όσον αφορά τη σχεδίαση, η προσαρμογή του κυκλώματος λαμβάνοντας υπόψη την συνθεσιμότητα ήταν κάτι καινούριο, οπότε χρειάστηκε να προσαρμώσω τη λογική μου κατάλληλα, κάτι που κατάφερα σε έναν ικανοποιητικό βαθμό για την εργασία με την ολοκλήρωση του δεύτερου μέρους. Για την κατάλληλη επαλήθευση του κυκλώματος <text:span text:style-name="T86">η μεγαλύτερη δυσκολία ήταν η εκμάθηση ενός καινούριου εργαλείου, πρόβλημα που επίσης έπρεπε να λυθεί </text:span><text:span text:style-name="T87">πρίν </text:span><text:span text:style-name="T86">την ολοκλήρωση του δεύτερου μέρους. </text:span><text:span text:style-name="T87">Στην δοκιμή αντιθέτως δέν προέκυψαν αξιοσημείωτα προβλήματα, και αυτά πουτ εμφανίστηκαν μπορούσαν να παρατηρηθούν με πιο προσεκτικό έλεγχο κατα το στάδιο της επαλήθευσης.</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25T13:26:02.177474464</meta:creation-date>
    <dc:date>2026-05-11T16:07:01.132232065</dc:date>
    <meta:editing-duration>PT15H47M14S</meta:editing-duration>
    <meta:editing-cycles>83</meta:editing-cycles>
    <meta:generator>LibreOffice/26.2.3.2$Linux_X86_64 LibreOffice_project/620$Build-2</meta:generator>
    <meta:document-statistic meta:table-count="0" meta:image-count="8" meta:object-count="0" meta:page-count="10" meta:paragraph-count="55" meta:word-count="2222" meta:character-count="14635" meta:non-whitespace-character-count="12426"/>
  </office:meta>
</office:document-meta>
</file>