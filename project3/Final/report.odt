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500000106DD26CBD2.png" manifest:media-type="image/png"/>
  <manifest:file-entry manifest:full-path="Pictures/100000010000033C000000CBCEB80DCE.png" manifest:media-type="image/png"/>
  <manifest:file-entry manifest:full-path="Pictures/1000000100000250000000CB78DBEA25.png" manifest:media-type="image/png"/>
  <manifest:file-entry manifest:full-path="Pictures/1000000100000C680000051F6ED865D5.png" manifest:media-type="image/png"/>
  <manifest:file-entry manifest:full-path="Pictures/10000001000002B5000000A990B11B11.png" manifest:media-type="image/png"/>
  <manifest:file-entry manifest:full-path="Pictures/1000000100000232000000F00530381C.png" manifest:media-type="image/png"/>
  <manifest:file-entry manifest:full-path="Pictures/10000001000002B80000047F6F0F0D91.png" manifest:media-type="image/png"/>
  <manifest:file-entry manifest:full-path="Pictures/1000000100000160000001FE5CC2B178.png" manifest:media-type="image/png"/>
  <manifest:file-entry manifest:full-path="Pictures/1000000100000214000000A191008172.png" manifest:media-type="image/png"/>
  <manifest:file-entry manifest:full-path="Pictures/1000000100000214000000A1369332A9.png" manifest:media-type="image/png"/>
  <manifest:file-entry manifest:full-path="Pictures/10000001000001F200000124B27A9520.png" manifest:media-type="image/png"/>
  <manifest:file-entry manifest:full-path="Pictures/10000001000002B9000000CBDC3B89F3.png" manifest:media-type="image/png"/>
  <manifest:file-entry manifest:full-path="Pictures/10000001000002CC00000065CE604BA2.png" manifest:media-type="image/png"/>
  <manifest:file-entry manifest:full-path="Pictures/10000001000003F8000001893DE7F98E.png" manifest:media-type="image/png"/>
  <manifest:file-entry manifest:full-path="Pictures/1000000100000202000001053A2A875B.png" manifest:media-type="image/png"/>
  <manifest:file-entry manifest:full-path="Pictures/1000000100000175000000659890DE35.png" manifest:media-type="image/png"/>
  <manifest:file-entry manifest:full-path="Pictures/100000010000017500000065AEB9CFB7.png" manifest:media-type="image/png"/>
  <manifest:file-entry manifest:full-path="Pictures/100000010000024000000106390A0451.png" manifest:media-type="image/png"/>
  <manifest:file-entry manifest:full-path="Pictures/10000001000003D5000000F00A53EAB5.png" manifest:media-type="image/png"/>
  <manifest:file-entry manifest:full-path="Pictures/1000000100000175000000657CBE1D37.png" manifest:media-type="image/png"/>
  <manifest:file-entry manifest:full-path="Pictures/100000010000029A00000489065AFA3D.png" manifest:media-type="image/png"/>
  <manifest:file-entry manifest:full-path="Pictures/1000000100000378000000F0EE192E93.png" manifest:media-type="image/png"/>
  <manifest:file-entry manifest:full-path="Pictures/10000001000002C3000001067F24D5B3.png" manifest:media-type="image/png"/>
  <manifest:file-entry manifest:full-path="Pictures/100000010000031E000000CBBBFF90EA.png" manifest:media-type="image/png"/>
  <manifest:file-entry manifest:full-path="Pictures/100000010000008000000060AEEE2C36.png" manifest:media-type="image/png"/>
  <manifest:file-entry manifest:full-path="Pictures/10000001000002BE000000F06AD83E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4.8799in" table:align="center"/>
    </style:style>
    <style:style style:name="Table1.A" style:family="table-column">
      <style:table-column-properties style:column-width="1.0056in"/>
    </style:style>
    <style:style style:name="Table1.B" style:family="table-column">
      <style:table-column-properties style:column-width="1.1451in"/>
    </style:style>
    <style:style style:name="Table1.C" style:family="table-column">
      <style:table-column-properties style:column-width="1.0528in"/>
    </style:style>
    <style:style style:name="Table1.D" style:family="table-column">
      <style:table-column-properties style:column-width="1.6764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background-color="#000000" fo:padding="0.0382in" fo:border-left="0.5pt solid #000000" fo:border-right="0.5pt solid #000000" fo:border-top="none" fo:border-bottom="0.5pt solid #000000">
        <style:background-image/>
      </style:table-cell-properties>
    </style:style>
    <style:style style:name="Table1.D3" style:family="table-cell">
      <style:table-cell-properties fo:background-color="#0000ee" fo:padding="0.0382in" fo:border-left="0.5pt solid #000000" fo:border-right="0.5pt solid #000000" fo:border-top="none" fo:border-bottom="0.5pt solid #000000">
        <style:background-image/>
      </style:table-cell-properties>
    </style:style>
    <style:style style:name="Table1.D4" style:family="table-cell">
      <style:table-cell-properties fo:background-color="#00ff00" fo:padding="0.0382in" fo:border-left="0.5pt solid #000000" fo:border-right="0.5pt solid #000000" fo:border-top="none" fo:border-bottom="0.5pt solid #000000">
        <style:background-image/>
      </style:table-cell-properties>
    </style:style>
    <style:style style:name="Table1.D5" style:family="table-cell">
      <style:table-cell-properties fo:background-color="#00ffff" fo:padding="0.0382in" fo:border-left="0.5pt solid #000000" fo:border-right="0.5pt solid #000000" fo:border-top="none" fo:border-bottom="0.5pt solid #000000">
        <style:background-image/>
      </style:table-cell-properties>
    </style:style>
    <style:style style:name="Table1.D6" style:family="table-cell">
      <style:table-cell-properties fo:background-color="#ff0000" fo:padding="0.0382in" fo:border-left="0.5pt solid #000000" fo:border-right="0.5pt solid #000000" fo:border-top="none" fo:border-bottom="0.5pt solid #000000">
        <style:background-image/>
      </style:table-cell-properties>
    </style:style>
    <style:style style:name="Table1.D7" style:family="table-cell">
      <style:table-cell-properties fo:background-color="#e300e3" fo:padding="0.0382in" fo:border-left="0.5pt solid #000000" fo:border-right="0.5pt solid #000000" fo:border-top="none" fo:border-bottom="0.5pt solid #000000">
        <style:background-image/>
      </style:table-cell-properties>
    </style:style>
    <style:style style:name="Table1.D8"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D9" style:family="table-cell">
      <style:table-cell-properties fo:padding="0.0382in" fo:border-left="0.5pt solid #000000" fo:border-right="0.5pt solid #000000" fo:border-top="none" fo:border-bottom="0.5pt solid #000000"/>
    </style:style>
    <style:style style:name="Table2" style:family="table">
      <style:table-properties style:width="4.3597in" table:align="center"/>
    </style:style>
    <style:style style:name="Table2.A" style:family="table-column">
      <style:table-column-properties style:column-width="0.7507in"/>
    </style:style>
    <style:style style:name="Table2.B" style:family="table-column">
      <style:table-column-properties style:column-width="1.509in"/>
    </style:style>
    <style:style style:name="Table2.C" style:family="table-column">
      <style:table-column-properties style:column-width="0.6563in"/>
    </style:style>
    <style:style style:name="Table2.D" style:family="table-column">
      <style:table-column-properties style:column-width="0.675in"/>
    </style:style>
    <style:style style:name="Table2.E" style:family="table-column">
      <style:table-column-properties style:column-width="0.7688in"/>
    </style:style>
    <style:style style:name="Table2.A1" style:family="table-cell">
      <style:table-cell-properties style:vertical-align="" fo:padding="0.0382in" fo:border-left="0.5pt solid #000000" fo:border-right="none" fo:border-top="0.5pt solid #000000" fo:border-bottom="0.5pt solid #000000"/>
    </style:style>
    <style:style style:name="Table2.E1" style:family="table-cell">
      <style:table-cell-properties style:vertical-align="" fo:padding="0.0382in" fo:border="0.5pt solid #000000"/>
    </style:style>
    <style:style style:name="Table2.A2" style:family="table-cell">
      <style:table-cell-properties style:vertical-align="" fo:padding="0.0382in" fo:border-left="0.5pt solid #000000" fo:border-right="none" fo:border-top="none" fo:border-bottom="0.5pt solid #000000"/>
    </style:style>
    <style:style style:name="Table2.E2" style:family="table-cell">
      <style:table-cell-properties style:vertical-align="" fo:padding="0.0382in" fo:border-left="0.5pt solid #000000" fo:border-right="0.5pt solid #000000" fo:border-top="none" fo:border-bottom="0.5pt solid #000000"/>
    </style:style>
    <style:style style:name="Table3" style:family="table">
      <style:table-properties style:width="6.7292in" table:align="center"/>
    </style:style>
    <style:style style:name="Table3.A" style:family="table-column">
      <style:table-column-properties style:column-width="1.6674in"/>
    </style:style>
    <style:style style:name="Table3.C" style:family="table-column">
      <style:table-column-properties style:column-width="1.6979in"/>
    </style:style>
    <style:style style:name="Table3.D" style:family="table-column">
      <style:table-column-properties style:column-width="1.6965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4.4826in" table:align="center"/>
    </style:style>
    <style:style style:name="Table4.A" style:family="table-column">
      <style:table-column-properties style:column-width="0.7507in"/>
    </style:style>
    <style:style style:name="Table4.B" style:family="table-column">
      <style:table-column-properties style:column-width="1.509in"/>
    </style:style>
    <style:style style:name="Table4.C" style:family="table-column">
      <style:table-column-properties style:column-width="0.6563in"/>
    </style:style>
    <style:style style:name="Table4.D" style:family="table-column">
      <style:table-column-properties style:column-width="0.675in"/>
    </style:style>
    <style:style style:name="Table4.E" style:family="table-column">
      <style:table-column-properties style:column-width="0.8917in"/>
    </style:style>
    <style:style style:name="Table4.A1" style:family="table-cell">
      <style:table-cell-properties style:vertical-align="" fo:padding="0.0382in" fo:border-left="0.5pt solid #000000" fo:border-right="none" fo:border-top="0.5pt solid #000000" fo:border-bottom="0.5pt solid #000000"/>
    </style:style>
    <style:style style:name="Table4.E1" style:family="table-cell">
      <style:table-cell-properties style:vertical-align="" fo:padding="0.0382in" fo:border="0.5pt solid #000000"/>
    </style:style>
    <style:style style:name="Table4.A2" style:family="table-cell">
      <style:table-cell-properties style:vertical-align="" fo:padding="0.0382in" fo:border-left="0.5pt solid #000000" fo:border-right="none" fo:border-top="none" fo:border-bottom="0.5pt solid #000000"/>
    </style:style>
    <style:style style:name="Table4.E2" style:family="table-cell">
      <style:table-cell-properties style:vertical-align="" fo:padding="0.0382in" fo:border-left="0.5pt solid #000000" fo:border-right="0.5pt solid #000000" fo:border-top="none" fo:border-bottom="0.5pt solid #000000"/>
    </style:style>
    <style:style style:name="Table5" style:family="table">
      <style:table-properties style:width="6.7292in" table:align="center"/>
    </style:style>
    <style:style style:name="Table5.A" style:family="table-column">
      <style:table-column-properties style:column-width="1.6674in"/>
    </style:style>
    <style:style style:name="Table5.C" style:family="table-column">
      <style:table-column-properties style:column-width="1.6979in"/>
    </style:style>
    <style:style style:name="Table5.D" style:family="table-column">
      <style:table-column-properties style:column-width="1.696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8pt" style:text-underline-style="none" officeooo:rsid="000a518e" officeooo:paragraph-rsid="00101017" style:font-size-asian="15.75pt" style:font-size-complex="18pt"/>
    </style:style>
    <style:style style:name="P2" style:family="paragraph" style:parent-style-name="Standard">
      <style:paragraph-properties fo:text-align="center" style:justify-single-word="false"/>
      <style:text-properties fo:font-size="18pt" fo:font-style="normal" style:text-underline-style="none" fo:font-weight="bold" officeooo:rsid="000ab5ce" officeooo:paragraph-rsid="00101017" style:font-size-asian="15.75pt" style:font-style-asian="normal" style:font-weight-asian="bold" style:font-size-complex="18pt" style:font-style-complex="normal" style:font-weight-complex="bold"/>
    </style:style>
    <style:style style:name="P3" style:family="paragraph" style:parent-style-name="Standard">
      <style:paragraph-properties fo:text-align="center" style:justify-single-word="false"/>
      <style:text-properties fo:font-size="12pt" officeooo:rsid="0008792d" officeooo:paragraph-rsid="00101017" style:font-size-asian="10.5pt" style:font-size-complex="12pt"/>
    </style:style>
    <style:style style:name="P4" style:family="paragraph" style:parent-style-name="Standard">
      <style:paragraph-properties fo:text-align="center" style:justify-single-word="false"/>
      <style:text-properties fo:font-size="12pt" officeooo:rsid="01234510" officeooo:paragraph-rsid="01234510" style:font-size-asian="10.5pt" style:font-size-complex="12pt"/>
    </style:style>
    <style:style style:name="P5" style:family="paragraph" style:parent-style-name="Standard">
      <style:paragraph-properties fo:text-align="center" style:justify-single-word="false"/>
      <style:text-properties fo:font-size="12pt" fo:font-style="normal" style:text-underline-style="none" fo:font-weight="normal" officeooo:rsid="000a518e" officeooo:paragraph-rsid="00101017"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style:text-underline-style="none" officeooo:rsid="000a518e" officeooo:paragraph-rsid="00101017" style:font-size-asian="10.5pt" style:font-size-complex="12pt"/>
    </style:style>
    <style:style style:name="P7" style:family="paragraph" style:parent-style-name="Standard" style:list-style-name="L1">
      <style:paragraph-properties fo:text-align="left" style:justify-single-word="false"/>
      <style:text-properties fo:font-size="14pt" fo:font-style="italic" style:text-underline-style="none" fo:font-weight="bold" officeooo:rsid="00e2d9c7" officeooo:paragraph-rsid="00e2d9c7" style:font-size-asian="12.25pt" style:font-style-asian="italic" style:font-weight-asian="bold" style:font-size-complex="14pt" style:font-style-complex="italic" style:font-weight-complex="bold"/>
    </style:style>
    <style:style style:name="P8" style:family="paragraph" style:parent-style-name="Standard">
      <style:paragraph-properties fo:text-align="left" style:justify-single-word="false"/>
      <style:text-properties fo:font-size="12pt" style:text-underline-style="none" officeooo:rsid="00e07d2c" officeooo:paragraph-rsid="00e85bf5" style:font-size-asian="10.5pt" style:font-size-complex="12pt"/>
    </style:style>
    <style:style style:name="P9" style:family="paragraph" style:parent-style-name="Standard">
      <style:paragraph-properties fo:text-align="left" style:justify-single-word="false"/>
      <style:text-properties fo:font-size="12pt" style:text-underline-style="none" officeooo:rsid="000a518e" officeooo:paragraph-rsid="00e54970" style:font-size-asian="10.5pt" style:font-size-complex="12pt"/>
    </style:style>
    <style:style style:name="P10" style:family="paragraph" style:parent-style-name="Standard" style:list-style-name="L2">
      <style:paragraph-properties fo:text-align="left" style:justify-single-word="false"/>
      <style:text-properties fo:font-size="14pt" fo:font-style="italic" style:text-underline-style="none" fo:font-weight="bold" officeooo:rsid="00e2d9c7" officeooo:paragraph-rsid="00ec2436" style:font-size-asian="12.25pt" style:font-style-asian="italic" style:font-weight-asian="bold" style:font-size-complex="14pt" style:font-style-complex="italic" style:font-weight-complex="bold"/>
    </style:style>
    <style:style style:name="P11" style:family="paragraph" style:parent-style-name="Standard">
      <style:paragraph-properties fo:text-align="left" style:justify-single-word="false"/>
      <style:text-properties fo:font-size="12pt" style:text-underline-style="none" officeooo:rsid="000a518e" officeooo:paragraph-rsid="00f0702b" style:font-size-asian="10.5pt" style:font-size-complex="12pt"/>
    </style:style>
    <style:style style:name="P12" style:family="paragraph" style:parent-style-name="Standard">
      <style:paragraph-properties fo:text-align="left" style:justify-single-word="false"/>
      <style:text-properties fo:font-size="12pt" style:text-underline-style="none" officeooo:rsid="000a518e" officeooo:paragraph-rsid="00101017" style:font-size-asian="10.5pt" style:font-size-complex="12pt"/>
    </style:style>
    <style:style style:name="P13" style:family="paragraph" style:parent-style-name="Standard">
      <style:paragraph-properties fo:text-align="left" style:justify-single-word="false"/>
      <style:text-properties fo:font-size="12pt" style:text-underline-style="none" officeooo:rsid="000a518e" officeooo:paragraph-rsid="01066716" style:font-size-asian="10.5pt" style:font-size-complex="12pt"/>
    </style:style>
    <style:style style:name="P14" style:family="paragraph" style:parent-style-name="Standard">
      <style:paragraph-properties fo:text-align="center" style:justify-single-word="false"/>
      <style:text-properties fo:font-size="12pt" fo:font-style="italic" style:text-underline-style="none" fo:font-weight="bold" officeooo:rsid="0033268f" officeooo:paragraph-rsid="011461c3" style:font-size-asian="10.5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ext-properties fo:font-size="12pt" fo:font-style="italic" style:text-underline-style="none" officeooo:rsid="0115e1fc" officeooo:paragraph-rsid="0115e1fc" style:font-size-asian="10.5pt" style:font-style-asian="italic" style:font-size-complex="12pt" style:font-style-complex="italic"/>
    </style:style>
    <style:style style:name="P16" style:family="paragraph" style:parent-style-name="Standard" style:list-style-name="L3">
      <style:paragraph-properties fo:text-align="left" style:justify-single-word="false"/>
      <style:text-properties fo:font-size="14pt" fo:font-style="italic" style:text-underline-style="none" fo:font-weight="bold" officeooo:rsid="00113934" officeooo:paragraph-rsid="00113934" style:font-size-asian="12.25pt" style:font-style-asian="italic" style:font-weight-asian="bold" style:font-size-complex="14pt" style:font-style-complex="italic" style:font-weight-complex="bold"/>
    </style:style>
    <style:style style:name="P17" style:family="paragraph" style:parent-style-name="Standard">
      <style:paragraph-properties fo:text-align="left" style:justify-single-word="false"/>
      <style:text-properties fo:font-size="14pt" fo:font-style="italic" style:text-underline-style="none" fo:font-weight="bold" officeooo:rsid="00113934" officeooo:paragraph-rsid="00113934" style:font-size-asian="12.25pt" style:font-style-asian="italic" style:font-weight-asian="bold" style:font-size-complex="14pt" style:font-style-complex="italic" style:font-weight-complex="bold"/>
    </style:style>
    <style:style style:name="P18" style:family="paragraph" style:parent-style-name="Standard">
      <style:paragraph-properties fo:text-align="left" style:justify-single-word="false"/>
      <style:text-properties fo:font-size="12pt" fo:font-weight="normal" officeooo:paragraph-rsid="001518df"/>
    </style:style>
    <style:style style:name="P19" style:family="paragraph" style:parent-style-name="Table_20_Contents">
      <style:paragraph-properties fo:text-align="center" style:justify-single-word="false"/>
      <style:text-properties fo:font-size="12pt" officeooo:rsid="001518df" officeooo:paragraph-rsid="001518df"/>
    </style:style>
    <style:style style:name="P20" style:family="paragraph" style:parent-style-name="Table_20_Contents">
      <style:paragraph-properties fo:text-align="center" style:justify-single-word="false"/>
      <style:text-properties fo:color="#000000" loext:opacity="100%" fo:font-size="12pt" officeooo:rsid="001518df" officeooo:paragraph-rsid="001518df"/>
    </style:style>
    <style:style style:name="P21" style:family="paragraph" style:parent-style-name="Standard">
      <style:paragraph-properties fo:text-align="center" style:justify-single-word="false"/>
      <style:text-properties fo:font-size="12pt" fo:font-style="italic" style:text-underline-style="none" fo:font-weight="normal" officeooo:rsid="007eba50" officeooo:paragraph-rsid="00164254"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left" style:justify-single-word="false"/>
      <style:text-properties fo:font-size="12pt" fo:font-style="normal" style:text-underline-style="none" fo:font-weight="normal" officeooo:rsid="001518df" officeooo:paragraph-rsid="001a526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left" style:justify-single-word="false"/>
      <style:text-properties fo:font-size="12pt" fo:font-weight="normal" officeooo:rsid="001a526c" officeooo:paragraph-rsid="001ab6a8"/>
    </style:style>
    <style:style style:name="P24" style:family="paragraph" style:parent-style-name="Standard">
      <style:paragraph-properties fo:text-align="left" style:justify-single-word="false"/>
      <style:text-properties fo:font-size="12pt" fo:font-weight="normal" officeooo:paragraph-rsid="001a526c"/>
    </style:style>
    <style:style style:name="P25" style:family="paragraph" style:parent-style-name="Standard">
      <style:paragraph-properties fo:text-align="left" style:justify-single-word="false"/>
      <style:text-properties fo:font-size="12pt" fo:font-weight="normal" officeooo:rsid="001f618c" officeooo:paragraph-rsid="001f618c"/>
    </style:style>
    <style:style style:name="P26" style:family="paragraph" style:parent-style-name="Standard">
      <style:paragraph-properties fo:text-align="center" style:justify-single-word="false"/>
      <style:text-properties fo:font-size="12pt" fo:font-style="italic" style:text-underline-style="none" fo:font-weight="normal" officeooo:rsid="007eba50" officeooo:paragraph-rsid="00246ef1"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left" style:justify-single-word="false"/>
      <style:text-properties fo:font-size="12pt" fo:font-style="normal" style:text-underline-style="none" fo:font-weight="normal" officeooo:rsid="001f618c" officeooo:paragraph-rsid="001f618c" style:font-size-asian="10.5pt" style:font-style-asian="normal" style:font-weight-asian="normal" style:font-size-complex="12pt" style:font-style-complex="normal" style:font-weight-complex="normal"/>
    </style:style>
    <style:style style:name="P28" style:family="paragraph" style:parent-style-name="Standard" style:list-style-name="L4">
      <style:paragraph-properties fo:text-align="left" style:justify-single-word="false"/>
      <style:text-properties fo:font-size="12pt" fo:font-weight="normal" officeooo:rsid="0020cc3b" officeooo:paragraph-rsid="0020cc3b"/>
    </style:style>
    <style:style style:name="P29" style:family="paragraph" style:parent-style-name="Standard" style:list-style-name="L4">
      <style:paragraph-properties fo:text-align="left" style:justify-single-word="false"/>
      <style:text-properties fo:font-size="12pt" fo:font-weight="normal" officeooo:rsid="0020cc3b" officeooo:paragraph-rsid="00223b41"/>
    </style:style>
    <style:style style:name="P30" style:family="paragraph" style:parent-style-name="Standard" style:list-style-name="L5">
      <style:paragraph-properties fo:text-align="center" style:justify-single-word="false"/>
      <style:text-properties fo:font-size="12pt" style:text-underline-style="none" officeooo:rsid="000a518e" officeooo:paragraph-rsid="00101017" style:font-size-asian="10.5pt" style:font-size-complex="12pt"/>
    </style:style>
    <style:style style:name="P31" style:family="paragraph" style:parent-style-name="Standard" style:list-style-name="L6">
      <style:paragraph-properties fo:text-align="left" style:justify-single-word="false"/>
      <style:text-properties fo:font-size="14pt" fo:font-style="italic" style:text-underline-style="none" fo:font-weight="bold" officeooo:rsid="00113934" officeooo:paragraph-rsid="0019b3e2" style:font-size-asian="12.25pt" style:font-style-asian="italic" style:font-weight-asian="bold" style:font-size-complex="14pt" style:font-style-complex="italic" style:font-weight-complex="bold"/>
    </style:style>
    <style:style style:name="P32" style:family="paragraph" style:parent-style-name="Standard">
      <style:paragraph-properties fo:text-align="left" style:justify-single-word="false"/>
      <style:text-properties fo:font-size="12pt" fo:font-style="italic" style:text-underline-style="none" fo:font-weight="bold" officeooo:rsid="0019b3e2" officeooo:paragraph-rsid="0019b3e2" style:font-size-asian="10.5pt" style:font-style-asian="italic" style:font-weight-asian="bold" style:font-size-complex="12pt" style:font-style-complex="italic" style:font-weight-complex="bold"/>
    </style:style>
    <style:style style:name="P33" style:family="paragraph" style:parent-style-name="Standard">
      <style:paragraph-properties fo:text-align="left" style:justify-single-word="false"/>
      <style:text-properties fo:font-size="12pt" fo:font-style="italic" style:text-underline-style="none" fo:font-weight="bold" officeooo:rsid="0019b3e2" officeooo:paragraph-rsid="003bae43" style:font-size-asian="10.5pt" style:font-style-asian="italic" style:font-weight-asian="bold" style:font-size-complex="12pt" style:font-style-complex="italic" style:font-weight-complex="bold"/>
    </style:style>
    <style:style style:name="P34" style:family="paragraph" style:parent-style-name="Standard">
      <style:paragraph-properties fo:text-align="center" style:justify-single-word="false"/>
      <style:text-properties fo:font-size="12pt" fo:font-style="italic" style:text-underline-style="none" fo:font-weight="bold" officeooo:rsid="003c1f3a" officeooo:paragraph-rsid="003c1f3a" style:font-size-asian="10.5pt" style:font-style-asian="italic" style:font-weight-asian="bold" style:font-size-complex="12pt" style:font-style-complex="italic" style:font-weight-complex="bold"/>
    </style:style>
    <style:style style:name="P35" style:family="paragraph" style:parent-style-name="Standard">
      <style:paragraph-properties fo:text-align="left" style:justify-single-word="false"/>
      <style:text-properties fo:font-size="12pt" fo:font-style="italic" style:text-underline-style="none" fo:font-weight="bold" officeooo:rsid="0019b3e2" officeooo:paragraph-rsid="003c1f3a" style:font-size-asian="10.5pt" style:font-style-asian="italic" style:font-weight-asian="bold" style:font-size-complex="12pt" style:font-style-complex="italic" style:font-weight-complex="bold"/>
    </style:style>
    <style:style style:name="P36" style:family="paragraph" style:parent-style-name="Standard">
      <style:paragraph-properties fo:text-align="left" style:justify-single-word="false"/>
      <style:text-properties fo:font-size="12pt" fo:font-style="normal" style:text-underline-style="none" fo:font-weight="normal" officeooo:rsid="002e70ae" officeooo:paragraph-rsid="00305fa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left" style:justify-single-word="false"/>
      <style:text-properties fo:font-size="12pt" fo:font-style="italic" style:text-underline-style="none" fo:font-weight="bold" officeooo:rsid="0019b3e2" officeooo:paragraph-rsid="00305fa7" style:font-size-asian="10.5pt" style:font-style-asian="italic" style:font-weight-asian="bold" style:font-size-complex="12pt" style:font-style-complex="italic" style:font-weight-complex="bold"/>
    </style:style>
    <style:style style:name="P38" style:family="paragraph" style:parent-style-name="Standard">
      <style:paragraph-properties fo:text-align="left" style:justify-single-word="false"/>
      <style:text-properties fo:font-size="12pt" fo:font-style="italic" style:text-underline-style="none" fo:font-weight="bold" officeooo:rsid="0019b3e2" officeooo:paragraph-rsid="002e70ae" style:font-size-asian="10.5pt" style:font-style-asian="italic" style:font-weight-asian="bold" style:font-size-complex="12pt" style:font-style-complex="italic" style:font-weight-complex="bold"/>
    </style:style>
    <style:style style:name="P39" style:family="paragraph" style:parent-style-name="Table_20_Contents">
      <style:paragraph-properties fo:text-align="center" style:justify-single-word="false"/>
      <style:text-properties fo:font-size="12pt" officeooo:rsid="002e70ae" officeooo:paragraph-rsid="002e70ae" style:font-size-asian="10.5pt" style:font-size-complex="12pt"/>
    </style:style>
    <style:style style:name="P40" style:family="paragraph" style:parent-style-name="Table_20_Contents">
      <style:paragraph-properties fo:text-align="center" style:justify-single-word="false"/>
      <style:text-properties fo:font-size="12pt" officeooo:rsid="00316399" officeooo:paragraph-rsid="00316399" style:font-size-asian="10.5pt" style:font-size-complex="12pt"/>
    </style:style>
    <style:style style:name="P41" style:family="paragraph" style:parent-style-name="Table_20_Contents">
      <style:paragraph-properties fo:text-align="center" style:justify-single-word="false"/>
      <style:text-properties fo:font-size="12pt" style:font-size-asian="10.5pt" style:font-size-complex="12pt"/>
    </style:style>
    <style:style style:name="P42" style:family="paragraph" style:parent-style-name="Standard">
      <style:paragraph-properties fo:text-align="left" style:justify-single-word="false"/>
      <style:text-properties fo:font-size="12pt" fo:font-style="normal" style:text-underline-style="none" fo:font-weight="normal" officeooo:rsid="002e70ae" officeooo:paragraph-rsid="002e70ae"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font-size="12pt" fo:font-style="italic" style:text-underline-style="none" fo:font-weight="bold" officeooo:rsid="0033268f" officeooo:paragraph-rsid="0033268f" style:font-size-asian="10.5pt" style:font-style-asian="italic" style:font-weight-asian="bold" style:font-size-complex="12pt" style:font-style-complex="italic" style:font-weight-complex="bold"/>
    </style:style>
    <style:style style:name="P44" style:family="paragraph" style:parent-style-name="Standard">
      <style:paragraph-properties fo:text-align="center" style:justify-single-word="false"/>
      <style:text-properties fo:font-size="12pt" fo:font-style="italic" style:text-underline-style="none" fo:font-weight="bold" officeooo:rsid="0033268f" officeooo:paragraph-rsid="0034c66b" style:font-size-asian="10.5pt" style:font-style-asian="italic" style:font-weight-asian="bold" style:font-size-complex="12pt" style:font-style-complex="italic" style:font-weight-complex="bold"/>
    </style:style>
    <style:style style:name="P45" style:family="paragraph" style:parent-style-name="Standard">
      <style:paragraph-properties fo:text-align="left" style:justify-single-word="false"/>
      <style:text-properties fo:font-size="12pt" fo:font-style="italic" style:text-underline-style="none" fo:font-weight="bold" officeooo:rsid="0033268f" officeooo:paragraph-rsid="0034c66b" style:font-size-asian="10.5pt" style:font-style-asian="italic" style:font-weight-asian="bold" style:font-size-complex="12pt" style:font-style-complex="italic" style:font-weight-complex="bold"/>
    </style:style>
    <style:style style:name="P46" style:family="paragraph" style:parent-style-name="Standard" style:list-style-name="L7">
      <style:paragraph-properties fo:text-align="left" style:justify-single-word="false"/>
      <style:text-properties fo:font-size="12pt" fo:font-style="italic" style:text-underline-style="none" fo:font-weight="bold" officeooo:rsid="003ffaf1" officeooo:paragraph-rsid="003ffaf1" style:font-size-asian="10.5pt" style:font-style-asian="italic" style:font-weight-asian="bold" style:font-size-complex="12pt" style:font-style-complex="italic" style:font-weight-complex="bold"/>
    </style:style>
    <style:style style:name="P47" style:family="paragraph" style:parent-style-name="Standard" style:list-style-name="L7">
      <style:paragraph-properties fo:text-align="left" style:justify-single-word="false"/>
      <style:text-properties fo:font-size="12pt" fo:font-style="italic" style:text-underline-style="none" fo:font-weight="bold" officeooo:rsid="004267ba" officeooo:paragraph-rsid="00428c16" style:font-size-asian="10.5pt" style:font-style-asian="italic" style:font-weight-asian="bold" style:font-size-complex="12pt" style:font-style-complex="italic" style:font-weight-complex="bold"/>
    </style:style>
    <style:style style:name="P48" style:family="paragraph" style:parent-style-name="Standard" style:list-style-name="L7">
      <style:paragraph-properties fo:text-align="left" style:justify-single-word="false"/>
      <style:text-properties fo:font-size="12pt" fo:font-style="italic" style:text-underline-style="none" fo:font-weight="bold" officeooo:rsid="0043f2c5" officeooo:paragraph-rsid="0046d911" style:font-size-asian="10.5pt" style:font-style-asian="italic" style:font-weight-asian="bold" style:font-size-complex="12pt" style:font-style-complex="italic" style:font-weight-complex="bold"/>
    </style:style>
    <style:style style:name="P49" style:family="paragraph" style:parent-style-name="Standard" style:list-style-name="L7">
      <style:paragraph-properties fo:text-align="left" style:justify-single-word="false"/>
      <style:text-properties fo:font-size="12pt" fo:font-style="italic" style:text-underline-style="none" fo:font-weight="bold" officeooo:rsid="004984b1" officeooo:paragraph-rsid="004e10aa" style:font-size-asian="10.5pt" style:font-style-asian="italic" style:font-weight-asian="bold" style:font-size-complex="12pt" style:font-style-complex="italic" style:font-weight-complex="bold"/>
    </style:style>
    <style:style style:name="P50" style:family="paragraph" style:parent-style-name="Standard">
      <style:paragraph-properties fo:text-align="center" style:justify-single-word="false"/>
      <style:text-properties fo:font-size="12pt" fo:font-style="italic" style:text-underline-style="none" fo:font-weight="bold" officeooo:rsid="0038d7b4" officeooo:paragraph-rsid="0038d7b4" style:font-size-asian="10.5pt" style:font-style-asian="italic" style:font-weight-asian="bold" style:font-size-complex="12pt" style:font-style-complex="italic" style:font-weight-complex="bold"/>
    </style:style>
    <style:style style:name="P51" style:family="paragraph" style:parent-style-name="Standard">
      <style:paragraph-properties fo:text-align="left" style:justify-single-word="false"/>
      <style:text-properties fo:font-size="12pt" fo:font-style="italic" style:text-underline-style="none" fo:font-weight="bold" officeooo:rsid="0033268f" officeooo:paragraph-rsid="003a96f4" style:font-size-asian="10.5pt" style:font-style-asian="italic" style:font-weight-asian="bold" style:font-size-complex="12pt" style:font-style-complex="italic" style:font-weight-complex="bold"/>
    </style:style>
    <style:style style:name="P52" style:family="paragraph" style:parent-style-name="Standard">
      <style:paragraph-properties fo:text-align="left" style:justify-single-word="false"/>
      <style:text-properties fo:font-size="12pt" fo:font-style="normal" style:text-underline-style="none" fo:font-weight="normal" officeooo:rsid="0038ac97" officeooo:paragraph-rsid="0034c66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style:text-properties fo:font-size="12pt" fo:font-style="italic" style:text-underline-style="none" fo:font-weight="normal" officeooo:rsid="00576597" officeooo:paragraph-rsid="00576597"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fo:font-size="12pt" style:text-underline-style="none" officeooo:rsid="00576597" officeooo:paragraph-rsid="00576597" style:font-size-asian="10.5pt" style:font-size-complex="12pt"/>
    </style:style>
    <style:style style:name="P55" style:family="paragraph" style:parent-style-name="Standard">
      <style:paragraph-properties fo:text-align="center" style:justify-single-word="false"/>
      <style:text-properties fo:font-size="12pt" style:text-underline-style="none" officeooo:rsid="00576597" officeooo:paragraph-rsid="0059922f" style:font-size-asian="10.5pt" style:font-size-complex="12pt"/>
    </style:style>
    <style:style style:name="P56" style:family="paragraph" style:parent-style-name="Standard">
      <style:paragraph-properties fo:text-align="center" style:justify-single-word="false"/>
      <style:text-properties fo:font-size="12pt" style:text-underline-style="none" officeooo:rsid="00576597" officeooo:paragraph-rsid="005a69be" style:font-size-asian="10.5pt" style:font-size-complex="12pt"/>
    </style:style>
    <style:style style:name="P57" style:family="paragraph" style:parent-style-name="Table_20_Contents">
      <style:paragraph-properties fo:text-align="center" style:justify-single-word="false"/>
      <style:text-properties fo:font-size="12pt" officeooo:rsid="005c5cdc" officeooo:paragraph-rsid="005c5cdc" style:font-size-asian="10.5pt" style:font-size-complex="12pt"/>
    </style:style>
    <style:style style:name="P58" style:family="paragraph" style:parent-style-name="Table_20_Contents">
      <style:paragraph-properties fo:text-align="center" style:justify-single-word="false"/>
      <style:text-properties fo:font-size="12pt" officeooo:rsid="005f20c8" officeooo:paragraph-rsid="005f20c8" style:font-size-asian="10.5pt" style:font-size-complex="12pt"/>
    </style:style>
    <style:style style:name="P59" style:family="paragraph" style:parent-style-name="Table_20_Contents">
      <style:paragraph-properties fo:text-align="center" style:justify-single-word="false"/>
      <style:text-properties fo:font-size="12pt" officeooo:rsid="00316399" officeooo:paragraph-rsid="005c5cdc" style:font-size-asian="10.5pt" style:font-size-complex="12pt"/>
    </style:style>
    <style:style style:name="P60" style:family="paragraph" style:parent-style-name="Table_20_Contents">
      <style:paragraph-properties fo:text-align="center" style:justify-single-word="false"/>
      <style:text-properties fo:font-size="12pt" officeooo:rsid="005ed154" officeooo:paragraph-rsid="00643c36" style:font-size-asian="10.5pt" style:font-size-complex="12pt"/>
    </style:style>
    <style:style style:name="P61" style:family="paragraph" style:parent-style-name="Table_20_Contents">
      <style:paragraph-properties fo:text-align="center" style:justify-single-word="false"/>
      <style:text-properties fo:font-size="12pt" officeooo:rsid="00603aa2" officeooo:paragraph-rsid="00643c36" style:font-size-asian="10.5pt" style:font-size-complex="12pt"/>
    </style:style>
    <style:style style:name="P62" style:family="paragraph" style:parent-style-name="Table_20_Contents">
      <style:paragraph-properties fo:text-align="center" style:justify-single-word="false"/>
      <style:text-properties fo:font-size="12pt" officeooo:rsid="0064a731" officeooo:paragraph-rsid="0064a731" style:font-size-asian="10.5pt" style:font-size-complex="12pt"/>
    </style:style>
    <style:style style:name="P63" style:family="paragraph" style:parent-style-name="Table_20_Contents">
      <style:paragraph-properties fo:text-align="center" style:justify-single-word="false"/>
      <style:text-properties fo:font-size="12pt" officeooo:rsid="005d034d" officeooo:paragraph-rsid="005d034d" style:font-size-asian="10.5pt" style:font-size-complex="12pt"/>
    </style:style>
    <style:style style:name="P64" style:family="paragraph" style:parent-style-name="Table_20_Contents">
      <style:paragraph-properties fo:text-align="center" style:justify-single-word="false"/>
      <style:text-properties fo:font-size="12pt" officeooo:rsid="00603aa2" officeooo:paragraph-rsid="00603aa2" style:font-size-asian="10.5pt" style:font-size-complex="12pt"/>
    </style:style>
    <style:style style:name="P65" style:family="paragraph" style:parent-style-name="Table_20_Contents">
      <style:paragraph-properties fo:text-align="center" style:justify-single-word="false"/>
      <style:text-properties fo:font-size="12pt" officeooo:rsid="005c8591" officeooo:paragraph-rsid="005c8591" style:font-size-asian="10.5pt" style:font-size-complex="12pt"/>
    </style:style>
    <style:style style:name="P66" style:family="paragraph" style:parent-style-name="Table_20_Contents">
      <style:paragraph-properties fo:text-align="center" style:justify-single-word="false"/>
      <style:text-properties fo:font-size="12pt" officeooo:rsid="005c8591" officeooo:paragraph-rsid="005ed154" style:font-size-asian="10.5pt" style:font-size-complex="12pt"/>
    </style:style>
    <style:style style:name="P67" style:family="paragraph" style:parent-style-name="Table_20_Contents">
      <style:paragraph-properties fo:text-align="center" style:justify-single-word="false"/>
      <style:text-properties fo:font-size="12pt" officeooo:rsid="00603aa2" officeooo:paragraph-rsid="005f20c8" style:font-size-asian="10.5pt" style:font-size-complex="12pt"/>
    </style:style>
    <style:style style:name="P68" style:family="paragraph" style:parent-style-name="Standard">
      <style:paragraph-properties fo:text-align="center" style:justify-single-word="false"/>
      <style:text-properties fo:font-size="12pt" style:text-underline-style="none" officeooo:rsid="00576597" officeooo:paragraph-rsid="006c233b" style:font-size-asian="10.5pt" style:font-size-complex="12pt"/>
    </style:style>
    <style:style style:name="P69" style:family="paragraph" style:parent-style-name="Standard">
      <style:paragraph-properties fo:text-align="left" style:justify-single-word="false"/>
      <style:text-properties fo:font-size="12pt" fo:font-style="italic" style:text-underline-style="none" fo:font-weight="normal" officeooo:rsid="006c233b" officeooo:paragraph-rsid="006c233b"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left" style:justify-single-word="false"/>
      <style:text-properties fo:font-size="12pt" fo:font-style="italic" style:text-underline-style="none" fo:font-weight="normal" officeooo:rsid="006c233b" officeooo:paragraph-rsid="0070d96d"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left" style:justify-single-word="false"/>
      <style:text-properties fo:font-size="12pt" style:text-underline-style="none" officeooo:rsid="00576597" officeooo:paragraph-rsid="0070d96d" style:font-size-asian="10.5pt" style:font-size-complex="12pt"/>
    </style:style>
    <style:style style:name="P72" style:family="paragraph" style:parent-style-name="Standard">
      <style:paragraph-properties fo:text-align="left" style:justify-single-word="false"/>
      <style:text-properties fo:font-size="12pt" style:text-underline-style="none" officeooo:rsid="00576597" officeooo:paragraph-rsid="006c233b" style:font-size-asian="10.5pt" style:font-size-complex="12pt"/>
    </style:style>
    <style:style style:name="P73" style:family="paragraph" style:parent-style-name="Standard">
      <style:paragraph-properties fo:text-align="center" style:justify-single-word="false"/>
      <style:text-properties fo:font-size="12pt" fo:font-style="italic" style:text-underline-style="none" officeooo:rsid="00576597" officeooo:paragraph-rsid="00717307" style:font-size-asian="10.5pt" style:font-style-asian="italic" style:font-size-complex="12pt" style:font-style-complex="italic"/>
    </style:style>
    <style:style style:name="P74" style:family="paragraph" style:parent-style-name="Standard">
      <style:paragraph-properties fo:text-align="left" style:justify-single-word="false"/>
      <style:text-properties fo:font-size="12pt" fo:font-style="normal" style:text-underline-style="none" fo:font-weight="normal" officeooo:rsid="00717307" officeooo:paragraph-rsid="00717307"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left" style:justify-single-word="false"/>
      <style:text-properties fo:font-size="12pt" fo:font-style="normal" style:text-underline-style="none" officeooo:rsid="00576597" officeooo:paragraph-rsid="007274c5" style:font-size-asian="10.5pt" style:font-style-asian="normal" style:font-size-complex="12pt" style:font-style-complex="normal"/>
    </style:style>
    <style:style style:name="P76" style:family="paragraph" style:parent-style-name="Standard" style:list-style-name="L8">
      <style:paragraph-properties fo:text-align="left" style:justify-single-word="false"/>
      <style:text-properties fo:font-size="14pt" fo:font-style="italic" style:text-underline-style="none" fo:font-weight="bold" officeooo:rsid="00113934" officeooo:paragraph-rsid="0072cee9" style:font-size-asian="12.25pt" style:font-style-asian="italic" style:font-weight-asian="bold" style:font-size-complex="14pt" style:font-style-complex="italic" style:font-weight-complex="bold"/>
    </style:style>
    <style:style style:name="P77" style:family="paragraph" style:parent-style-name="Standard" style:list-style-name="L8">
      <style:paragraph-properties fo:text-align="left" style:justify-single-word="false"/>
      <style:text-properties fo:font-size="14pt" fo:font-style="italic" style:text-underline-style="none" fo:font-weight="bold" officeooo:rsid="0072d497" officeooo:paragraph-rsid="0072d497" style:font-size-asian="12.25pt" style:font-style-asian="italic" style:font-weight-asian="bold" style:font-size-complex="14pt" style:font-style-complex="italic" style:font-weight-complex="bold"/>
    </style:style>
    <style:style style:name="P78" style:family="paragraph" style:parent-style-name="Standard">
      <style:paragraph-properties fo:text-align="left" style:justify-single-word="false"/>
      <style:text-properties fo:font-size="12pt" fo:font-style="normal" style:text-underline-style="none" officeooo:rsid="0072cee9" officeooo:paragraph-rsid="007623da" style:font-size-asian="10.5pt" style:font-style-asian="normal" style:font-size-complex="12pt" style:font-style-complex="normal"/>
    </style:style>
    <style:style style:name="P79" style:family="paragraph" style:parent-style-name="Standard">
      <style:paragraph-properties fo:text-align="center" style:justify-single-word="false"/>
      <style:text-properties fo:font-size="12pt" fo:font-style="italic" style:text-underline-style="none" officeooo:rsid="0076b8ee" officeooo:paragraph-rsid="0076b8ee" style:font-size-asian="10.5pt" style:font-style-asian="italic" style:font-size-complex="12pt" style:font-style-complex="italic"/>
    </style:style>
    <style:style style:name="P80" style:family="paragraph" style:parent-style-name="Standard">
      <style:paragraph-properties fo:text-align="left" style:justify-single-word="false"/>
      <style:text-properties fo:font-size="12pt" fo:font-style="normal" style:text-underline-style="none" officeooo:rsid="0072cee9" officeooo:paragraph-rsid="0079d65f" style:font-size-asian="10.5pt" style:font-style-asian="normal" style:font-size-complex="12pt" style:font-style-complex="normal"/>
    </style:style>
    <style:style style:name="P81" style:family="paragraph" style:parent-style-name="Table_20_Contents">
      <style:paragraph-properties fo:text-align="center" style:justify-single-word="false"/>
      <style:text-properties fo:font-size="12pt" officeooo:rsid="002e70ae" officeooo:paragraph-rsid="007a2905" style:font-size-asian="10.5pt" style:font-size-complex="12pt"/>
    </style:style>
    <style:style style:name="P82" style:family="paragraph" style:parent-style-name="Table_20_Contents">
      <style:paragraph-properties fo:text-align="center" style:justify-single-word="false"/>
      <style:text-properties fo:font-size="12pt" officeooo:rsid="007a2905" officeooo:paragraph-rsid="007a2905" style:font-size-asian="10.5pt" style:font-size-complex="12pt"/>
    </style:style>
    <style:style style:name="P83" style:family="paragraph" style:parent-style-name="Table_20_Contents">
      <style:paragraph-properties fo:text-align="center" style:justify-single-word="false"/>
      <style:text-properties fo:font-size="12pt" officeooo:rsid="00316399" officeooo:paragraph-rsid="007a2905" style:font-size-asian="10.5pt" style:font-size-complex="12pt"/>
    </style:style>
    <style:style style:name="P84" style:family="paragraph" style:parent-style-name="Table_20_Contents">
      <style:paragraph-properties fo:text-align="center" style:justify-single-word="false"/>
      <style:text-properties fo:font-size="12pt" officeooo:paragraph-rsid="007a2905" style:font-size-asian="10.5pt" style:font-size-complex="12pt"/>
    </style:style>
    <style:style style:name="P85" style:family="paragraph" style:parent-style-name="Table_20_Contents">
      <style:paragraph-properties fo:text-align="center" style:justify-single-word="false"/>
      <style:text-properties fo:font-size="12pt" officeooo:rsid="007ed027" officeooo:paragraph-rsid="007ed027" style:font-size-asian="10.5pt" style:font-size-complex="12pt"/>
    </style:style>
    <style:style style:name="P86" style:family="paragraph" style:parent-style-name="Standard">
      <style:paragraph-properties fo:text-align="left" style:justify-single-word="false"/>
      <style:text-properties fo:font-size="12pt" fo:font-style="normal" style:text-underline-style="none" officeooo:rsid="0072cee9" officeooo:paragraph-rsid="007a2905" style:font-size-asian="10.5pt" style:font-style-asian="normal" style:font-size-complex="12pt" style:font-style-complex="normal"/>
    </style:style>
    <style:style style:name="P87" style:family="paragraph" style:parent-style-name="Standard">
      <style:paragraph-properties fo:text-align="center" style:justify-single-word="false"/>
      <style:text-properties fo:font-size="12pt" fo:font-style="italic" style:text-underline-style="none" fo:font-weight="bold" officeooo:rsid="0033268f" officeooo:paragraph-rsid="00806b5d" style:font-size-asian="10.5pt" style:font-style-asian="italic" style:font-weight-asian="bold" style:font-size-complex="12pt" style:font-style-complex="italic" style:font-weight-complex="bold"/>
    </style:style>
    <style:style style:name="P88" style:family="paragraph" style:parent-style-name="Standard">
      <style:paragraph-properties fo:text-align="center" style:justify-single-word="false"/>
      <style:text-properties fo:font-size="12pt" fo:font-style="italic" style:text-underline-style="none" fo:font-weight="bold" officeooo:rsid="0033268f" officeooo:paragraph-rsid="00823dbc" style:font-size-asian="10.5pt" style:font-style-asian="italic" style:font-weight-asian="bold" style:font-size-complex="12pt" style:font-style-complex="italic" style:font-weight-complex="bold"/>
    </style:style>
    <style:style style:name="P89" style:family="paragraph" style:parent-style-name="Standard">
      <style:paragraph-properties fo:text-align="left" style:justify-single-word="false"/>
      <style:text-properties fo:font-size="12pt" fo:font-style="italic" style:text-underline-style="none" fo:font-weight="bold" officeooo:rsid="0033268f" officeooo:paragraph-rsid="00838801" style:font-size-asian="10.5pt" style:font-style-asian="italic" style:font-weight-asian="bold" style:font-size-complex="12pt" style:font-style-complex="italic" style:font-weight-complex="bold"/>
    </style:style>
    <style:style style:name="P90" style:family="paragraph" style:parent-style-name="Standard" style:list-style-name="L7">
      <style:paragraph-properties fo:text-align="left" style:justify-single-word="false"/>
      <style:text-properties fo:font-size="12pt" fo:font-style="italic" style:text-underline-style="none" fo:font-weight="bold" officeooo:rsid="003ffaf1" officeooo:paragraph-rsid="00838801" style:font-size-asian="10.5pt" style:font-style-asian="italic" style:font-weight-asian="bold" style:font-size-complex="12pt" style:font-style-complex="italic" style:font-weight-complex="bold"/>
    </style:style>
    <style:style style:name="P91" style:family="paragraph" style:parent-style-name="Standard" style:list-style-name="L7">
      <style:paragraph-properties fo:text-align="left" style:justify-single-word="false"/>
      <style:text-properties fo:font-size="12pt" fo:font-style="italic" style:text-underline-style="none" fo:font-weight="bold" officeooo:rsid="004267ba" officeooo:paragraph-rsid="008b6901" style:font-size-asian="10.5pt" style:font-style-asian="italic" style:font-weight-asian="bold" style:font-size-complex="12pt" style:font-style-complex="italic" style:font-weight-complex="bold"/>
    </style:style>
    <style:style style:name="P92" style:family="paragraph" style:parent-style-name="Standard" style:list-style-name="L7">
      <style:paragraph-properties fo:text-align="left" style:justify-single-word="false"/>
      <style:text-properties fo:font-size="12pt" fo:font-style="italic" style:text-underline-style="none" fo:font-weight="bold" officeooo:rsid="0043f2c5" officeooo:paragraph-rsid="00838801" style:font-size-asian="10.5pt" style:font-style-asian="italic" style:font-weight-asian="bold" style:font-size-complex="12pt" style:font-style-complex="italic" style:font-weight-complex="bold"/>
    </style:style>
    <style:style style:name="P93" style:family="paragraph" style:parent-style-name="Standard" style:list-style-name="L7">
      <style:paragraph-properties fo:text-align="left" style:justify-single-word="false"/>
      <style:text-properties fo:font-size="12pt" fo:font-style="italic" style:text-underline-style="none" fo:font-weight="bold" officeooo:rsid="004984b1" officeooo:paragraph-rsid="00838801" style:font-size-asian="10.5pt" style:font-style-asian="italic" style:font-weight-asian="bold" style:font-size-complex="12pt" style:font-style-complex="italic" style:font-weight-complex="bold"/>
    </style:style>
    <style:style style:name="P94" style:family="paragraph" style:parent-style-name="Standard">
      <style:paragraph-properties fo:text-align="left" style:justify-single-word="false"/>
      <style:text-properties fo:font-size="12pt" fo:font-style="italic" style:text-underline-style="none" fo:font-weight="bold" officeooo:rsid="004984b1" officeooo:paragraph-rsid="00838801" style:font-size-asian="10.5pt" style:font-style-asian="italic" style:font-weight-asian="bold" style:font-size-complex="12pt" style:font-style-complex="italic" style:font-weight-complex="bold"/>
    </style:style>
    <style:style style:name="P95" style:family="paragraph" style:parent-style-name="Standard">
      <style:paragraph-properties fo:text-align="center" style:justify-single-word="false"/>
      <style:text-properties fo:font-size="12pt" fo:font-style="italic" style:text-underline-style="none" fo:font-weight="bold" officeooo:rsid="0038d7b4" officeooo:paragraph-rsid="0096c410" style:font-size-asian="10.5pt" style:font-style-asian="italic" style:font-weight-asian="bold" style:font-size-complex="12pt" style:font-style-complex="italic" style:font-weight-complex="bold"/>
    </style:style>
    <style:style style:name="P96" style:family="paragraph" style:parent-style-name="Standard">
      <style:paragraph-properties fo:text-align="left" style:justify-single-word="false"/>
      <style:text-properties fo:font-size="12pt" fo:font-style="normal" style:text-underline-style="none" officeooo:rsid="0072cee9" officeooo:paragraph-rsid="009d2c3f" style:font-size-asian="10.5pt" style:font-style-asian="normal" style:font-size-complex="12pt" style:font-style-complex="normal"/>
    </style:style>
    <style:style style:name="P97" style:family="paragraph" style:parent-style-name="Standard">
      <style:paragraph-properties fo:text-align="left" style:justify-single-word="false"/>
      <style:text-properties fo:font-size="12pt" fo:font-style="normal" style:text-underline-style="none" fo:font-weight="normal" officeooo:rsid="00a31505" officeooo:paragraph-rsid="009d2c3f" style:font-size-asian="10.5pt" style:font-style-asian="normal" style:font-weight-asian="normal" style:font-size-complex="12pt" style:font-style-complex="normal" style:font-weight-complex="normal"/>
    </style:style>
    <style:style style:name="P98" style:family="paragraph" style:parent-style-name="Standard" style:list-style-name="L9">
      <style:paragraph-properties fo:text-align="left" style:justify-single-word="false"/>
      <style:text-properties fo:font-size="12pt" fo:font-style="normal" style:text-underline-style="none" fo:font-weight="normal" officeooo:rsid="00a31505" officeooo:paragraph-rsid="00a31505" style:font-size-asian="10.5pt" style:font-style-asian="normal" style:font-weight-asian="normal" style:font-size-complex="12pt" style:font-style-complex="normal" style:font-weight-complex="normal"/>
    </style:style>
    <style:style style:name="P99" style:family="paragraph" style:parent-style-name="Standard" style:list-style-name="L9">
      <style:paragraph-properties fo:text-align="left" style:justify-single-word="false"/>
      <style:text-properties fo:font-size="12pt" fo:font-style="normal" style:text-underline-style="none" officeooo:rsid="00a31505" officeooo:paragraph-rsid="00a31505" style:font-size-asian="10.5pt" style:font-style-asian="normal" style:font-size-complex="12pt" style:font-style-complex="normal"/>
    </style:style>
    <style:style style:name="P100" style:family="paragraph" style:parent-style-name="Standard">
      <style:paragraph-properties fo:text-align="left" style:justify-single-word="false"/>
      <style:text-properties fo:font-size="12pt" fo:font-style="normal" style:text-underline-style="none" officeooo:rsid="00a31505" officeooo:paragraph-rsid="00a31505" style:font-size-asian="10.5pt" style:font-style-asian="normal" style:font-size-complex="12pt" style:font-style-complex="normal"/>
    </style:style>
    <style:style style:name="P101" style:family="paragraph" style:parent-style-name="Standard">
      <style:paragraph-properties fo:text-align="left" style:justify-single-word="false"/>
      <style:text-properties fo:font-size="12pt" fo:font-style="normal" style:text-underline-style="none" officeooo:rsid="00a31505" officeooo:paragraph-rsid="00ad2e72" style:font-size-asian="10.5pt" style:font-style-asian="normal" style:font-size-complex="12pt" style:font-style-complex="normal"/>
    </style:style>
    <style:style style:name="P102" style:family="paragraph" style:parent-style-name="Standard">
      <style:paragraph-properties fo:text-align="center" style:justify-single-word="false"/>
      <style:text-properties fo:font-size="12pt" fo:font-style="italic" style:text-underline-style="none" fo:font-weight="normal" officeooo:rsid="00576597" officeooo:paragraph-rsid="00afcd11" style:font-size-asian="10.5pt" style:font-style-asian="italic" style:font-weight-asian="normal" style:font-size-complex="12pt" style:font-style-complex="italic" style:font-weight-complex="normal"/>
    </style:style>
    <style:style style:name="P103" style:family="paragraph" style:parent-style-name="Standard">
      <style:paragraph-properties fo:text-align="center" style:justify-single-word="false"/>
      <style:text-properties fo:font-size="12pt" fo:font-style="italic" style:text-underline-style="none" fo:font-weight="normal" officeooo:rsid="00576597" officeooo:paragraph-rsid="00b07c48"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center" style:justify-single-word="false"/>
      <style:text-properties fo:font-size="12pt" fo:font-style="italic" style:text-underline-style="none" officeooo:rsid="00576597" officeooo:paragraph-rsid="00b1f608" style:font-size-asian="10.5pt" style:font-style-asian="italic" style:font-size-complex="12pt" style:font-style-complex="italic"/>
    </style:style>
    <style:style style:name="P105" style:family="paragraph" style:parent-style-name="Standard">
      <style:paragraph-properties fo:text-align="center" style:justify-single-word="false"/>
      <style:text-properties fo:font-size="12pt" style:text-underline-style="none" officeooo:rsid="00576597" officeooo:paragraph-rsid="00b40ebb" style:font-size-asian="10.5pt" style:font-size-complex="12pt"/>
    </style:style>
    <style:style style:name="P106" style:family="paragraph" style:parent-style-name="Standard">
      <style:paragraph-properties fo:text-align="center" style:justify-single-word="false"/>
      <style:text-properties fo:font-size="12pt" fo:font-style="italic" style:text-underline-style="none" officeooo:rsid="00576597" officeooo:paragraph-rsid="00b40ebb" style:font-size-asian="10.5pt" style:font-style-asian="italic" style:font-size-complex="12pt" style:font-style-complex="italic"/>
    </style:style>
    <style:style style:name="P107" style:family="paragraph" style:parent-style-name="Table_20_Contents">
      <style:paragraph-properties fo:text-align="center" style:justify-single-word="false"/>
      <style:text-properties fo:font-size="12pt" officeooo:rsid="005c5cdc" officeooo:paragraph-rsid="00b4540e" style:font-size-asian="10.5pt" style:font-size-complex="12pt"/>
    </style:style>
    <style:style style:name="P108" style:family="paragraph" style:parent-style-name="Table_20_Contents">
      <style:paragraph-properties fo:text-align="center" style:justify-single-word="false"/>
      <style:text-properties fo:font-size="12pt" officeooo:rsid="005f20c8" officeooo:paragraph-rsid="00b4540e" style:font-size-asian="10.5pt" style:font-size-complex="12pt"/>
    </style:style>
    <style:style style:name="P109" style:family="paragraph" style:parent-style-name="Table_20_Contents">
      <style:paragraph-properties fo:text-align="center" style:justify-single-word="false"/>
      <style:text-properties fo:font-size="12pt" officeooo:rsid="00316399" officeooo:paragraph-rsid="00b4540e" style:font-size-asian="10.5pt" style:font-size-complex="12pt"/>
    </style:style>
    <style:style style:name="P110" style:family="paragraph" style:parent-style-name="Table_20_Contents">
      <style:paragraph-properties fo:text-align="center" style:justify-single-word="false"/>
      <style:text-properties fo:font-size="12pt" officeooo:rsid="00603aa2" officeooo:paragraph-rsid="00b4540e" style:font-size-asian="10.5pt" style:font-size-complex="12pt"/>
    </style:style>
    <style:style style:name="P111" style:family="paragraph" style:parent-style-name="Table_20_Contents">
      <style:paragraph-properties fo:text-align="center" style:justify-single-word="false"/>
      <style:text-properties fo:font-size="12pt" officeooo:rsid="0064a731" officeooo:paragraph-rsid="00b4540e" style:font-size-asian="10.5pt" style:font-size-complex="12pt"/>
    </style:style>
    <style:style style:name="P112" style:family="paragraph" style:parent-style-name="Table_20_Contents">
      <style:paragraph-properties fo:text-align="center" style:justify-single-word="false"/>
      <style:text-properties fo:font-size="12pt" officeooo:rsid="00b610ed" officeooo:paragraph-rsid="00b610ed" style:font-size-asian="10.5pt" style:font-size-complex="12pt"/>
    </style:style>
    <style:style style:name="P113" style:family="paragraph" style:parent-style-name="Table_20_Contents">
      <style:paragraph-properties fo:text-align="center" style:justify-single-word="false"/>
      <style:text-properties fo:font-size="12pt" officeooo:rsid="00316399" officeooo:paragraph-rsid="00b5f897" style:font-size-asian="10.5pt" style:font-size-complex="12pt"/>
    </style:style>
    <style:style style:name="P114" style:family="paragraph" style:parent-style-name="Table_20_Contents">
      <style:paragraph-properties fo:text-align="center" style:justify-single-word="false"/>
      <style:text-properties fo:font-size="12pt" officeooo:rsid="00316399" officeooo:paragraph-rsid="00b542cb" style:font-size-asian="10.5pt" style:font-size-complex="12pt"/>
    </style:style>
    <style:style style:name="P115" style:family="paragraph" style:parent-style-name="Standard">
      <style:paragraph-properties fo:text-align="center" style:justify-single-word="false"/>
      <style:text-properties fo:font-size="12pt" fo:font-style="italic" style:text-underline-style="none" officeooo:rsid="00576597" officeooo:paragraph-rsid="00b4540e" style:font-size-asian="10.5pt" style:font-style-asian="italic" style:font-size-complex="12pt" style:font-style-complex="italic"/>
    </style:style>
    <style:style style:name="P116" style:family="paragraph" style:parent-style-name="Standard">
      <style:paragraph-properties fo:text-align="left" style:justify-single-word="false"/>
      <style:text-properties fo:font-size="12pt" fo:font-style="italic" style:text-underline-style="none" officeooo:rsid="00576597" officeooo:paragraph-rsid="00b1f608" style:font-size-asian="10.5pt" style:font-style-asian="italic" style:font-size-complex="12pt" style:font-style-complex="italic"/>
    </style:style>
    <style:style style:name="P117" style:family="paragraph" style:parent-style-name="Standard">
      <style:paragraph-properties fo:text-align="center" style:justify-single-word="false"/>
      <style:text-properties fo:font-size="12pt" fo:font-style="italic" style:text-underline-style="none" fo:font-weight="normal" officeooo:rsid="00576597" officeooo:paragraph-rsid="00c305e2"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left" style:justify-single-word="false"/>
      <style:text-properties fo:font-size="12pt" fo:font-style="normal" style:text-underline-style="none" fo:font-weight="normal" officeooo:rsid="007274c5" officeooo:paragraph-rsid="00c430e4"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left" style:justify-single-word="false"/>
      <style:text-properties fo:font-size="12pt" fo:font-style="normal" style:text-underline-style="none" officeooo:rsid="0072cee9" officeooo:paragraph-rsid="00c430e4" style:font-size-asian="10.5pt" style:font-style-asian="normal" style:font-size-complex="12pt" style:font-style-complex="normal"/>
    </style:style>
    <style:style style:name="P120" style:family="paragraph" style:parent-style-name="Standard">
      <style:paragraph-properties fo:text-align="center" style:justify-single-word="false"/>
      <style:text-properties fo:font-size="12pt" fo:font-style="italic" style:text-underline-style="none" fo:font-weight="normal" officeooo:rsid="00576597" officeooo:paragraph-rsid="00c430e4" style:font-size-asian="10.5pt" style:font-style-asian="italic" style:font-weight-asian="normal" style:font-size-complex="12pt" style:font-style-complex="italic" style:font-weight-complex="normal"/>
    </style:style>
    <style:style style:name="P121" style:family="paragraph" style:parent-style-name="Standard">
      <style:paragraph-properties fo:text-align="left" style:justify-single-word="false"/>
      <style:text-properties fo:font-size="12pt" fo:font-style="italic" style:text-underline-style="none" officeooo:rsid="00576597" officeooo:paragraph-rsid="00c430e4" style:font-size-asian="10.5pt" style:font-style-asian="italic" style:font-size-complex="12pt" style:font-style-complex="italic"/>
    </style:style>
    <style:style style:name="P122" style:family="paragraph" style:parent-style-name="Standard">
      <style:paragraph-properties fo:text-align="center" style:justify-single-word="false"/>
      <style:text-properties fo:font-size="12pt" fo:font-style="italic" style:text-underline-style="none" officeooo:rsid="00576597" officeooo:paragraph-rsid="00cc3a42" style:font-size-asian="10.5pt" style:font-style-asian="italic" style:font-size-complex="12pt" style:font-style-complex="italic"/>
    </style:style>
    <style:style style:name="P123" style:family="paragraph" style:parent-style-name="Standard">
      <style:paragraph-properties fo:text-align="center" style:justify-single-word="false"/>
      <style:text-properties fo:font-size="12pt" fo:font-style="italic" style:text-underline-style="none" officeooo:rsid="00576597" officeooo:paragraph-rsid="00c7708a" style:font-size-asian="10.5pt" style:font-style-asian="italic" style:font-size-complex="12pt" style:font-style-complex="italic"/>
    </style:style>
    <style:style style:name="P124" style:family="paragraph" style:parent-style-name="Standard">
      <style:paragraph-properties fo:text-align="left" style:justify-single-word="false"/>
      <style:text-properties fo:font-size="12pt" fo:font-style="normal" style:text-underline-style="none" officeooo:rsid="0072cee9" officeooo:paragraph-rsid="011d57bb" style:font-size-asian="10.5pt" style:font-style-asian="normal" style:font-size-complex="12pt" style:font-style-complex="normal"/>
    </style:style>
    <style:style style:name="P125" style:family="paragraph" style:parent-style-name="Standard">
      <style:paragraph-properties fo:text-align="left" style:justify-single-word="false"/>
      <style:text-properties fo:font-size="12pt" fo:font-style="normal" style:text-underline-style="none" officeooo:rsid="0072cee9" officeooo:paragraph-rsid="00d21659" style:font-size-asian="10.5pt" style:font-style-asian="normal" style:font-size-complex="12pt" style:font-style-complex="normal"/>
    </style:style>
    <style:style style:name="P126" style:family="paragraph" style:parent-style-name="Standard">
      <style:paragraph-properties fo:text-align="left" style:justify-single-word="false"/>
      <style:text-properties fo:font-size="12pt" fo:font-style="normal" style:text-underline-style="none" officeooo:rsid="0072cee9" officeooo:paragraph-rsid="00d2f2fd" style:font-size-asian="10.5pt" style:font-style-asian="normal" style:font-size-complex="12pt" style:font-style-complex="normal"/>
    </style:style>
    <style:style style:name="P127" style:family="paragraph" style:parent-style-name="Standard">
      <style:paragraph-properties fo:text-align="left" style:justify-single-word="false"/>
      <style:text-properties fo:font-size="12pt" fo:font-style="normal" style:text-underline-style="none" officeooo:rsid="00d44d9e" officeooo:paragraph-rsid="012038a2" style:font-size-asian="10.5pt" style:font-style-asian="normal" style:font-size-complex="12pt" style:font-style-complex="normal"/>
    </style:style>
    <style:style style:name="P128" style:family="paragraph" style:parent-style-name="Standard">
      <style:paragraph-properties fo:text-align="left" style:justify-single-word="false"/>
      <style:text-properties fo:font-size="12pt" fo:font-style="normal" style:text-underline-style="none" officeooo:rsid="00d44d9e" officeooo:paragraph-rsid="00d44d9e" style:font-size-asian="10.5pt" style:font-style-asian="normal" style:font-size-complex="12pt" style:font-style-complex="normal"/>
    </style:style>
    <style:style style:name="P129" style:family="paragraph" style:parent-style-name="Standard">
      <style:paragraph-properties fo:text-align="left" style:justify-single-word="false"/>
      <style:text-properties fo:font-size="12pt" fo:font-style="normal" style:text-underline-style="none" officeooo:rsid="00d44d9e" officeooo:paragraph-rsid="00d6f430" style:font-size-asian="10.5pt" style:font-style-asian="normal" style:font-size-complex="12pt" style:font-style-complex="normal"/>
    </style:style>
    <style:style style:name="P130" style:family="paragraph" style:parent-style-name="Standard">
      <style:paragraph-properties fo:text-align="left" style:justify-single-word="false"/>
      <style:text-properties fo:font-size="12pt" fo:font-style="normal" style:text-underline-style="none" officeooo:rsid="00d44d9e" officeooo:paragraph-rsid="00d7c845" style:font-size-asian="10.5pt" style:font-style-asian="normal" style:font-size-complex="12pt" style:font-style-complex="normal"/>
    </style:style>
    <style:style style:name="P131" style:family="paragraph" style:parent-style-name="Standard">
      <style:paragraph-properties fo:text-align="left" style:justify-single-word="false"/>
      <style:text-properties fo:font-size="12pt" fo:font-style="normal" style:text-underline-style="none" officeooo:rsid="00d44d9e" officeooo:paragraph-rsid="00d94b60" style:font-size-asian="10.5pt" style:font-style-asian="normal" style:font-size-complex="12pt" style:font-style-complex="normal"/>
    </style:style>
    <style:style style:name="P132" style:family="paragraph" style:parent-style-name="Standard">
      <style:paragraph-properties fo:text-align="left" style:justify-single-word="false"/>
      <style:text-properties fo:font-size="12pt" fo:font-style="normal" style:text-underline-style="none" fo:font-weight="normal" officeooo:rsid="00d613ac" officeooo:paragraph-rsid="00d94b60"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left" style:justify-single-word="false"/>
      <style:text-properties fo:font-size="12pt" style:text-underline-style="none" officeooo:rsid="0074fbb6" officeooo:paragraph-rsid="0074fbb6" style:font-size-asian="10.5pt"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officeooo:rsid="00101017"/>
    </style:style>
    <style:style style:name="T3" style:family="text">
      <style:text-properties officeooo:rsid="01234510"/>
    </style:style>
    <style:style style:name="T4" style:family="text">
      <style:text-properties officeooo:rsid="00075b45"/>
    </style:style>
    <style:style style:name="T5" style:family="text">
      <style:text-properties fo:font-style="normal" fo:font-weight="normal" officeooo:rsid="00b0c840" style:font-style-asian="normal" style:font-weight-asian="normal" style:font-style-complex="normal" style:font-weight-complex="normal"/>
    </style:style>
    <style:style style:name="T6" style:family="text">
      <style:text-properties fo:font-style="normal" fo:font-weight="normal" officeooo:rsid="00e54970" style:font-style-asian="normal" style:font-weight-asian="normal" style:font-style-complex="normal" style:font-weight-complex="normal"/>
    </style:style>
    <style:style style:name="T7" style:family="text">
      <style:text-properties fo:font-style="normal" fo:font-weight="normal" officeooo:rsid="00b1b418" style:font-style-asian="normal" style:font-weight-asian="normal" style:font-style-complex="normal" style:font-weight-complex="normal"/>
    </style:style>
    <style:style style:name="T8" style:family="text">
      <style:text-properties fo:font-style="normal" fo:font-weight="normal" officeooo:rsid="00e68e6d" style:font-style-asian="normal" style:font-weight-asian="normal" style:font-style-complex="normal" style:font-weight-complex="normal"/>
    </style:style>
    <style:style style:name="T9" style:family="text">
      <style:text-properties fo:font-style="normal" fo:font-weight="normal" officeooo:rsid="00e85bf5" style:font-style-asian="normal" style:font-weight-asian="normal" style:font-style-complex="normal" style:font-weight-complex="normal"/>
    </style:style>
    <style:style style:name="T10" style:family="text">
      <style:text-properties fo:font-style="normal" fo:font-weight="normal" officeooo:rsid="00b432bd" style:font-style-asian="normal" style:font-weight-asian="normal" style:font-style-complex="normal" style:font-weight-complex="normal"/>
    </style:style>
    <style:style style:name="T11" style:family="text">
      <style:text-properties officeooo:rsid="00ed4723"/>
    </style:style>
    <style:style style:name="T12" style:family="text">
      <style:text-properties officeooo:rsid="00b0c840"/>
    </style:style>
    <style:style style:name="T13" style:family="text">
      <style:text-properties fo:font-style="normal" fo:font-weight="normal" officeooo:rsid="00eefb50" style:font-style-asian="normal" style:font-weight-asian="normal" style:font-style-complex="normal" style:font-weight-complex="normal"/>
    </style:style>
    <style:style style:name="T14" style:family="text">
      <style:text-properties fo:font-style="normal" fo:font-weight="normal" officeooo:rsid="00b511fe" style:font-style-asian="normal" style:font-weight-asian="normal" style:font-style-complex="normal" style:font-weight-complex="normal"/>
    </style:style>
    <style:style style:name="T15" style:family="text">
      <style:text-properties fo:font-style="normal" fo:font-weight="normal" officeooo:rsid="00f1079d" style:font-style-asian="normal" style:font-weight-asian="normal" style:font-style-complex="normal" style:font-weight-complex="normal"/>
    </style:style>
    <style:style style:name="T16" style:family="text">
      <style:text-properties fo:font-style="normal" fo:font-weight="normal" officeooo:rsid="00f1ffac" style:font-style-asian="normal" style:font-weight-asian="normal" style:font-style-complex="normal" style:font-weight-complex="normal"/>
    </style:style>
    <style:style style:name="T17" style:family="text">
      <style:text-properties fo:font-style="normal" fo:font-weight="normal" officeooo:rsid="00f3fbdb" style:font-style-asian="normal" style:font-weight-asian="normal" style:font-style-complex="normal" style:font-weight-complex="normal"/>
    </style:style>
    <style:style style:name="T18" style:family="text">
      <style:text-properties fo:font-style="normal" fo:font-weight="normal" officeooo:rsid="00f5da34" style:font-style-asian="normal" style:font-weight-asian="normal" style:font-style-complex="normal" style:font-weight-complex="normal"/>
    </style:style>
    <style:style style:name="T19" style:family="text">
      <style:text-properties fo:font-style="normal" fo:font-weight="normal" officeooo:rsid="00faee48" style:font-style-asian="normal" style:font-weight-asian="normal" style:font-style-complex="normal" style:font-weight-complex="normal"/>
    </style:style>
    <style:style style:name="T20" style:family="text">
      <style:text-properties fo:font-style="normal" fo:font-weight="normal" officeooo:rsid="0102ad34" style:font-style-asian="normal" style:font-weight-asian="normal" style:font-style-complex="normal" style:font-weight-complex="normal"/>
    </style:style>
    <style:style style:name="T21" style:family="text">
      <style:text-properties fo:font-style="normal" fo:font-weight="normal" officeooo:rsid="01039f9f" style:font-style-asian="normal" style:font-weight-asian="normal" style:font-style-complex="normal" style:font-weight-complex="normal"/>
    </style:style>
    <style:style style:name="T22" style:family="text">
      <style:text-properties fo:font-style="normal" fo:font-weight="normal" officeooo:rsid="0103a313" style:font-style-asian="normal" style:font-weight-asian="normal" style:font-style-complex="normal" style:font-weight-complex="normal"/>
    </style:style>
    <style:style style:name="T23" style:family="text">
      <style:text-properties fo:font-style="normal" fo:font-weight="normal" officeooo:rsid="01123dbd" style:font-style-asian="normal" style:font-weight-asian="normal" style:font-style-complex="normal" style:font-weight-complex="normal"/>
    </style:style>
    <style:style style:name="T24" style:family="text">
      <style:text-properties fo:font-style="normal" fo:font-weight="normal" officeooo:rsid="01132961" style:font-style-asian="normal" style:font-weight-asian="normal" style:font-style-complex="normal" style:font-weight-complex="normal"/>
    </style:style>
    <style:style style:name="T25" style:family="text">
      <style:text-properties fo:font-weight="normal" officeooo:rsid="0034c66b" style:font-weight-asian="normal" style:font-weight-complex="normal"/>
    </style:style>
    <style:style style:name="T26" style:family="text">
      <style:text-properties fo:font-weight="normal" officeooo:rsid="011461c3" style:font-weight-asian="normal" style:font-weight-complex="normal"/>
    </style:style>
    <style:style style:name="T27" style:family="text">
      <style:text-properties fo:font-style="normal" fo:font-weight="normal" officeooo:rsid="0103e189" style:font-style-asian="normal" style:font-weight-asian="normal" style:font-style-complex="normal" style:font-weight-complex="normal"/>
    </style:style>
    <style:style style:name="T28" style:family="text">
      <style:text-properties fo:font-style="normal" fo:font-weight="normal" officeooo:rsid="0104bf30" style:font-style-asian="normal" style:font-weight-asian="normal" style:font-style-complex="normal" style:font-weight-complex="normal"/>
    </style:style>
    <style:style style:name="T29" style:family="text">
      <style:text-properties fo:font-style="normal" fo:font-weight="normal" officeooo:rsid="01089583" style:font-style-asian="normal" style:font-weight-asian="normal" style:font-style-complex="normal" style:font-weight-complex="normal"/>
    </style:style>
    <style:style style:name="T30" style:family="text">
      <style:text-properties fo:font-style="normal" fo:font-weight="normal" officeooo:rsid="0108f8b5" style:font-style-asian="normal" style:font-weight-asian="normal" style:font-style-complex="normal" style:font-weight-complex="normal"/>
    </style:style>
    <style:style style:name="T31" style:family="text">
      <style:text-properties fo:font-style="normal" fo:font-weight="normal" officeooo:rsid="010ac539" style:font-style-asian="normal" style:font-weight-asian="normal" style:font-style-complex="normal" style:font-weight-complex="normal"/>
    </style:style>
    <style:style style:name="T32" style:family="text">
      <style:text-properties fo:font-style="normal" fo:font-weight="normal" officeooo:rsid="010c5c71" style:font-style-asian="normal" style:font-weight-asian="normal" style:font-style-complex="normal" style:font-weight-complex="normal"/>
    </style:style>
    <style:style style:name="T33" style:family="text">
      <style:text-properties fo:font-style="normal" fo:font-weight="normal" officeooo:rsid="010e480c" style:font-style-asian="normal" style:font-weight-asian="normal" style:font-style-complex="normal" style:font-weight-complex="normal"/>
    </style:style>
    <style:style style:name="T34" style:family="text">
      <style:text-properties fo:font-style="normal" fo:font-weight="normal" officeooo:rsid="010f3a1e" style:font-style-asian="normal" style:font-weight-asian="normal" style:font-style-complex="normal" style:font-weight-complex="normal"/>
    </style:style>
    <style:style style:name="T35" style:family="text">
      <style:text-properties officeooo:rsid="0117a50f"/>
    </style:style>
    <style:style style:name="T36" style:family="text">
      <style:text-properties fo:font-style="normal" fo:font-weight="normal" officeooo:rsid="0117e46a" style:font-style-asian="normal" style:font-weight-asian="normal" style:font-style-complex="normal" style:font-weight-complex="normal"/>
    </style:style>
    <style:style style:name="T37" style:family="text">
      <style:text-properties fo:font-style="normal" fo:font-weight="normal" officeooo:rsid="01192971" style:font-style-asian="normal" style:font-weight-asian="normal" style:font-style-complex="normal" style:font-weight-complex="normal"/>
    </style:style>
    <style:style style:name="T38" style:family="text">
      <style:text-properties fo:font-style="normal" style:text-underline-style="none" officeooo:rsid="00113934" style:font-size-asian="10.5pt" style:font-style-asian="normal" style:font-weight-asian="normal" style:font-size-complex="12pt" style:font-style-complex="normal" style:font-weight-complex="normal"/>
    </style:style>
    <style:style style:name="T39" style:family="text">
      <style:text-properties fo:font-style="normal" style:text-underline-style="none" officeooo:rsid="0012dda4" style:font-size-asian="10.5pt" style:font-style-asian="normal" style:font-weight-asian="normal" style:font-size-complex="12pt" style:font-style-complex="normal" style:font-weight-complex="normal"/>
    </style:style>
    <style:style style:name="T40" style:family="text">
      <style:text-properties fo:font-style="normal" style:text-underline-style="none" officeooo:rsid="001518df" style:font-size-asian="10.5pt" style:font-style-asian="normal" style:font-weight-asian="normal" style:font-size-complex="12pt" style:font-style-complex="normal" style:font-weight-complex="normal"/>
    </style:style>
    <style:style style:name="T41" style:family="text">
      <style:text-properties fo:color="#c9211e" loext:opacity="100%"/>
    </style:style>
    <style:style style:name="T42" style:family="text">
      <style:text-properties fo:color="#000000" loext:opacity="100%"/>
    </style:style>
    <style:style style:name="T43" style:family="text">
      <style:text-properties fo:color="#127a02" loext:opacity="100%">
        <loext:char-complex-color loext:theme-type="accent1" loext:color-type="theme">
          <loext:transformation loext:type="lummod" loext:value="7500"/>
          <loext:transformation loext:type="lumoff" loext:value="0"/>
        </loext:char-complex-color>
      </style:text-properties>
    </style:style>
    <style:style style:name="T44" style:family="text">
      <style:text-properties fo:color="#0000ee" loext:opacity="100%">
        <loext:char-complex-color loext:theme-type="hyperlink" loext:color-type="theme">
          <loext:transformation loext:type="lumoff" loext:value="0"/>
        </loext:char-complex-color>
      </style:text-properties>
    </style:style>
    <style:style style:name="T45" style:family="text">
      <style:text-properties style:text-underline-style="none" officeooo:rsid="001518df" style:font-size-asian="10.5pt" style:font-weight-asian="normal" style:font-size-complex="12pt" style:font-weight-complex="normal"/>
    </style:style>
    <style:style style:name="T46" style:family="text">
      <style:text-properties officeooo:rsid="001518df"/>
    </style:style>
    <style:style style:name="T47" style:family="text">
      <style:text-properties officeooo:rsid="00164254"/>
    </style:style>
    <style:style style:name="T48" style:family="text">
      <style:text-properties fo:font-style="normal" style:text-underline-style="none" style:font-size-asian="10.5pt" style:font-style-asian="normal" style:font-weight-asian="normal" style:font-size-complex="12pt" style:font-style-complex="normal" style:font-weight-complex="normal"/>
    </style:style>
    <style:style style:name="T49" style:family="text">
      <style:text-properties fo:font-style="normal" style:text-underline-style="none" officeooo:rsid="001ab6a8" style:font-size-asian="10.5pt" style:font-style-asian="normal" style:font-weight-asian="normal" style:font-size-complex="12pt" style:font-style-complex="normal" style:font-weight-complex="normal"/>
    </style:style>
    <style:style style:name="T50" style:family="text">
      <style:text-properties fo:font-style="normal" style:text-underline-style="none" officeooo:rsid="001d389d" style:font-size-asian="10.5pt" style:font-style-asian="normal" style:font-weight-asian="normal" style:font-size-complex="12pt" style:font-style-complex="normal" style:font-weight-complex="normal"/>
    </style:style>
    <style:style style:name="T51" style:family="text">
      <style:text-properties fo:font-style="normal" style:text-underline-style="none" officeooo:rsid="001b8431" style:font-size-asian="10.5pt" style:font-style-asian="normal" style:font-weight-asian="normal" style:font-size-complex="12pt" style:font-style-complex="normal" style:font-weight-complex="normal"/>
    </style:style>
    <style:style style:name="T52" style:family="text">
      <style:text-properties fo:font-style="normal" style:text-underline-style="none" officeooo:rsid="0013f781" style:font-size-asian="10.5pt" style:font-style-asian="normal" style:font-weight-asian="normal" style:font-size-complex="12pt" style:font-style-complex="normal" style:font-weight-complex="normal"/>
    </style:style>
    <style:style style:name="T53" style:family="text">
      <style:text-properties fo:font-style="normal" style:text-underline-style="none" officeooo:rsid="0018e10e" style:font-size-asian="10.5pt" style:font-style-asian="normal" style:font-weight-asian="normal" style:font-size-complex="12pt" style:font-style-complex="normal" style:font-weight-complex="normal"/>
    </style:style>
    <style:style style:name="T54" style:family="text">
      <style:text-properties fo:font-style="normal" style:text-underline-style="none" officeooo:rsid="0019b3e2" style:font-size-asian="10.5pt" style:font-style-asian="normal" style:font-weight-asian="normal" style:font-size-complex="12pt" style:font-style-complex="normal" style:font-weight-complex="normal"/>
    </style:style>
    <style:style style:name="T55" style:family="text">
      <style:text-properties fo:font-style="normal" style:text-underline-style="none" officeooo:rsid="001f10f1" style:font-size-asian="10.5pt" style:font-style-asian="normal" style:font-weight-asian="normal" style:font-size-complex="12pt" style:font-style-complex="normal" style:font-weight-complex="normal"/>
    </style:style>
    <style:style style:name="T56" style:family="text">
      <style:text-properties fo:font-style="normal" style:text-underline-style="none" officeooo:rsid="001f618c" style:font-size-asian="10.5pt" style:font-style-asian="normal" style:font-weight-asian="normal" style:font-size-complex="12pt" style:font-style-complex="normal" style:font-weight-complex="normal"/>
    </style:style>
    <style:style style:name="T57" style:family="text">
      <style:text-properties officeooo:rsid="00246ef1"/>
    </style:style>
    <style:style style:name="T58" style:family="text">
      <style:text-properties fo:color="#ff0000" loext:opacity="100%" fo:font-style="normal" style:text-underline-style="none" style:font-size-asian="10.5pt" style:font-style-asian="normal" style:font-weight-asian="normal" style:font-size-complex="12pt" style:font-style-complex="normal" style:font-weight-complex="normal"/>
    </style:style>
    <style:style style:name="T59" style:family="text">
      <style:text-properties fo:color="#000000" loext:opacity="100%" fo:font-style="normal" style:text-underline-style="none" officeooo:rsid="0021bc7d" style:font-size-asian="10.5pt" style:font-style-asian="normal" style:font-weight-asian="normal" style:font-size-complex="12pt" style:font-style-complex="normal" style:font-weight-complex="normal"/>
    </style:style>
    <style:style style:name="T60" style:family="text">
      <style:text-properties fo:color="#00dc00" loext:opacity="100%" fo:font-style="normal" style:text-underline-style="none" officeooo:rsid="0023e359" style:font-size-asian="10.5pt" style:font-style-asian="normal" style:font-weight-asian="normal" style:font-size-complex="12pt" style:font-style-complex="normal" style:font-weight-complex="normal"/>
    </style:style>
    <style:style style:name="T61" style:family="text">
      <style:text-properties fo:color="#000000" loext:opacity="100%" fo:font-style="normal" style:text-underline-style="none" officeooo:rsid="0023e359" style:font-size-asian="10.5pt" style:font-style-asian="normal" style:font-weight-asian="normal" style:font-size-complex="12pt" style:font-style-complex="normal" style:font-weight-complex="normal"/>
    </style:style>
    <style:style style:name="T62" style:family="text">
      <style:text-properties fo:color="#00dc00" loext:opacity="100%" fo:font-style="normal" style:text-underline-style="none" officeooo:rsid="0021bc7d" style:font-size-asian="10.5pt" style:font-style-asian="normal" style:font-weight-asian="normal" style:font-size-complex="12pt" style:font-style-complex="normal" style:font-weight-complex="normal"/>
    </style:style>
    <style:style style:name="T63" style:family="text">
      <style:text-properties fo:color="#ff0000" loext:opacity="100%" fo:font-style="normal" style:text-underline-style="none" officeooo:rsid="0021bc7d" style:font-size-asian="10.5pt" style:font-style-asian="normal" style:font-weight-asian="normal" style:font-size-complex="12pt" style:font-style-complex="normal" style:font-weight-complex="normal"/>
    </style:style>
    <style:style style:name="T64" style:family="text">
      <style:text-properties fo:color="#0000ff" loext:opacity="100%" fo:font-style="normal" style:text-underline-style="none" officeooo:rsid="0023e359" style:font-size-asian="10.5pt" style:font-style-asian="normal" style:font-weight-asian="normal" style:font-size-complex="12pt" style:font-style-complex="normal" style:font-weight-complex="normal"/>
    </style:style>
    <style:style style:name="T65" style:family="text">
      <style:text-properties fo:color="#0000ff" loext:opacity="100%" fo:font-style="normal" style:text-underline-style="none" officeooo:rsid="0021bc7d" style:font-size-asian="10.5pt" style:font-style-asian="normal" style:font-weight-asian="normal" style:font-size-complex="12pt" style:font-style-complex="normal" style:font-weight-complex="normal"/>
    </style:style>
    <style:style style:name="T66" style:family="text">
      <style:text-properties officeooo:rsid="001dbcca"/>
    </style:style>
    <style:style style:name="T67" style:family="text">
      <style:text-properties officeooo:rsid="0019b3e2"/>
    </style:style>
    <style:style style:name="T68" style:family="text">
      <style:text-properties fo:font-style="normal" fo:font-weight="normal" officeooo:rsid="001a526c" style:font-style-asian="normal" style:font-weight-asian="normal" style:font-style-complex="normal" style:font-weight-complex="normal"/>
    </style:style>
    <style:style style:name="T69" style:family="text">
      <style:text-properties fo:font-style="normal" fo:font-weight="normal" officeooo:rsid="011d0a71" style:font-style-asian="normal" style:font-weight-asian="normal" style:font-style-complex="normal" style:font-weight-complex="normal"/>
    </style:style>
    <style:style style:name="T70" style:family="text">
      <style:text-properties fo:font-style="normal" fo:font-weight="normal" officeooo:rsid="001d389d" style:font-style-asian="normal" style:font-weight-asian="normal" style:font-style-complex="normal" style:font-weight-complex="normal"/>
    </style:style>
    <style:style style:name="T71" style:family="text">
      <style:text-properties fo:font-style="normal" fo:font-weight="normal" officeooo:rsid="002ac2a9" style:font-style-asian="normal" style:font-weight-asian="normal" style:font-style-complex="normal" style:font-weight-complex="normal"/>
    </style:style>
    <style:style style:name="T72" style:family="text">
      <style:text-properties fo:font-style="normal" fo:font-weight="normal" officeooo:rsid="003b8b64" style:font-style-asian="normal" style:font-weight-asian="normal" style:font-style-complex="normal" style:font-weight-complex="normal"/>
    </style:style>
    <style:style style:name="T73" style:family="text">
      <style:text-properties fo:font-style="normal" fo:font-weight="normal" officeooo:rsid="003bae43" style:font-style-asian="normal" style:font-weight-asian="normal" style:font-style-complex="normal" style:font-weight-complex="normal"/>
    </style:style>
    <style:style style:name="T74" style:family="text">
      <style:text-properties fo:font-weight="normal" officeooo:rsid="002ac2a9" style:font-weight-asian="normal"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3d6800" style:font-weight-asian="normal" style:font-weight-complex="normal"/>
    </style:style>
    <style:style style:name="T77" style:family="text">
      <style:text-properties fo:font-style="normal" fo:font-weight="normal" officeooo:rsid="002c77f6" style:font-style-asian="normal" style:font-weight-asian="normal" style:font-style-complex="normal" style:font-weight-complex="normal"/>
    </style:style>
    <style:style style:name="T78" style:family="text">
      <style:text-properties fo:font-style="normal" fo:font-weight="normal" officeooo:rsid="002e70ae" style:font-style-asian="normal" style:font-weight-asian="normal" style:font-style-complex="normal" style:font-weight-complex="normal"/>
    </style:style>
    <style:style style:name="T79" style:family="text">
      <style:text-properties fo:font-weight="normal" officeooo:rsid="002e70ae" style:font-weight-asian="normal" style:font-weight-complex="normal"/>
    </style:style>
    <style:style style:name="T80" style:family="text">
      <style:text-properties fo:font-style="normal" fo:font-weight="normal" officeooo:rsid="0034c66b" style:font-style-asian="normal" style:font-weight-asian="normal" style:font-style-complex="normal" style:font-weight-complex="normal"/>
    </style:style>
    <style:style style:name="T81" style:family="text">
      <style:text-properties fo:font-style="normal" fo:font-weight="normal" officeooo:rsid="00364164" style:font-style-asian="normal" style:font-weight-asian="normal" style:font-style-complex="normal" style:font-weight-complex="normal"/>
    </style:style>
    <style:style style:name="T82" style:family="text">
      <style:text-properties fo:font-style="normal" fo:font-weight="normal" officeooo:rsid="0037618b" style:font-style-asian="normal" style:font-weight-asian="normal" style:font-style-complex="normal" style:font-weight-complex="normal"/>
    </style:style>
    <style:style style:name="T83" style:family="text">
      <style:text-properties fo:font-style="normal" fo:font-weight="normal" officeooo:rsid="003e5195" style:font-style-asian="normal" style:font-weight-asian="normal" style:font-style-complex="normal" style:font-weight-complex="normal"/>
    </style:style>
    <style:style style:name="T84" style:family="text">
      <style:text-properties fo:font-style="normal" officeooo:rsid="0037618b" style:font-style-asian="normal" style:font-style-complex="normal"/>
    </style:style>
    <style:style style:name="T85" style:family="text">
      <style:text-properties fo:font-style="normal" style:font-style-asian="normal" style:font-style-complex="normal"/>
    </style:style>
    <style:style style:name="T86" style:family="text">
      <style:text-properties fo:font-style="normal" fo:font-weight="normal" officeooo:rsid="00862b89" style:font-style-asian="normal" style:font-weight-asian="normal" style:font-style-complex="normal" style:font-weight-complex="normal"/>
    </style:style>
    <style:style style:name="T87" style:family="text">
      <style:text-properties fo:font-style="normal" fo:font-weight="normal" officeooo:rsid="0040f670" style:font-style-asian="normal" style:font-weight-asian="normal" style:font-style-complex="normal" style:font-weight-complex="normal"/>
    </style:style>
    <style:style style:name="T88" style:family="text">
      <style:text-properties fo:font-style="normal" fo:font-weight="normal" officeooo:rsid="00509fed" style:font-style-asian="normal" style:font-weight-asian="normal" style:font-style-complex="normal" style:font-weight-complex="normal"/>
    </style:style>
    <style:style style:name="T89" style:family="text">
      <style:text-properties fo:font-style="normal" officeooo:rsid="0040f670" style:font-style-asian="normal" style:font-style-complex="normal"/>
    </style:style>
    <style:style style:name="T90" style:family="text">
      <style:text-properties fo:font-style="normal" fo:font-weight="normal" officeooo:rsid="004984b1" style:font-style-asian="normal" style:font-weight-asian="normal" style:font-style-complex="normal" style:font-weight-complex="normal"/>
    </style:style>
    <style:style style:name="T91" style:family="text">
      <style:text-properties fo:font-style="normal" fo:font-weight="normal" officeooo:rsid="00428c16" style:font-style-asian="normal" style:font-weight-asian="normal" style:font-style-complex="normal" style:font-weight-complex="normal"/>
    </style:style>
    <style:style style:name="T92" style:family="text">
      <style:text-properties fo:font-style="normal" fo:font-weight="normal" officeooo:rsid="00459559" style:font-style-asian="normal" style:font-weight-asian="normal" style:font-style-complex="normal" style:font-weight-complex="normal"/>
    </style:style>
    <style:style style:name="T93" style:family="text">
      <style:text-properties fo:font-style="normal" fo:font-weight="normal" officeooo:rsid="0051a77f" style:font-style-asian="normal" style:font-weight-asian="normal" style:font-style-complex="normal" style:font-weight-complex="normal"/>
    </style:style>
    <style:style style:name="T94" style:family="text">
      <style:text-properties fo:font-style="normal" officeooo:rsid="00428c16" style:font-style-asian="normal" style:font-style-complex="normal"/>
    </style:style>
    <style:style style:name="T95" style:family="text">
      <style:text-properties fo:font-style="normal" fo:font-weight="normal" officeooo:rsid="0052c9a5" style:font-style-asian="normal" style:font-weight-asian="normal" style:font-style-complex="normal" style:font-weight-complex="normal"/>
    </style:style>
    <style:style style:name="T96" style:family="text">
      <style:text-properties fo:font-style="normal" fo:font-weight="normal" officeooo:rsid="0046d911" style:font-style-asian="normal" style:font-weight-asian="normal" style:font-style-complex="normal" style:font-weight-complex="normal"/>
    </style:style>
    <style:style style:name="T97" style:family="text">
      <style:text-properties fo:font-style="normal" fo:font-weight="normal" officeooo:rsid="004e10aa" style:font-style-asian="normal" style:font-weight-asian="normal" style:font-style-complex="normal" style:font-weight-complex="normal"/>
    </style:style>
    <style:style style:name="T98" style:family="text">
      <style:text-properties fo:font-weight="normal" officeooo:rsid="0037618b" style:font-weight-asian="normal" style:font-weight-complex="normal"/>
    </style:style>
    <style:style style:name="T99" style:family="text">
      <style:text-properties fo:font-style="normal" fo:font-weight="normal" officeooo:rsid="00386faa" style:font-style-asian="normal" style:font-weight-asian="normal" style:font-style-complex="normal" style:font-weight-complex="normal"/>
    </style:style>
    <style:style style:name="T100" style:family="text">
      <style:text-properties fo:font-style="normal" fo:font-weight="normal" officeooo:rsid="0038ac97" style:font-style-asian="normal" style:font-weight-asian="normal" style:font-style-complex="normal" style:font-weight-complex="normal"/>
    </style:style>
    <style:style style:name="T101" style:family="text">
      <style:text-properties fo:font-style="normal" fo:font-weight="normal" officeooo:rsid="0053c48d" style:font-style-asian="normal" style:font-weight-asian="normal" style:font-style-complex="normal" style:font-weight-complex="normal"/>
    </style:style>
    <style:style style:name="T102" style:family="text">
      <style:text-properties fo:font-style="normal" fo:font-weight="normal" officeooo:rsid="005569e3" style:font-style-asian="normal" style:font-weight-asian="normal" style:font-style-complex="normal" style:font-weight-complex="normal"/>
    </style:style>
    <style:style style:name="T103" style:family="text">
      <style:text-properties fo:font-style="normal" fo:font-weight="normal" officeooo:rsid="0056a198" style:font-style-asian="normal" style:font-weight-asian="normal" style:font-style-complex="normal" style:font-weight-complex="normal"/>
    </style:style>
    <style:style style:name="T104" style:family="text">
      <style:text-properties fo:font-style="normal" fo:font-weight="normal" officeooo:rsid="0065ffb8" style:font-style-asian="normal" style:font-weight-asian="normal" style:font-style-complex="normal" style:font-weight-complex="normal"/>
    </style:style>
    <style:style style:name="T105" style:family="text">
      <style:text-properties fo:font-style="normal" fo:font-weight="normal" officeooo:rsid="0068a268" style:font-style-asian="normal" style:font-weight-asian="normal" style:font-style-complex="normal" style:font-weight-complex="normal"/>
    </style:style>
    <style:style style:name="T106" style:family="text">
      <style:text-properties fo:font-style="normal" fo:font-weight="normal" officeooo:rsid="00677410" style:font-style-asian="normal" style:font-weight-asian="normal" style:font-style-complex="normal" style:font-weight-complex="normal"/>
    </style:style>
    <style:style style:name="T107" style:family="text">
      <style:text-properties fo:font-style="normal" fo:font-weight="normal" officeooo:rsid="006a4c77" style:font-style-asian="normal" style:font-weight-asian="normal" style:font-style-complex="normal" style:font-weight-complex="normal"/>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059922f" style:font-style-asian="italic" style:font-weight-asian="normal" style:font-style-complex="italic" style:font-weight-complex="normal"/>
    </style:style>
    <style:style style:name="T110" style:family="text">
      <style:text-properties fo:font-style="italic" fo:font-weight="normal" officeooo:rsid="005a69be" style:font-style-asian="italic" style:font-weight-asian="normal" style:font-style-complex="italic" style:font-weight-complex="normal"/>
    </style:style>
    <style:style style:name="T111" style:family="text">
      <style:text-properties officeooo:rsid="005ed154"/>
    </style:style>
    <style:style style:name="T112" style:family="text">
      <style:text-properties officeooo:rsid="0064a731"/>
    </style:style>
    <style:style style:name="T113" style:family="text">
      <style:text-properties officeooo:rsid="005c5cdc"/>
    </style:style>
    <style:style style:name="T114" style:family="text">
      <style:text-properties fo:font-style="italic" fo:font-weight="normal" officeooo:rsid="006c233b" style:font-style-asian="italic" style:font-weight-asian="normal" style:font-style-complex="italic" style:font-weight-complex="normal"/>
    </style:style>
    <style:style style:name="T115" style:family="text">
      <style:text-properties fo:font-style="normal" fo:font-weight="normal" officeooo:rsid="006c7394" style:font-style-asian="normal" style:font-weight-asian="normal" style:font-style-complex="normal" style:font-weight-complex="normal"/>
    </style:style>
    <style:style style:name="T116" style:family="text">
      <style:text-properties fo:font-weight="normal" officeooo:rsid="00717307" style:font-weight-asian="normal" style:font-weight-complex="normal"/>
    </style:style>
    <style:style style:name="T117" style:family="text">
      <style:text-properties fo:font-weight="normal" officeooo:rsid="007274c5" style:font-weight-asian="normal" style:font-weight-complex="normal"/>
    </style:style>
    <style:style style:name="T118" style:family="text">
      <style:text-properties officeooo:rsid="0072cee9"/>
    </style:style>
    <style:style style:name="T119" style:family="text">
      <style:text-properties officeooo:rsid="0072d497"/>
    </style:style>
    <style:style style:name="T120" style:family="text">
      <style:text-properties fo:font-weight="normal" officeooo:rsid="007623da" style:font-weight-asian="normal" style:font-weight-complex="normal"/>
    </style:style>
    <style:style style:name="T121" style:family="text">
      <style:text-properties fo:font-weight="normal" officeooo:rsid="0076b8ee" style:font-weight-asian="normal" style:font-weight-complex="normal"/>
    </style:style>
    <style:style style:name="T122" style:family="text">
      <style:text-properties fo:font-weight="normal" officeooo:rsid="0079d65f" style:font-weight-asian="normal" style:font-weight-complex="normal"/>
    </style:style>
    <style:style style:name="T123" style:family="text">
      <style:text-properties fo:font-weight="normal" officeooo:rsid="002c77f6" style:font-weight-asian="normal" style:font-weight-complex="normal"/>
    </style:style>
    <style:style style:name="T124" style:family="text">
      <style:text-properties officeooo:rsid="007a2905"/>
    </style:style>
    <style:style style:name="T125" style:family="text">
      <style:text-properties officeooo:rsid="007ed027"/>
    </style:style>
    <style:style style:name="T126" style:family="text">
      <style:text-properties officeooo:rsid="007ed6c4"/>
    </style:style>
    <style:style style:name="T127" style:family="text">
      <style:text-properties officeooo:rsid="007aaa43"/>
    </style:style>
    <style:style style:name="T128" style:family="text">
      <style:text-properties officeooo:rsid="007c8c4e"/>
    </style:style>
    <style:style style:name="T129" style:family="text">
      <style:text-properties officeooo:rsid="007aee37"/>
    </style:style>
    <style:style style:name="T130" style:family="text">
      <style:text-properties fo:font-weight="normal" officeooo:rsid="00806b5d" style:font-weight-asian="normal" style:font-weight-complex="normal"/>
    </style:style>
    <style:style style:name="T131" style:family="text">
      <style:text-properties fo:font-weight="normal" officeooo:rsid="00823dbc" style:font-weight-asian="normal" style:font-weight-complex="normal"/>
    </style:style>
    <style:style style:name="T132" style:family="text">
      <style:text-properties fo:font-weight="normal" officeooo:rsid="00838801" style:font-weight-asian="normal" style:font-weight-complex="normal"/>
    </style:style>
    <style:style style:name="T133" style:family="text">
      <style:text-properties fo:font-weight="normal" officeooo:rsid="00879833" style:font-weight-asian="normal" style:font-weight-complex="normal"/>
    </style:style>
    <style:style style:name="T134" style:family="text">
      <style:text-properties fo:font-weight="normal" officeooo:rsid="0088924a" style:font-weight-asian="normal" style:font-weight-complex="normal"/>
    </style:style>
    <style:style style:name="T135" style:family="text">
      <style:text-properties fo:font-style="normal" fo:font-weight="normal" officeooo:rsid="00852023" style:font-style-asian="normal" style:font-weight-asian="normal" style:font-style-complex="normal" style:font-weight-complex="normal"/>
    </style:style>
    <style:style style:name="T136" style:family="text">
      <style:text-properties fo:font-style="normal" fo:font-weight="normal" officeooo:rsid="008b6901" style:font-style-asian="normal" style:font-weight-asian="normal" style:font-style-complex="normal" style:font-weight-complex="normal"/>
    </style:style>
    <style:style style:name="T137" style:family="text">
      <style:text-properties fo:font-style="normal" officeooo:rsid="009f0d68" style:font-style-asian="normal" style:font-style-complex="normal"/>
    </style:style>
    <style:style style:name="T138" style:family="text">
      <style:text-properties fo:font-style="normal" fo:font-weight="normal" officeooo:rsid="008d386c" style:font-style-asian="normal" style:font-weight-asian="normal" style:font-style-complex="normal" style:font-weight-complex="normal"/>
    </style:style>
    <style:style style:name="T139" style:family="text">
      <style:text-properties fo:font-style="normal" fo:font-weight="normal" officeooo:rsid="008f4a13" style:font-style-asian="normal" style:font-weight-asian="normal" style:font-style-complex="normal" style:font-weight-complex="normal"/>
    </style:style>
    <style:style style:name="T140" style:family="text">
      <style:text-properties fo:font-style="normal" officeooo:rsid="00838801" style:font-style-asian="normal" style:font-style-complex="normal"/>
    </style:style>
    <style:style style:name="T141" style:family="text">
      <style:text-properties fo:font-style="normal" fo:font-weight="normal" officeooo:rsid="00838801" style:font-style-asian="normal" style:font-weight-asian="normal" style:font-style-complex="normal" style:font-weight-complex="normal"/>
    </style:style>
    <style:style style:name="T142" style:family="text">
      <style:text-properties fo:font-style="normal" fo:font-weight="normal" officeooo:rsid="009266ce" style:font-style-asian="normal" style:font-weight-asian="normal" style:font-style-complex="normal" style:font-weight-complex="normal"/>
    </style:style>
    <style:style style:name="T143" style:family="text">
      <style:text-properties fo:font-weight="normal" officeooo:rsid="0096c410" style:font-weight-asian="normal" style:font-weight-complex="normal"/>
    </style:style>
    <style:style style:name="T144" style:family="text">
      <style:text-properties fo:font-weight="normal" officeooo:rsid="009b6e86" style:font-weight-asian="normal" style:font-weight-complex="normal"/>
    </style:style>
    <style:style style:name="T145" style:family="text">
      <style:text-properties fo:font-weight="normal" officeooo:rsid="009d2c3f" style:font-weight-asian="normal" style:font-weight-complex="normal"/>
    </style:style>
    <style:style style:name="T146" style:family="text">
      <style:text-properties fo:font-weight="normal" officeooo:rsid="0053c48d" style:font-weight-asian="normal" style:font-weight-complex="normal"/>
    </style:style>
    <style:style style:name="T147" style:family="text">
      <style:text-properties fo:font-weight="normal" officeooo:rsid="009f6460" style:font-weight-asian="normal" style:font-weight-complex="normal"/>
    </style:style>
    <style:style style:name="T148" style:family="text">
      <style:text-properties fo:font-weight="normal" officeooo:rsid="00a01e9c" style:font-weight-asian="normal" style:font-weight-complex="normal"/>
    </style:style>
    <style:style style:name="T149" style:family="text">
      <style:text-properties fo:font-weight="normal" officeooo:rsid="00a19a44" style:font-weight-asian="normal" style:font-weight-complex="normal"/>
    </style:style>
    <style:style style:name="T150" style:family="text">
      <style:text-properties fo:font-weight="normal" officeooo:rsid="00a31505" style:font-weight-asian="normal" style:font-weight-complex="normal"/>
    </style:style>
    <style:style style:name="T151" style:family="text">
      <style:text-properties fo:font-weight="normal" officeooo:rsid="00a3a48f" style:font-weight-asian="normal" style:font-weight-complex="normal"/>
    </style:style>
    <style:style style:name="T152" style:family="text">
      <style:text-properties fo:font-weight="normal" officeooo:rsid="00a3cb86" style:font-weight-asian="normal" style:font-weight-complex="normal"/>
    </style:style>
    <style:style style:name="T153" style:family="text">
      <style:text-properties fo:font-weight="normal" officeooo:rsid="00a60f9b" style:font-weight-asian="normal" style:font-weight-complex="normal"/>
    </style:style>
    <style:style style:name="T154" style:family="text">
      <style:text-properties fo:font-weight="normal" officeooo:rsid="00a74e3a" style:font-weight-asian="normal" style:font-weight-complex="normal"/>
    </style:style>
    <style:style style:name="T155" style:family="text">
      <style:text-properties fo:font-weight="normal" officeooo:rsid="00a80bbc" style:font-weight-asian="normal" style:font-weight-complex="normal"/>
    </style:style>
    <style:style style:name="T156" style:family="text">
      <style:text-properties fo:font-weight="normal" officeooo:rsid="005569e3" style:font-weight-asian="normal" style:font-weight-complex="normal"/>
    </style:style>
    <style:style style:name="T157" style:family="text">
      <style:text-properties fo:font-weight="normal" officeooo:rsid="00aaa2dc" style:font-weight-asian="normal" style:font-weight-complex="normal"/>
    </style:style>
    <style:style style:name="T158" style:family="text">
      <style:text-properties fo:font-weight="normal" officeooo:rsid="00ac6299" style:font-weight-asian="normal" style:font-weight-complex="normal"/>
    </style:style>
    <style:style style:name="T159" style:family="text">
      <style:text-properties fo:font-weight="normal" officeooo:rsid="0056a198" style:font-weight-asian="normal" style:font-weight-complex="normal"/>
    </style:style>
    <style:style style:name="T160" style:family="text">
      <style:text-properties fo:font-weight="normal" officeooo:rsid="0065ffb8" style:font-weight-asian="normal" style:font-weight-complex="normal"/>
    </style:style>
    <style:style style:name="T161" style:family="text">
      <style:text-properties fo:font-weight="normal" officeooo:rsid="0068a268" style:font-weight-asian="normal" style:font-weight-complex="normal"/>
    </style:style>
    <style:style style:name="T162" style:family="text">
      <style:text-properties fo:font-weight="normal" officeooo:rsid="00677410" style:font-weight-asian="normal" style:font-weight-complex="normal"/>
    </style:style>
    <style:style style:name="T163" style:family="text">
      <style:text-properties fo:font-weight="normal" officeooo:rsid="006a4c77" style:font-weight-asian="normal" style:font-weight-complex="normal"/>
    </style:style>
    <style:style style:name="T164" style:family="text">
      <style:text-properties fo:font-weight="normal" officeooo:rsid="00acf7e7" style:font-weight-asian="normal" style:font-weight-complex="normal"/>
    </style:style>
    <style:style style:name="T165" style:family="text">
      <style:text-properties fo:font-weight="normal" officeooo:rsid="00ad2e72" style:font-weight-asian="normal" style:font-weight-complex="normal"/>
    </style:style>
    <style:style style:name="T166" style:family="text">
      <style:text-properties fo:font-weight="normal" officeooo:rsid="00ae4afd" style:font-weight-asian="normal" style:font-weight-complex="normal"/>
    </style:style>
    <style:style style:name="T167" style:family="text">
      <style:text-properties officeooo:rsid="00a60f9b"/>
    </style:style>
    <style:style style:name="T168" style:family="text">
      <style:text-properties officeooo:rsid="00afcd11"/>
    </style:style>
    <style:style style:name="T169" style:family="text">
      <style:text-properties officeooo:rsid="00b07c48"/>
    </style:style>
    <style:style style:name="T170" style:family="text">
      <style:text-properties officeooo:rsid="00b202a4"/>
    </style:style>
    <style:style style:name="T171" style:family="text">
      <style:text-properties officeooo:rsid="00b1f608"/>
    </style:style>
    <style:style style:name="T172" style:family="text">
      <style:text-properties fo:font-style="italic" fo:font-weight="normal" officeooo:rsid="00b43ebb" style:font-style-asian="italic" style:font-weight-asian="normal" style:font-style-complex="italic" style:font-weight-complex="normal"/>
    </style:style>
    <style:style style:name="T173" style:family="text">
      <style:text-properties officeooo:rsid="00b70ba1"/>
    </style:style>
    <style:style style:name="T174" style:family="text">
      <style:text-properties officeooo:rsid="00b82aa9"/>
    </style:style>
    <style:style style:name="T175" style:family="text">
      <style:text-properties officeooo:rsid="00b85aa8"/>
    </style:style>
    <style:style style:name="T176" style:family="text">
      <style:text-properties officeooo:rsid="00b542cb"/>
    </style:style>
    <style:style style:name="T177" style:family="text">
      <style:text-properties officeooo:rsid="00b91507"/>
    </style:style>
    <style:style style:name="T178" style:family="text">
      <style:text-properties fo:font-weight="normal" officeooo:rsid="00b4540e" style:font-weight-asian="normal" style:font-weight-complex="normal"/>
    </style:style>
    <style:style style:name="T179" style:family="text">
      <style:text-properties fo:font-weight="normal" officeooo:rsid="006c233b" style:font-weight-asian="normal" style:font-weight-complex="normal"/>
    </style:style>
    <style:style style:name="T180" style:family="text">
      <style:text-properties fo:font-style="normal" officeooo:rsid="00b92fe0" style:font-style-asian="normal" style:font-style-complex="normal"/>
    </style:style>
    <style:style style:name="T181" style:family="text">
      <style:text-properties fo:font-style="normal" officeooo:rsid="00bb9893" style:font-style-asian="normal" style:font-style-complex="normal"/>
    </style:style>
    <style:style style:name="T182" style:family="text">
      <style:text-properties officeooo:rsid="00c305e2"/>
    </style:style>
    <style:style style:name="T183" style:family="text">
      <style:text-properties officeooo:rsid="00c430e4"/>
    </style:style>
    <style:style style:name="T184" style:family="text">
      <style:text-properties officeooo:rsid="00c5f52b"/>
    </style:style>
    <style:style style:name="T185" style:family="text">
      <style:text-properties fo:font-style="normal" fo:font-weight="normal" officeooo:rsid="00c5f52b" style:font-style-asian="normal" style:font-weight-asian="normal" style:font-style-complex="normal" style:font-weight-complex="normal"/>
    </style:style>
    <style:style style:name="T186" style:family="text">
      <style:text-properties fo:font-weight="normal" officeooo:rsid="00be86e5" style:font-weight-asian="normal" style:font-weight-complex="normal"/>
    </style:style>
    <style:style style:name="T187" style:family="text">
      <style:text-properties fo:font-weight="normal" officeooo:rsid="006c7394" style:font-weight-asian="normal" style:font-weight-complex="normal"/>
    </style:style>
    <style:style style:name="T188" style:family="text">
      <style:text-properties fo:font-weight="normal" officeooo:rsid="00c1832f" style:font-weight-asian="normal" style:font-weight-complex="normal"/>
    </style:style>
    <style:style style:name="T189" style:family="text">
      <style:text-properties fo:font-weight="normal" officeooo:rsid="00c7708a" style:font-weight-asian="normal" style:font-weight-complex="normal"/>
    </style:style>
    <style:style style:name="T190" style:family="text">
      <style:text-properties fo:font-weight="normal" officeooo:rsid="00cc3a42" style:font-weight-asian="normal" style:font-weight-complex="normal"/>
    </style:style>
    <style:style style:name="T191" style:family="text">
      <style:text-properties fo:font-weight="normal" officeooo:rsid="00ce5355" style:font-weight-asian="normal" style:font-weight-complex="normal"/>
    </style:style>
    <style:style style:name="T192" style:family="text">
      <style:text-properties fo:font-weight="normal" officeooo:rsid="00cedaac" style:font-weight-asian="normal" style:font-weight-complex="normal"/>
    </style:style>
    <style:style style:name="T193" style:family="text">
      <style:text-properties fo:font-weight="normal" officeooo:rsid="00d0375b" style:font-weight-asian="normal" style:font-weight-complex="normal"/>
    </style:style>
    <style:style style:name="T194" style:family="text">
      <style:text-properties fo:font-weight="normal" officeooo:rsid="00d21659" style:font-weight-asian="normal" style:font-weight-complex="normal"/>
    </style:style>
    <style:style style:name="T195" style:family="text">
      <style:text-properties fo:font-weight="normal" officeooo:rsid="00d2f2fd" style:font-weight-asian="normal" style:font-weight-complex="normal"/>
    </style:style>
    <style:style style:name="T196" style:family="text">
      <style:text-properties fo:font-weight="normal" officeooo:rsid="00da1109" style:font-weight-asian="normal" style:font-weight-complex="normal"/>
    </style:style>
    <style:style style:name="T197" style:family="text">
      <style:text-properties fo:font-weight="normal" officeooo:rsid="00dc0a75" style:font-weight-asian="normal" style:font-weight-complex="normal"/>
    </style:style>
    <style:style style:name="T198" style:family="text">
      <style:text-properties fo:font-weight="normal" officeooo:rsid="012038a2" style:font-weight-asian="normal" style:font-weight-complex="normal"/>
    </style:style>
    <style:style style:name="T199" style:family="text">
      <style:text-properties fo:font-weight="normal" officeooo:rsid="012197af" style:font-weight-asian="normal" style:font-weight-complex="normal"/>
    </style:style>
    <style:style style:name="T200" style:family="text">
      <style:text-properties fo:font-weight="normal" officeooo:rsid="00d613ac" style:font-weight-asian="normal" style:font-weight-complex="normal"/>
    </style:style>
    <style:style style:name="T201" style:family="text">
      <style:text-properties fo:font-weight="normal" officeooo:rsid="00de1b9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Αναφορά πάνω στην <text:span text:style-name="T2">3</text:span>η εργασία</text:p>
      <text:p text:style-name="P3"/>
      <text:p text:style-name="P4">###### ######</text:p>
      <text:p text:style-name="P3">ΑΕΜ: <text:span text:style-name="T3">####</text:span></text:p>
      <text:p text:style-name="P5"><text:span text:style-name="T2">3</text:span><text:span text:style-name="T4">0</text:span>/1<text:span text:style-name="T4">1</text:span>/2024</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list text:style-name="L1">
        <text:list-item>
          <text:p text:style-name="P7">Περίληψη:</text:p>
        </text:list-item>
      </text:list>
      <text:p text:style-name="P6"><text:span text:style-name="T1"/></text:p>
      <text:p text:style-name="P8"><text:span text:style-name="T1"><text:tab/></text:span><text:span text:style-name="T5">Στην αναφορά αυτή παρουσιάζεται η υλοποίηση ενός </text:span><text:span text:style-name="T6">ελεγκτή οθόνης που χρησιμοποιεί το VGA standard και σύνδεση. </text:span><text:span text:style-name="T7">η εξήγηση και λεπτομέρειες αυτής, καθώς και λεπτομέρειες σχετικά με την επαλήθευση σωστής λειτουργίας τους</text:span><text:span text:style-name="T5">. </text:span><text:span text:style-name="T8">Συγκεκριμένα παρουσιάζεται η υλοποίηση VRAM </text:span><text:span text:style-name="T9">για την αποθήκευση μμιας εικόνας</text:span><text:span text:style-name="T8">, </text:span><text:span text:style-name="T9">μονάδων συγχρονισμού των σημάτων συγχρονισμού VSYNC και HSYNC που χρησιμοποιεί το VGA, </text:span><text:span text:style-name="T10">και περιφεριακά κομμάτια της που επιτρέπει τη σωστή λειτουργία τους</text:span><text:span text:style-name="T9">.</text:span><text:span text:style-name="T8"> </text:span></text:p>
      <text:p text:style-name="P9"><text:span text:style-name="T5"/></text:p>
      <text:p text:style-name="P9"><text:span text:style-name="T5"/></text:p>
      <text:list text:style-name="L2">
        <text:list-item>
          <text:p text:style-name="P10"><text:span text:style-name="T11">Εισαγωγή</text:span><text:span text:style-name="T12">:</text:span></text:p>
        </text:list-item>
      </text:list>
      <text:p text:style-name="P6"><text:span text:style-name="T1"/></text:p>
      <text:p text:style-name="P11"><text:span text:style-name="T1"><text:tab/></text:span><text:span text:style-name="T13"> </text:span><text:span text:style-name="T14">Όπως αναφέρθηκε προηγουμένως, κύριος στόχος της εργασίας είναι η υλοποίηση </text:span><text:span text:style-name="T15">ενός ελεγτή VGA, το οποίο περιλαμβάνει την υλοποίηση μιας μνήμης VRAMπου θα περιέχει μία εικόνα, μονάδων που οδηγούν σήματα συγχρονισμού HSYNC και VSYNC, </text:span><text:span text:style-name="T16">καθώς και καθορίζουν την διεύθυνση</text:span><text:span text:style-name="T15"> </text:span><text:span text:style-name="T16">απο την οποία θα λάβουμε δεδομένα, με τη χρήση μετρητών HPIXEL και VPIXEL. </text:span></text:p>
      <text:p text:style-name="P6"><draw:frame draw:style-name="fr1" draw:name="Image24" text:anchor-type="char" svg:x="3.8409in" svg:y="0.1398in" svg:width="3.0118in" svg:height="4.3638in" draw:z-index="23"><draw:image xlink:href="Pictures/1000000100000160000001FE5CC2B178.png" xlink:type="simple" xlink:show="embed" xlink:actuate="onLoad" draw:mime-type="image/png"/></draw:frame><text:span text:style-name="T1"/></text:p>
      <text:p text:style-name="P12"><text:span text:style-name="T1"><text:tab/></text:span><text:span text:style-name="T17">Στην εικόνα <text:s/>φαίνεται η διεπαφή που παρέχει η πλακέτα Artix-7 </text:span><text:span text:style-name="T18">για την </text:span><text:span text:style-name="T19">επικοινωνία με την χρήση θύρας VGA. Η θύρα αποτελείται συνολικά από 15 ακίδες, όπου οι 6 από αυτές, τρεις για τα αντίστοιχα (1, 2, 3), και άλλες τρεις για τις σχετικές γειώσεις (6, 7, 8), αντιστοιχούν στα τρία βασικά χρώματα, Κόκκινο, Πράσινο και Μπλε. </text:span><text:span text:style-name="T20">Παρόλο που με την διεπαφή μας δίνεται η επιλογή να εμφανίσουμε 4096 χρώματα, στα πλαίσια της εργασίας, και για λόγους οικονομίας στη μνήμη, η υλοποίηση μας του ελεγκτή θα υποστηρίζει την κωδικοποίηση οκτώ χρωμάτων. Συγκεκριμένα, θα υλοποιήσουμε την </text:span><text:span text:style-name="T21">VRAM</text:span><text:span text:style-name="T20"> χρησιμοποιώντας τρείς Block RAM (BRAM), </text:span><text:span text:style-name="T22">μία για κάθε βασικό χρώμα. Αν η BRAM έχει 1 σε ένα σημείο της δηλώνει την ύπαρξη του χρώματός της στο συγκεκριμένο pixel, αλλιώς δηλώνει την απουσία του. Λόγω του τρόπου που θέλουμε να υλοποιήσουμε το κύκλωμα, η έξοδος του κάθε χρώματος θα αντιστοιχείται σε όλα τα διαθέσιμα pins του χρώματος. </text:span><text:span text:style-name="T23">Λόγω περιορισμού χώρου σε συνεχόμενο Block της RAM, θα αποθηκεύσουμε μια συμπιεσμένη εκδοχή της εικόνας που θα προβάλλουμε (128x96 αντί 640x</text:span><text:span text:style-name="T24">480), την οποία θα μεγενθύνουμε τεχνητά</text:span></text:p>
      <text:p text:style-name="P12"><text:soft-page-break/><text:span text:style-name="T22"/></text:p>
      <text:p text:style-name="P12"><text:span text:style-name="T22"/></text:p>
      <text:p text:style-name="P12"><text:span text:style-name="T22"/></text:p>
      <text:p text:style-name="P13"><draw:frame draw:style-name="fr1" draw:name="Image26" text:anchor-type="char" svg:x="0.5764in" svg:y="1.6764in" svg:width="5.5409in" svg:height="1.6772in" draw:z-index="25"><draw:image xlink:href="Pictures/1000000100000214000000A191008172.png" xlink:type="simple" xlink:show="embed" xlink:actuate="onLoad" draw:mime-type="image/png"/></draw:frame><text:span text:style-name="T1"><text:tab/></text:span><draw:frame draw:style-name="fr2" draw:name="Image25" text:anchor-type="char" svg:width="5.5409in" svg:height="1.6772in" draw:z-index="24"><draw:image xlink:href="Pictures/1000000100000214000000A1369332A9.png" xlink:type="simple" xlink:show="embed" xlink:actuate="onLoad" draw:mime-type="image/png"/></draw:frame></text:p>
      <text:p text:style-name="P14"><text:span text:style-name="T25">Horizontal </text:span><text:span text:style-name="T26">and Vertical </text:span><text:span text:style-name="T25">VGA Synchronisation</text:span></text:p>
      <text:p text:style-name="P13"><text:span text:style-name="T27"/></text:p>
      <text:p text:style-name="P13"><text:span text:style-name="T27"/></text:p>
      <text:p text:style-name="P13"><text:span text:style-name="T27"><text:tab/>Τα σήματα HSYNC και VSYNC είναι υπεύθυνα για τον χρονισμό της οριζόντια</text:span><text:span text:style-name="T28">ς</text:span><text:span text:style-name="T27"> και κατακόρυφης συντεταγμένης αντίστοιχα. </text:span><text:span text:style-name="T29">Οι κυμματομορφές τους είναι πανομοιότυπες, ό</text:span><text:span text:style-name="T30">πως φαίνεται και στο σχήμα παραπάνω. </text:span><text:span text:style-name="T31">Η οθόνη θα είναι ενεργή για χρόνο D οριζοντίως και R κατακορύφως, ενώ θα είναι </text:span><text:span text:style-name="T32">απενεργοποιημένη</text:span><text:span text:style-name="T31"> για χρόνο C μετά και E πρίν το HSYNC, καθώς και Q μετά και S πρίν το VSYNC. </text:span><text:span text:style-name="T32">Ο χρονισμός των παραπάνω διαστημάτων εξαρτάται απο την ανάλυση και τον ρυθμό ανανέωσης της οθόνης. Η υλοποίηση μας υποθέτει ανάλυση 640 x 480 και ρυθμό ανανέωσης 60Hz. </text:span><text:span text:style-name="T33">Η εναλαγή </text:span><text:span text:style-name="T34">των εξόδων θα επιτευχθεί με τη χρήση FSM σε δύο διαφορετικές μονάδες, μια για το HSYNC και μια για το VSYNC. </text:span></text:p>
      <text:p text:style-name="P13"><text:span text:style-name="T32"/></text:p>
      <text:p text:style-name="P13"><text:span text:style-name="T32"/></text:p>
      <text:p text:style-name="P13"><draw:frame draw:style-name="fr2" draw:name="Image27" text:anchor-type="char" svg:width="5.1866in" svg:height="3.0409in" draw:z-index="26"><draw:image xlink:href="Pictures/10000001000001F200000124B27A9520.png" xlink:type="simple" xlink:show="embed" xlink:actuate="onLoad" draw:mime-type="image/png"/></draw:frame><text:span text:style-name="T32"/></text:p>
      <text:p text:style-name="P15"><text:span text:style-name="T35">Pixel </text:span>Writing Priority</text:p>
      <text:p text:style-name="P6"><text:soft-page-break/><text:span text:style-name="T1"/></text:p>
      <text:p text:style-name="P12"><text:span text:style-name="T1"><text:tab/></text:span><text:span text:style-name="T36">Στο παραπάνω σχήμα φαίνεται η σειρά με την οποία θα πρέπει να γράφονται τα pixel στην οθόνη. Οι μονάδες VSYNC και HSYNC που αναφέρθηκαν πρίν θα περιέχουν και έναν μετρητή οριζόντιων pixel HPIXEL και έναν κατακόρυφο μετρητή pixel VPIXEL αντίστοιχα. Ο μετρητής ΗPIXEL θα αυξάνεται συνεχώς κατα την εγγραφή δεδομένων και θα μηδενίζεται μετά την εγγραφή μιας γραμμής, ενώ ο μετρητής VPIXEL θα αυξάνεται κατα την εγγραφή μιας γραμμής και θα μηδενίζεται μετά την εγγραφή όλης της εικόνας. Η υλοποίηση λαμβάνει υπόψη οτι η εικόνα που είναι αποθηκευμένη είναι μικρότερη απο αυτή που πρέπει να προβληθεί, για αυτό θα καθυστερήσει τεχνητά την ταχύτητα αύξηση; των μετρητών, καθιστώντας την πέντε φορές μικρότερη.</text:span></text:p>
      <text:p text:style-name="P12"><text:span text:style-name="T36"/></text:p>
      <text:p text:style-name="P12"><text:span text:style-name="T36"/></text:p>
      <text:p text:style-name="P12"><draw:frame draw:style-name="fr1" draw:name="Image28" text:anchor-type="char" svg:x="4.9508in" svg:y="0.1043in" svg:width="1.3335in" svg:height="0.9992in" draw:z-index="27"><draw:image xlink:href="Pictures/100000010000008000000060AEEE2C36.png" xlink:type="simple" xlink:show="embed" xlink:actuate="onLoad" draw:mime-type="image/png"/></draw:frame><text:span text:style-name="T36"/></text:p>
      <text:p text:style-name="P12"><text:span text:style-name="T1"><text:tab/></text:span><text:span text:style-name="T37">Δίπλα φαίνεται η εικόνα που θα πρέπει να προβληθεί στην οθόνη. Θα αλάξουμε ελαφρώς τα δεδομένα στις αρχικές της διευθύνσεις που κωδικοποιούν ένα εύρος χρωμάτων για να επιβεβαιώσουμε τον σωστό έλεγχο της ram. Επιλέχθηκε ασπρόμαυρη εικόνα γιατί είναι ευκολότερο να τη μεταφέρουμε στη ram μέσω script. Θα σταλθεί και ένα δεύτερο αρχείο vram που περιέχει μίια εναλλακτική εικόνα.</text:span></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list text:style-name="L3">
        <text:list-item>
          <text:p text:style-name="P16"><text:soft-page-break/>Μέρος 1ο: Υλοποίηση VRAM</text:p>
        </text:list-item>
      </text:list>
      <text:p text:style-name="P17"/>
      <text:p text:style-name="P18"><text:span text:style-name="T38"><text:tab/>Για να υλοποιήσουμε τη μνήμη VRAM που θα περιέχει την εικόνα που θα απεικονίζουμε στην εικόνα, μπορούμε να χρησιμοποιήσουμε την Block RAM (BRAM) που περιλαμβάνει η FPGA. Συγκεκριμένα, </text:span><text:span text:style-name="T39">θα χρησιμοποιήσουμε τρία τμήματα της BRAM, με 18 Kbyte χώρου το καθένα, τα οποία θα περιέχουν πληροφορίες για το άν το pixel που αντιστοιχεί στη διεύθυνση που θα κοιτάξουμε έχει κόκκινο, πράσινο η μπλέ χρώμα αντίστοιχα. </text:span><text:span text:style-name="T40">Δηλαδή ανάλογα των περιεχομένων της μνήμης, τα χρώματα θα αντιστιχιθούν ως εξής στην έξοδο:</text:span></text:p>
      <text:p text:style-name="P18"><text:span text:style-name="T4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BRAM (<text:span text:style-name="T41">R</text:span><text:span text:style-name="T42">ed)</text:span></text:p>
          </table:table-cell>
          <table:table-cell table:style-name="Table1.A1" office:value-type="string">
            <text:p text:style-name="P19">BRAM (<text:span text:style-name="T43">G</text:span>reen<text:span text:style-name="T42">)</text:span></text:p>
          </table:table-cell>
          <table:table-cell table:style-name="Table1.A1" office:value-type="string">
            <text:p text:style-name="P19">BRAM (<text:span text:style-name="T44">B</text:span>lue<text:span text:style-name="T42">)</text:span></text:p>
          </table:table-cell>
          <table:table-cell table:style-name="Table1.D1" office:value-type="string">
            <text:p text:style-name="P19">Displayed Color</text:p>
          </table:table-cell>
        </table:table-row>
        <table:table-row>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D2" office:value-type="string">
            <text:p text:style-name="P19">Μαύρο</text:p>
          </table:table-cell>
        </table:table-row>
        <table:table-row>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1</text:p>
          </table:table-cell>
          <table:table-cell table:style-name="Table1.D3" office:value-type="string">
            <text:p text:style-name="P19">Μπλέ</text:p>
          </table:table-cell>
        </table:table-row>
        <table:table-row>
          <table:table-cell table:style-name="Table1.A2" office:value-type="string">
            <text:p text:style-name="P19">0</text:p>
          </table:table-cell>
          <table:table-cell table:style-name="Table1.A2" office:value-type="string">
            <text:p text:style-name="P19">1</text:p>
          </table:table-cell>
          <table:table-cell table:style-name="Table1.A2" office:value-type="string">
            <text:p text:style-name="P19">0</text:p>
          </table:table-cell>
          <table:table-cell table:style-name="Table1.D4" office:value-type="string">
            <text:p text:style-name="P20">Πράσινο</text:p>
          </table:table-cell>
        </table:table-row>
        <table:table-row>
          <table:table-cell table:style-name="Table1.A2" office:value-type="string">
            <text:p text:style-name="P19">0</text:p>
          </table:table-cell>
          <table:table-cell table:style-name="Table1.A2" office:value-type="string">
            <text:p text:style-name="P19">1</text:p>
          </table:table-cell>
          <table:table-cell table:style-name="Table1.A2" office:value-type="string">
            <text:p text:style-name="P19">1</text:p>
          </table:table-cell>
          <table:table-cell table:style-name="Table1.D5" office:value-type="string">
            <text:p text:style-name="P19">Κυανό</text:p>
          </table:table-cell>
        </table:table-row>
        <table:table-row>
          <table:table-cell table:style-name="Table1.A2" office:value-type="string">
            <text:p text:style-name="P19">1</text:p>
          </table:table-cell>
          <table:table-cell table:style-name="Table1.A2" office:value-type="string">
            <text:p text:style-name="P19">0</text:p>
          </table:table-cell>
          <table:table-cell table:style-name="Table1.A2" office:value-type="string">
            <text:p text:style-name="P19">0</text:p>
          </table:table-cell>
          <table:table-cell table:style-name="Table1.D6" office:value-type="string">
            <text:p text:style-name="P20">Κόκκινο</text:p>
          </table:table-cell>
        </table:table-row>
        <table:table-row>
          <table:table-cell table:style-name="Table1.A2" office:value-type="string">
            <text:p text:style-name="P19">1</text:p>
          </table:table-cell>
          <table:table-cell table:style-name="Table1.A2" office:value-type="string">
            <text:p text:style-name="P19">0</text:p>
          </table:table-cell>
          <table:table-cell table:style-name="Table1.A2" office:value-type="string">
            <text:p text:style-name="P19">1</text:p>
          </table:table-cell>
          <table:table-cell table:style-name="Table1.D7" office:value-type="string">
            <text:p text:style-name="P20">Μόβ</text:p>
          </table:table-cell>
        </table:table-row>
        <table:table-row>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0</text:p>
          </table:table-cell>
          <table:table-cell table:style-name="Table1.D8" office:value-type="string">
            <text:p text:style-name="P19">Κίτρινο</text:p>
          </table:table-cell>
        </table:table-row>
        <table:table-row>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1</text:p>
          </table:table-cell>
          <table:table-cell table:style-name="Table1.D9" office:value-type="string">
            <text:p text:style-name="P19">Άσπρο</text:p>
          </table:table-cell>
        </table:table-row>
      </table:table>
      <text:p text:style-name="P21"><text:span text:style-name="T45"/></text:p>
      <text:p text:style-name="P21"><text:span text:style-name="T46">PartA </text:span><text:span text:style-name="T47">Possible Color Combination Table</text:span></text:p>
      <text:p text:style-name="P18"><text:span text:style-name="T40"/></text:p>
      <text:p text:style-name="P22"><text:tab/></text:p>
      <text:p text:style-name="P23"><text:span text:style-name="T40"><text:tab/></text:span><text:span text:style-name="T48">Παραπάνω αναφέρθηκε οτι θα χρησιμοποιηθούνε τρία τμήματα της BRAM, με </text:span><text:span text:style-name="T39">18 Kbyte χώρου το καθένα. </text:span><text:span text:style-name="T48">Προφανώς όμως δέν αρκούν για να αποθηκεύσουμε 640 x 480 x 3 bits(= 307200 bits x 3 = 115.2KBytes </text:span><text:span text:style-name="T49">(x 3 επειδή θα χρησιμοποιήσουμε 3 χρώματα)</text:span><text:span text:style-name="T48">) </text:span><text:span text:style-name="T49">στη μνήμη. Λόγω απλότητας της υλοποίησης και λόγω έλλειψης εύκολα προσπελάσιμης μνήμης θα αποθηκεύσουμε μόνο 128 x 96 bits (= </text:span><text:span text:style-name="T48">640 x 480 / <text:s/></text:span><text:span text:style-name="T49">5 bits) ανα τμήμα και θα μεγενθύνουμε τεχνητά την εικόνα κρατώντας σταθερή τη διεύθυνση που θα μεταφέρουμε στη VRAM (και οριζόντια και κατακόρυφα), μέχρι να γίνει εγραφή 5 pixel (όταν γίνει εγγραφή 5 pixel οριζόντια θα αλλάξει το “οριζόντιο” κομμάτι της διεύθυνσης, όμοια κατακόρυφα). Λεπτομέρειες της υλοποίησης </text:span><text:span text:style-name="T50">φαίνονται σε </text:span><text:span text:style-name="T49">μονάδες που περιγράφονται π</text:span><text:span text:style-name="T51">α</text:span><text:span text:style-name="T49">ρακάτω. </text:span></text:p>
      <text:p text:style-name="P24"><text:span text:style-name="T40"><text:tab/></text:span><text:span text:style-name="T52">Για την προσπέλασή της χρησιμοποιούμε τρείς μονάδες RAMB18E1, τις οποίες θα ρυθμίσουμε για λόγους απλότητας να επιστρέφουν μία τιμή για κάθε διεύθυνση που τις δίνουμε (θέτωντας τη παράμετρο READ_WIDTH_A ίση με 1). </text:span><text:span text:style-name="T53">Επειδή η μονάδα επιστρέφει 16 bit στη θύρα DOADO, θα αναθέσουμε στην έξοδο της VRAM μόνο τα τελευταίο bit απο τις εξόδους των μονάδων. </text:span><text:span text:style-name="T52">Απο τη στιγμή που δέν θα χρειαστεί να γράψουμε κάτι στη μνήμη, θα αφήσουμε ανοιχτή και στις τρείς μονάδες μόνο τη θύρα Α, και μόνο για ανάγνωση. </text:span><text:span text:style-name="T54">Παρόλο που δεν θα χρειαστεί να χρησιμοποιήσουμε θύρες όπως η DOPADOP (που είναι για parity, εδώ δέν χρειαζόμαστε έλεγχο) και DOBDO (που είναι για την 2η θύρα), θα περάσουμε ενδεικτικές εισόδους για να αποφύγουμε προειδοποιήσεις του vivado.</text:span></text:p>
      <text:p text:style-name="P24"><text:span text:style-name="T54"/></text:p>
      <text:p text:style-name="P24"><text:span text:style-name="T54"/></text:p>
      <text:p text:style-name="P24"><text:span text:style-name="T54"><text:tab/></text:span><text:span text:style-name="T55">Για την επαλήθευση αρκεί να ελέγξουμε αν </text:span><text:span text:style-name="T56">για κάποιες συγκεκριμένες διευθύνσεις, οι τιμές που υιοθετούν οι μεταβλητές εξόδου είναι οι αναμενόμενες. Αρκεί να προσωμοιώσουμε το κύκλωμα σε επίπεδο συμπεριφοράς (πρασδιορίζεται στην εκφώνηση).</text:span></text:p>
      <text:p text:style-name="P24"><text:span text:style-name="T56"/></text:p>
      <text:p text:style-name="P24"><draw:frame draw:style-name="fr3" draw:name="Image1" text:anchor-type="char" svg:width="6.6929in" svg:height="0.9429in" draw:z-index="0"><draw:image xlink:href="Pictures/10000001000002CC00000065CE604BA2.png" xlink:type="simple" xlink:show="embed" xlink:actuate="onLoad" draw:mime-type="image/png"/></draw:frame><text:soft-page-break/><text:span text:style-name="T56"/></text:p>
      <text:p text:style-name="P24"><draw:frame draw:style-name="fr4" draw:name="Image2" text:anchor-type="char" svg:width="3.8846in" svg:height="1.0516in" draw:z-index="1"><draw:image xlink:href="Pictures/1000000100000175000000659890DE35.png" xlink:type="simple" xlink:show="embed" xlink:actuate="onLoad" draw:mime-type="image/png"/></draw:frame><text:span text:style-name="T56"/></text:p>
      <text:p text:style-name="P24"><text:span text:style-name="T56"/></text:p>
      <text:p text:style-name="P24"><text:span text:style-name="T56"/></text:p>
      <text:p text:style-name="P25"><text:span text:style-name="T48"/></text:p>
      <text:p text:style-name="P25"><text:span text:style-name="T48"/></text:p>
      <text:p text:style-name="P25"><text:span text:style-name="T48"/></text:p>
      <text:p text:style-name="P25"><draw:frame draw:style-name="fr5" draw:name="Image3" text:anchor-type="char" svg:y="0.0752in" svg:width="3.8846in" svg:height="1.0516in" draw:z-index="2"><draw:image xlink:href="Pictures/100000010000017500000065AEB9CFB7.png" xlink:type="simple" xlink:show="embed" xlink:actuate="onLoad" draw:mime-type="image/png"/></draw:frame><text:span text:style-name="T48"/></text:p>
      <text:p text:style-name="P25"><text:span text:style-name="T48"/></text:p>
      <text:p text:style-name="P25"><text:span text:style-name="T48"/></text:p>
      <text:p text:style-name="P25"><text:span text:style-name="T48"/></text:p>
      <text:p text:style-name="P25"><text:span text:style-name="T48"/></text:p>
      <text:p text:style-name="P25"><text:span text:style-name="T48"/></text:p>
      <text:p text:style-name="P25"><text:span text:style-name="T48"/></text:p>
      <text:p text:style-name="P25"><draw:frame draw:style-name="fr2" draw:name="Image4" text:anchor-type="char" svg:width="3.8846in" svg:height="1.0516in" draw:z-index="3"><draw:image xlink:href="Pictures/1000000100000175000000657CBE1D37.png" xlink:type="simple" xlink:show="embed" xlink:actuate="onLoad" draw:mime-type="image/png"/></draw:frame><text:span text:style-name="T48"/></text:p>
      <text:p text:style-name="P25"><text:span text:style-name="T48"/></text:p>
      <text:p text:style-name="P25"><text:span text:style-name="T48"/></text:p>
      <text:p text:style-name="P25"><text:span text:style-name="T48"/></text:p>
      <text:p text:style-name="P25"><text:span text:style-name="T48"/></text:p>
      <text:p text:style-name="P25"><text:span text:style-name="T48"/></text:p>
      <text:p text:style-name="P25"><text:span text:style-name="T48"/></text:p>
      <text:p text:style-name="P26"><text:span text:style-name="T46">PartA </text:span><text:span text:style-name="T57">Behavioural Simulation for Different Adresses</text:span></text:p>
      <text:p text:style-name="P25"><text:span text:style-name="T48"/></text:p>
      <text:p text:style-name="P27">Οι παραπάνω κυμματομορφές εμφανίζονται για τις εξείς αρχικές διευθύνσεις:</text:p>
      <text:list text:style-name="L4">
        <text:list-item>
          <text:p text:style-name="P28"><text:span text:style-name="T48">Η μονάδα που αποθηκεύει πληροφορίες για το </text:span><text:span text:style-name="T58">κ</text:span><text:span text:style-name="T48">όκκινο χρώμα έχει </text:span><text:span text:style-name="T58">DC290FDE </text:span><text:span text:style-name="T59">στις αρχικές της διευθύνσεις.</text:span></text:p>
        </text:list-item>
        <text:list-item>
          <text:p text:style-name="P29"><text:span text:style-name="T59">Η μονάδα που αποθηκεύει πληροφορίες για το </text:span><text:span text:style-name="T60">π</text:span><text:span text:style-name="T61">ράσινο</text:span><text:span text:style-name="T59"> χρώμα έχει </text:span><text:span text:style-name="T62">E4570FDB</text:span><text:span text:style-name="T63"> </text:span><text:span text:style-name="T59">στις αρχικές της διευθύνσεις.</text:span></text:p>
        </text:list-item>
        <text:list-item>
          <text:p text:style-name="P29"><text:span text:style-name="T59">Η μονάδα που αποθηκεύει πληροφορίες για το </text:span><text:span text:style-name="T64">μ</text:span><text:span text:style-name="T61">πλέ</text:span><text:span text:style-name="T59"> χρώμα έχει </text:span><text:span text:style-name="T65">BA950DFD</text:span><text:span text:style-name="T63"> </text:span><text:span text:style-name="T59">στις αρχικές της διευθύνσεις.</text:span></text:p>
        </text:list-item>
      </text:list>
      <text:list text:style-name="L5">
        <text:list-header>
          <text:p text:style-name="P30"><text:span text:style-name="T1"/></text:p>
        </text:list-header>
      </text:list>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list text:style-name="L6">
        <text:list-item>
          <text:p text:style-name="P31"><text:soft-page-break/>Μέρος <text:span text:style-name="T66">2</text:span>ο: Υλοποίηση <text:span text:style-name="T67">HSYNC και Οριζόντιου Μετρητή Pixel</text:span></text:p>
        </text:list-item>
      </text:list>
      <text:p text:style-name="P32"><text:span text:style-name="T1"/></text:p>
      <text:p text:style-name="P32"><text:span text:style-name="T68"><text:tab/>Όπως αναφέρθηκε και </text:span><text:span text:style-name="T69">στην εισαγωγή</text:span><text:span text:style-name="T68">, </text:span><text:span text:style-name="T70">τα σήματα HSYNC και VSYNC είναι υπεύθυνα για τον κατακόρυφο και κάθετο χρονισμό αντίστοιχα. </text:span><text:span text:style-name="T71">Θα χρειαστούμε δηλαδή δύο μονάδες που θα ελέγχουν το σωστό χρονισμό των παραπάνω σημάτων.</text:span></text:p>
      <text:p text:style-name="P33"><text:span text:style-name="T71"><text:tab/></text:span><text:span text:style-name="T72">Παρακάτω φαίνεται ένα διάγραμμα ροής της μονάδας. </text:span><text:span text:style-name="T73">Οι έξοδοι περιλαμβάνουν το σήμα συγχρονισμού της οθόνης HSYNC, ένα σήμα RGB που σηματοδοτεί πότε η οθόνη είναι ενεργή, έναν μετρητή HPIXEL που σηματοδοτεί σε ποιό σημείο της VRAM πρέπει να κοιτάξουμε για να προβάλλουμε σωστά το επόμενο pixel, και ένα σήμα pixel_ok που θα επιτρέψει στη μονάδα VSYNC να έχει μία παρόμοια λειτουργία VPIXEL.</text:span></text:p>
      <text:p text:style-name="P33"><text:span text:style-name="T73"/></text:p>
      <text:p text:style-name="P33"><draw:frame draw:style-name="fr6" draw:name="Image7" text:anchor-type="char" svg:width="6.6929in" svg:height="2.589in" draw:z-index="6"><draw:image xlink:href="Pictures/10000001000003F8000001893DE7F98E.png" xlink:type="simple" xlink:show="embed" xlink:actuate="onLoad" draw:mime-type="image/png"/></draw:frame><text:span text:style-name="T73"><text:tab/> </text:span></text:p>
      <text:p text:style-name="P34"><text:span text:style-name="T74">P</text:span><text:span text:style-name="T75">astB </text:span><text:span text:style-name="T76">Dataf</text:span><text:span text:style-name="T75">low Diagramm</text:span></text:p>
      <text:p text:style-name="P35"><text:span text:style-name="T71"/></text:p>
      <text:p text:style-name="P35"><text:span text:style-name="T71"><text:tab/></text:span><text:span text:style-name="T77">Στον παρακάτω πίνακα φαίνονται </text:span><text:span text:style-name="T78">οι τιμές των διαστημάτων, καθώς και οι κύριοι έξοδοι της μονάδας HSYNC για κάθε διάστημα. Ακολουθείται απο ένα σχήμα το οποίο δείχνει γραφικά αυτά τα διαστήματα. Η έξοδος RGB σηματοδοτεί πότε θα πρέπει να είναι ανοιχτή η οθόνη (θα είναι κλειστή όταν παίρνει τη τιμή 0). Η έξοδος HSYNC προφανώς χρειάζεται για τον σωστό συγχρονισμό με την οθόνη, και έχει ενεργό 0. Προφανώς οι τιμές που παρουσιάζονται</text:span></text:p>
      <text:p text:style-name="P36">προυποθέτουν μια οθόνη VGA με ανάλυση 640 x 480 και ρυθμό ανανέωσης 60Hz.</text:p>
      <text:p text:style-name="P37"><text:span text:style-name="T78"/></text:p>
      <text:p text:style-name="P38"><text:span text:style-name="T78"/></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9">Διάστημα</text:p>
          </table:table-cell>
          <table:table-cell table:style-name="Table2.A1" office:value-type="string">
            <text:p text:style-name="P39">Περιγραφή</text:p>
          </table:table-cell>
          <table:table-cell table:style-name="Table2.A1" office:value-type="string">
            <text:p text:style-name="P39">HSYNC</text:p>
          </table:table-cell>
          <table:table-cell table:style-name="Table2.A1" office:value-type="string">
            <text:p text:style-name="P39">RGB</text:p>
          </table:table-cell>
          <table:table-cell table:style-name="Table2.E1" office:value-type="string">
            <text:p text:style-name="P39">Χρόνος</text:p>
          </table:table-cell>
        </table:table-row>
        <table:table-row>
          <table:table-cell table:style-name="Table2.A2" office:value-type="string">
            <text:p text:style-name="P40">A</text:p>
          </table:table-cell>
          <table:table-cell table:style-name="Table2.A2" office:value-type="string">
            <text:p text:style-name="P40">Scanline Time</text:p>
          </table:table-cell>
          <table:table-cell table:style-name="Table2.A2" office:value-type="string">
            <text:p text:style-name="P41">-</text:p>
          </table:table-cell>
          <table:table-cell table:style-name="Table2.A2" office:value-type="string">
            <text:p text:style-name="P41">-</text:p>
          </table:table-cell>
          <table:table-cell table:style-name="Table2.E2" office:value-type="string">
            <text:p text:style-name="P40">32μsec</text:p>
          </table:table-cell>
        </table:table-row>
        <table:table-row>
          <table:table-cell table:style-name="Table2.A2" office:value-type="string">
            <text:p text:style-name="P40">B</text:p>
          </table:table-cell>
          <table:table-cell table:style-name="Table2.A2" office:value-type="string">
            <text:p text:style-name="P40">HSYNC Pulse Width</text:p>
          </table:table-cell>
          <table:table-cell table:style-name="Table2.A2" office:value-type="string">
            <text:p text:style-name="P40">0</text:p>
          </table:table-cell>
          <table:table-cell table:style-name="Table2.A2" office:value-type="string">
            <text:p text:style-name="P40">0</text:p>
          </table:table-cell>
          <table:table-cell table:style-name="Table2.E2" office:value-type="string">
            <text:p text:style-name="P40">3.84μsec</text:p>
          </table:table-cell>
        </table:table-row>
        <table:table-row>
          <table:table-cell table:style-name="Table2.A2" office:value-type="string">
            <text:p text:style-name="P40">C</text:p>
          </table:table-cell>
          <table:table-cell table:style-name="Table2.A2" office:value-type="string">
            <text:p text:style-name="P40">Back Porch</text:p>
          </table:table-cell>
          <table:table-cell table:style-name="Table2.A2" office:value-type="string">
            <text:p text:style-name="P40">1</text:p>
          </table:table-cell>
          <table:table-cell table:style-name="Table2.A2" office:value-type="string">
            <text:p text:style-name="P40">0</text:p>
          </table:table-cell>
          <table:table-cell table:style-name="Table2.E2" office:value-type="string">
            <text:p text:style-name="P40">1.92μsec</text:p>
          </table:table-cell>
        </table:table-row>
        <table:table-row>
          <table:table-cell table:style-name="Table2.A2" office:value-type="string">
            <text:p text:style-name="P40">D</text:p>
          </table:table-cell>
          <table:table-cell table:style-name="Table2.A2" office:value-type="string">
            <text:p text:style-name="P40">Display Time</text:p>
          </table:table-cell>
          <table:table-cell table:style-name="Table2.A2" office:value-type="string">
            <text:p text:style-name="P40">1</text:p>
          </table:table-cell>
          <table:table-cell table:style-name="Table2.A2" office:value-type="string">
            <text:p text:style-name="P40">1</text:p>
          </table:table-cell>
          <table:table-cell table:style-name="Table2.E2" office:value-type="string">
            <text:p text:style-name="P40">25.6μsec</text:p>
          </table:table-cell>
        </table:table-row>
        <table:table-row>
          <table:table-cell table:style-name="Table2.A2" office:value-type="string">
            <text:p text:style-name="P40">E</text:p>
          </table:table-cell>
          <table:table-cell table:style-name="Table2.A2" office:value-type="string">
            <text:p text:style-name="P40">Front Porch</text:p>
          </table:table-cell>
          <table:table-cell table:style-name="Table2.A2" office:value-type="string">
            <text:p text:style-name="P40">1</text:p>
          </table:table-cell>
          <table:table-cell table:style-name="Table2.A2" office:value-type="string">
            <text:p text:style-name="P40">0</text:p>
          </table:table-cell>
          <table:table-cell table:style-name="Table2.E2" office:value-type="string">
            <text:p text:style-name="P40">0.640μsec</text:p>
          </table:table-cell>
        </table:table-row>
      </table:table>
      <text:p text:style-name="P42"><text:s/></text:p>
      <text:p text:style-name="P43"><text:span text:style-name="T79">P</text:span><text:span text:style-name="T75">art B Timings for Each State</text:span></text:p>
      <text:p text:style-name="P32"><text:span text:style-name="T78"/></text:p>
      <text:p text:style-name="P32"><text:span text:style-name="T78"/></text:p>
      <text:p text:style-name="P32"><draw:frame draw:style-name="fr7" draw:name="Image5" text:anchor-type="char" svg:width="5.5409in" svg:height="1.6772in" draw:z-index="4"><draw:image xlink:href="Pictures/1000000100000214000000A1369332A9.png" xlink:type="simple" xlink:show="embed" xlink:actuate="onLoad" draw:mime-type="image/png"/></draw:frame><text:soft-page-break/><text:span text:style-name="T78"/></text:p>
      <text:p text:style-name="P44"><text:span text:style-name="T79">P</text:span><text:span text:style-name="T75">art B </text:span><text:span text:style-name="T25">Horizontal VGA Synchronisation</text:span></text:p>
      <text:p text:style-name="P44"><text:span text:style-name="T25"/></text:p>
      <text:p text:style-name="P45"><text:span text:style-name="T25"><text:tab/></text:span><text:span text:style-name="T80">Ό</text:span><text:span text:style-name="T81">πως φαίνεται και παραπάνω, το σύστημα </text:span><text:span text:style-name="T82">μπορεί να εκφραστεί με τη χρήση τεσσάρων καταστάσεων, οι οποίες εναλλάσονται ανάλογα με τον χρόνο. Μπορούμε δηλαδή να χρησιμοποιήσουμε μια μηχανή πεπερασμένων καταστάσεων (FSM) για τη σωστή οδήγηση των εξόδων. Παρακάτω φαίν</text:span><text:span text:style-name="T83">oνται πληροφορίες σχετικά με το κάθε state, καθώς και</text:span><text:span text:style-name="T82"> ένα διάγραμμα που περιέχει τη δομή της FSM: </text:span></text:p>
      <text:p text:style-name="P45"><text:span text:style-name="T82"/></text:p>
      <text:list xml:id="list1009839723" text:style-name="L7">
        <text:list-item>
          <text:p text:style-name="P46"><text:span text:style-name="T84">O</text:span><text:span text:style-name="T85">FF</text:span><text:span text:style-name="T1">(000): Το state στο οποίο η μηχανή επαναφέρεται μετά το πάτημα του κουμπιού reset. Υπάρχει με σκοπό να αποφευχθεί η επιμύκηνση του σήματος HSYNC μετά το πάτημα του reset, που θα γινόταν αν επαναφερόμασταν στο PULSE. Κατα τη κανονική λειτουργία του δεν θα επαναφέρεται σε αυτό το state, και θα προχωράει όταν το reset ξαναμηδενιστεί</text:span></text:p>
        </text:list-item>
        <text:list-item>
          <text:p text:style-name="P46"><text:span text:style-name="T85">PULSE</text:span><text:span text:style-name="T1">(001): Σε αυτό το state θα δημιουργήσουμε τον παλμό HSYNC για να χρονίσουμε την </text:span><text:span text:style-name="T86">οριζόντια</text:span><text:span text:style-name="T1"> συντεταγμένη στην οθόνη. </text:span><text:span text:style-name="T87">Κατα τη διάρκεια του παλμού η οθόνη θα είναι κλειστή. </text:span><text:span text:style-name="T88">Θα μεταβούμε στο BACK PORCH state </text:span><text:span text:style-name="T87">όταν ο μετρητής timeCount γίνει ίσος με PULSE WIDTH TIME</text:span></text:p>
        </text:list-item>
        <text:list-item>
          <text:p text:style-name="P47"><text:span text:style-name="T89">B</text:span><text:span text:style-name="T85">ACK_PORCH</text:span><text:span text:style-name="T1">(010): </text:span><text:span text:style-name="T90">Η</text:span><text:span text:style-name="T91"> οθόνη θα είναι απενεργοποιημένη </text:span><text:span text:style-name="T90">για ένα χρονικό διάστημα μετά τον παλμό</text:span><text:span text:style-name="T91">. </text:span><text:span text:style-name="T92">Θα </text:span><text:span text:style-name="T93">μεταβούμε στο DISPLAY state </text:span><text:span text:style-name="T91">όταν </text:span><text:span text:style-name="T87">ο μετρητής timeCount γίνει ίσος με PULSE WIDTH TIME </text:span><text:span text:style-name="T91">+ BACH PORCH TIME.</text:span></text:p>
        </text:list-item>
        <text:list-item>
          <text:p text:style-name="P48"><text:span text:style-name="T94">D</text:span><text:span text:style-name="T85">ISPLAY</text:span><text:span text:style-name="T92">(011): Στο state αυτό η οθόνη θα είναι ενεργοποιημένη και θα γράφουμε πάνω της. Θα ενεργοποιηθεί και μια έξοδος display_i για να σηματοδοτήσει στον μετρητή HPIXEL ότι η εγγραφή είναι ενεργή (λεπτομμέρειες για την υλοποίησή του παρακάτω). Θα </text:span><text:span text:style-name="T95">μεταβούμε στο FRONT PORCH </text:span><text:span text:style-name="T91">state όταν </text:span><text:span text:style-name="T87">ο μετρητής timeCount γίνει ίσος με PULSE WIDTH TIME </text:span><text:span text:style-name="T91">+ BACH PORCH TIME </text:span><text:span text:style-name="T96">+ DISPLAY TIME</text:span><text:span text:style-name="T91">.</text:span></text:p>
        </text:list-item>
        <text:list-item>
          <text:p text:style-name="P49"><text:span text:style-name="T94">F</text:span><text:span text:style-name="T85">RONT_PORCH</text:span><text:span text:style-name="T1">(100): Όμοια με τ</text:span><text:span text:style-name="T97">ο BACK PORCH, η οθόνη θα παραμείνει κλειστή πρίν τον επόμενο παλμό HSYNC. Θα ξαναγυρίσουμε στο PULSE όταν </text:span><text:span text:style-name="T87">ο μετρητής timeCount γίνει ίσος με </text:span><text:span text:style-name="T97">SCANLINE TIME (ισοδύναμο με </text:span><text:span text:style-name="T87">PULSE WIDTH TIME </text:span><text:span text:style-name="T91">+ BACH PORCH TIME </text:span><text:span text:style-name="T96">+ DISPLAY TIME </text:span><text:span text:style-name="T97">+ FRONT PORCH TIME)</text:span><text:span text:style-name="T91">. </text:span></text:p>
        </text:list-item>
      </text:list>
      <text:p text:style-name="P45"><draw:frame draw:style-name="fr1" draw:name="Image6" text:anchor-type="char" svg:x="0.5327in" svg:y="-0.1874in" svg:width="5.628in" svg:height="9.8102in" draw:z-index="5"><draw:image xlink:href="Pictures/100000010000029A00000489065AFA3D.png" xlink:type="simple" xlink:show="embed" xlink:actuate="onLoad" draw:mime-type="image/png"/></draw:frame><text:soft-page-break/><text:span text:style-name="T82"/></text:p>
      <text:p text:style-name="P50"><text:span text:style-name="T98">P</text:span><text:span text:style-name="T75">artB FSM Diagramm</text:span></text:p>
      <text:p text:style-name="P51"><text:soft-page-break/><text:span text:style-name="T82"><text:tab/></text:span></text:p>
      <text:p text:style-name="P51"><text:span text:style-name="T82"/></text:p>
      <text:p text:style-name="P51"><text:span text:style-name="T82"/></text:p>
      <text:p text:style-name="P51"><text:span text:style-name="T82"><text:tab/>Η FSM είναι τύπου moore και υλοποιήθηκε με τη χρήση 2 always block, ενός συνδιαστικού που θα είναι υπεύθυνο για τις εξόδους της (προφανώς αυτό περιλαμβάνει και την ανάθεση του επόμενου state), και ενός ακολουθιακού, που αναθέτει συνεχώς στο state το επόμενο state (που αναφέρθηκε προηγουμένως). </text:span><text:span text:style-name="T99">Οι παραπάνω επιλογές αρκούν για την οδήγηση των εξόδων σε σωστούς χρόνους, άρα και τη σωστή απεικόνιση της εικόνας στην οθόνη.</text:span></text:p>
      <text:p text:style-name="P45"><text:span text:style-name="T99"><text:tab/></text:span><text:span text:style-name="T100">Για την εναλλαγή των state θα υλοποιήσουμε έναν απλό μετρητή κύκλων ρολογιού. Αυτός θα αποτελεί είσοδο στην FSM, και θα σηματοδοτεί την αλλαγή state όταν γίνει ίσος με προκαθορισμένες τιμές που έχουν οριστεί με τη χρήση parameter. Όταν ο μετρητής μεγιστοποιηθεί (όταν δηλαδή περάσει το κομμάτι του χρόνου που καθορίζεται απο το scanline time), ο μετρητής γίνεται ίσος με ένα. </text:span></text:p>
      <text:p text:style-name="P52"><text:tab/>Το σήμα pixel_ok εξαρτάται επίσης απο τον μετρητή και σηματοδοτεί στο VSYNC μια πλήρη ανάγνωση γραμμής. Δηλαδή όταν ο μετρητής γίνει ίσος με το scanline time, τότε το σήμα θα γίνει ίσο με ένα για έναν κύκλο.</text:p>
      <text:p text:style-name="P45"><text:span text:style-name="T100"><text:tab/></text:span><text:span text:style-name="T101">Θα χρειαστούμε ένα ακόμα ακολουθιακό always block για να υλοποιήσουμε τον μετρητή HPIXEL. Για να “αποσυμπιέσουμε” την εικόνα (πρέπει να γίνει display με ανάλυση 640 x 480, ενώ στην μνήμη είναι αποθηκευμένη με ανάλυση 128 x 96), θα μετρήσουμε την εγγραφή 5 pixel στην οθόνη πρίν αλλάξουμε την τιμή του HPIXEL κατα 1, δηλαδή θα αυξάνεται κάθε 20 κύκλους ρολογιού. Αυτή η αύξηση θα γίνεται μόνο όταν βρισκόμαστε στο display state (όταν το σήμα display_i είναι ίσο με 1), απο το οποίο όταν φεύγουμε, ο μετρητής θα μηδενίζεται. </text:span></text:p>
      <text:p text:style-name="P52"><text:tab/></text:p>
      <text:p text:style-name="P12"><text:span text:style-name="T1"><text:tab/></text:span><text:span text:style-name="T102">Για να επαληθεύσουμε τη σωστή λειτουργία της μονάδας, θα πρέπει να ελέγξουμε οτι οι χρόνοι μεταξύ κάθε κατάστασης της FSM είναι σωστοί, ή τουλάχιστον δεν έχουν απόκλιση απο τους επιθυμιτούς χρόνους παραπάνω απο 2nsec. Παρακάτω φαίνονται screenshots απο </text:span><text:span text:style-name="T103">post-implementation timing simulation στα οποία μετριούνται οι χρόνοι για κάθε state, καθώς και ένας πίνακας που περιέχει τους πραγματικούς χρόνους σε σύγκριση με τους αναμενόμενους. </text:span><text:span text:style-name="T104">Θα παρατηρήσουμε πως τa σφάλμα</text:span><text:span text:style-name="T105">τ</text:span><text:span text:style-name="T106">α</text:span><text:span text:style-name="T104"> μεταξύ του αναμενόμενου και του πραγματικού χρόνου μεταξύ κάθε state βρίσκ</text:span><text:span text:style-name="T106">ον</text:span><text:span text:style-name="T104">ται εντός του ορίου ανοχής </text:span><text:span text:style-name="T107">των 2nsec</text:span><text:span text:style-name="T104">.</text:span></text:p>
      <text:p text:style-name="P53"/>
      <text:p text:style-name="P53"><draw:frame draw:style-name="fr1" draw:name="Image10" text:anchor-type="char" svg:x="0in" svg:y="0.0811in" svg:width="6.6929in" svg:height="1.8083in" draw:z-index="9"><draw:image xlink:href="Pictures/1000000100000378000000F0EE192E93.png" xlink:type="simple" xlink:show="embed" xlink:actuate="onLoad" draw:mime-type="image/png"/></draw:frame></text:p>
      <text:p text:style-name="P53">PartB Post-Implementation Timing Simulation, Pulse State Timings</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12"><draw:frame draw:style-name="fr7" draw:name="Image9" text:anchor-type="char" svg:width="4.9146in" svg:height="1.6799in" draw:z-index="8"><draw:image xlink:href="Pictures/10000001000002BE000000F06AD83E7F.png" xlink:type="simple" xlink:show="embed" xlink:actuate="onLoad" draw:mime-type="image/png"/></draw:frame><text:soft-page-break/><text:span text:style-name="T103"/></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4"><text:span text:style-name="T108"/></text:p>
      <text:p text:style-name="P53">PartB Post-Implementation Timing Simulation, Back Porch State Timings</text:p>
      <text:p text:style-name="P55"><text:span text:style-name="T108"/></text:p>
      <text:p text:style-name="P55"><draw:frame draw:style-name="fr1" draw:name="Image8" text:anchor-type="char" svg:x="0in" svg:y="0.1146in" svg:width="6.6929in" svg:height="1.6366in" draw:z-index="7"><draw:image xlink:href="Pictures/10000001000003D5000000F00A53EAB5.png" xlink:type="simple" xlink:show="embed" xlink:actuate="onLoad" draw:mime-type="image/png"/></draw:frame><text:span text:style-name="T108"/></text:p>
      <text:p text:style-name="P55"><text:span text:style-name="T108">PartB Post-Implementation Timing Simulation, </text:span><text:span text:style-name="T109">Display</text:span><text:span text:style-name="T108"> State Timings</text:span></text:p>
      <text:p text:style-name="P6"><text:span text:style-name="T1"/></text:p>
      <text:p text:style-name="P6"><draw:frame draw:style-name="fr7" draw:name="Image11" text:anchor-type="char" svg:width="3.828in" svg:height="1.6346in" draw:z-index="10"><draw:image xlink:href="Pictures/1000000100000232000000F00530381C.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56"><text:span text:style-name="T108">PartB Post-Implementation Timing Simulation, </text:span><text:span text:style-name="T110">Front</text:span><text:span text:style-name="T108"> Porch State Timings</text:span></text:p>
      <text:p text:style-name="P56"><text:span text:style-name="T108"/></text:p>
      <text:p text:style-name="P56"><text:span text:style-name="T108"/></text:p>
      <text:p text:style-name="P56"><text:span text:style-name="T108"/></text:p>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57">Περιγραφή</text:p>
          </table:table-cell>
          <table:table-cell table:style-name="Table3.A1" office:value-type="string">
            <text:p text:style-name="P57">Αναμενόμενος Χρόνος</text:p>
          </table:table-cell>
          <table:table-cell table:style-name="Table3.A1" office:value-type="string">
            <text:p text:style-name="P57">Πραγματικός Χρόνος</text:p>
          </table:table-cell>
          <table:table-cell table:style-name="Table3.D1" office:value-type="string">
            <text:p text:style-name="P58">Διαφορά</text:p>
          </table:table-cell>
        </table:table-row>
        <table:table-row>
          <table:table-cell table:style-name="Table3.A2" office:value-type="string">
            <text:p text:style-name="P59">HSYNC Pulse Width</text:p>
          </table:table-cell>
          <table:table-cell table:style-name="Table3.A2" office:value-type="string">
            <text:p text:style-name="P60">3.84μsec</text:p>
          </table:table-cell>
          <table:table-cell table:style-name="Table3.A2" office:value-type="string">
            <text:p text:style-name="P61">3.840022<text:span text:style-name="T111">μsec</text:span></text:p>
          </table:table-cell>
          <table:table-cell table:style-name="Table3.D2" office:value-type="string">
            <text:p text:style-name="P62">0.022nsec</text:p>
          </table:table-cell>
        </table:table-row>
        <table:table-row>
          <table:table-cell table:style-name="Table3.A2" office:value-type="string">
            <text:p text:style-name="P59">Back Porch</text:p>
          </table:table-cell>
          <table:table-cell table:style-name="Table3.A2" office:value-type="string">
            <text:p text:style-name="P63">1.92μsec</text:p>
          </table:table-cell>
          <table:table-cell table:style-name="Table3.A2" office:value-type="string">
            <text:p text:style-name="P64"><text:bookmark-start text:name="__DdeLink__2872_2673514989"/>1.919212μsec<text:bookmark-end text:name="__DdeLink__2872_2673514989"/></text:p>
          </table:table-cell>
          <table:table-cell table:style-name="Table3.D2" office:value-type="string">
            <text:p text:style-name="P62">0.788nsec</text:p>
          </table:table-cell>
        </table:table-row>
        <table:table-row>
          <table:table-cell table:style-name="Table3.A2" office:value-type="string">
            <text:p text:style-name="P57">Display Time</text:p>
          </table:table-cell>
          <table:table-cell table:style-name="Table3.A2" office:value-type="string">
            <text:p text:style-name="P65">25.6μsec</text:p>
          </table:table-cell>
          <table:table-cell table:style-name="Table3.A2" office:value-type="string">
            <text:p text:style-name="P66">25.6μsec</text:p>
          </table:table-cell>
          <table:table-cell table:style-name="Table3.D2" office:value-type="string">
            <text:p text:style-name="P67">0<text:span text:style-name="T112">nsec</text:span></text:p>
          </table:table-cell>
        </table:table-row>
        <table:table-row>
          <table:table-cell table:style-name="Table3.A2" office:value-type="string">
            <text:p text:style-name="P59"><text:span text:style-name="T113">Front</text:span> Porch</text:p>
          </table:table-cell>
          <table:table-cell table:style-name="Table3.A2" office:value-type="string">
            <text:p text:style-name="P63">0.64μsec</text:p>
          </table:table-cell>
          <table:table-cell table:style-name="Table3.A2" office:value-type="string">
            <text:p text:style-name="P58">0.640766μsec</text:p>
          </table:table-cell>
          <table:table-cell table:style-name="Table3.D2" office:value-type="string">
            <text:p text:style-name="P62">0.766nsec</text:p>
          </table:table-cell>
        </table:table-row>
      </table:table>
      <text:p text:style-name="P56"><text:span text:style-name="T108"/></text:p>
      <text:p text:style-name="P68"><text:span text:style-name="T108">PartB Post-Implementation Timing Simulation, </text:span><text:span text:style-name="T114">Differences Between Expected and Real Times</text:span></text:p>
      <text:p text:style-name="P68"><text:span text:style-name="T114"/></text:p>
      <text:p text:style-name="P69"><text:tab/></text:p>
      <text:p text:style-name="P70"><text:tab/></text:p>
      <text:p text:style-name="P71"><text:span text:style-name="T114"/></text:p>
      <text:p text:style-name="P71"><text:soft-page-break/><text:span text:style-name="T114"><text:tab/></text:span><text:span text:style-name="T115">Για την δοκιμή του μετρητή HPIXEL, αρκεί να επιβεβαιώσουμε οτι όντως αυξάνεται μόνο όσο είμαστε στο display state και μηδενίζεται εκτός του, κάτι που φαίνεται και απο τα παραπάνω στιγμιότυπα, και οτι μεγιστοποιείται με τιμή 127 (128 pixel αποθηκευμένα οριζόντια, και ο μετρητής αρχίζει απο το 0). Αυτό φαίνεται στο στιγμιότυπο παρακάτω:</text:span></text:p>
      <text:p text:style-name="P72"><text:span text:style-name="T115"/></text:p>
      <text:p text:style-name="P72"><draw:frame draw:style-name="fr1" draw:name="Image12" text:anchor-type="char" svg:x="0in" svg:y="0.0772in" svg:width="6.6929in" svg:height="1.6311in" draw:z-index="11"><draw:image xlink:href="Pictures/10000001000002B5000000A990B11B11.png" xlink:type="simple" xlink:show="embed" xlink:actuate="onLoad" draw:mime-type="image/png"/></draw:frame><text:span text:style-name="T115"/></text:p>
      <text:p text:style-name="P73"><text:span text:style-name="T75">PartB Post-Implementation Timing Simulation, </text:span><text:span text:style-name="T116">HPIXEL Max Value</text:span></text:p>
      <text:p text:style-name="P73"><text:span text:style-name="T116"/></text:p>
      <text:p text:style-name="P74"><text:tab/></text:p>
      <text:p text:style-name="P75"><text:span text:style-name="T116"><text:tab/></text:span><text:span text:style-name="T117">Αξίζει να σημειωθεί οτι παραπάνω φαίνεται και η σωστή λειτουργία του pixel_ok, καθώς ανεβαίνει για έναν κύκλο μετά το BACK PORCH, όπως περιμέναμε. Το testbench δεν περιγράφεται αναλυτικά, καθώς απλώς οδηγεί συνεχώς το ρολόι και στην αρχή το reset στέλνοντας έναν μικρό παλμό. Προειδοποιήσεις του vivado αφορούσαν παράλληλη σύνθεση και virtual grid που μπορούμε να αγνοήσουμε, και προειδοποιήσεις σχετικά με τα constraints που δέν μας αφοράν σε αυτό το στάδιο.</text:span></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p text:style-name="P75"><text:span text:style-name="T117"/></text:p>
      <text:list text:style-name="L8">
        <text:list-item>
          <text:p text:style-name="P76"><text:soft-page-break/>Μέρος <text:span text:style-name="T118">3</text:span>ο: Υλοποίηση <text:span text:style-name="T119">V</text:span><text:span text:style-name="T67">SYNC και </text:span><text:span text:style-name="T119">Κατακόρυφου</text:span><text:span text:style-name="T67"> Μετρητή Pixel - </text:span></text:p>
          <text:p text:style-name="P77">Ολοκλήρωση του Ελεγκτή/Οδηγού VGA.</text:p>
        </text:list-item>
      </text:list>
      <text:p text:style-name="P75"><text:span text:style-name="T117"/></text:p>
      <text:p text:style-name="P75"><text:span text:style-name="T117"/></text:p>
      <text:p text:style-name="P75"><text:span text:style-name="T117"/></text:p>
      <text:p text:style-name="P78"><text:span text:style-name="T117"><text:tab/></text:span><text:span text:style-name="T120">Σε αυτό το κομμάτι θα υλοποιήσουμε τη μονάδα VSYNC, που θα ελέγχει τα αντίστοιχα σήματα χρονισμού και έναν μετρητή VPIXEL, που σηματοδοτεί πόσα pixel έχουμε γράψει κάθετα, η πόσες γραμμές απο pixel έχουμε γράψει στην οθόνη (λαμβάνωντας φυσκιά υπόψη πως τα δεδομένα αποθηκευμένα στη μνήμη είναι συμπιεσμένα), καθώς και μια μονάδα που θα συνδέει τα σήματα HSYNC και VSYNC </text:span><text:span text:style-name="T121">με την έξοδο που δρομολογείται στην οθόνη, και που θα χρησιμοποιεί τα HPIXEL VPIXEL και τα RGB σήματα για να εξάγει και να δρομολογήσει τα σωστά δεδομένα απο τη μνήμη προς την έξοδο. Παρακάτω φαίνεται ένα ολικό διάγραμμα ροής του κυκλώματος όπως περιγράφηκε:</text:span></text:p>
      <text:p text:style-name="P78"><text:span text:style-name="T121"/></text:p>
      <text:p text:style-name="P78"><draw:frame draw:style-name="fr6" draw:name="Image13" text:anchor-type="char" svg:width="6.6929in" svg:height="2.7626in" draw:z-index="12"><draw:image xlink:href="Pictures/1000000100000C680000051F6ED865D5.png" xlink:type="simple" xlink:show="embed" xlink:actuate="onLoad" draw:mime-type="image/png"/></draw:frame><text:span text:style-name="T121"/></text:p>
      <text:p text:style-name="P79"><text:span text:style-name="T117">P</text:span><text:span text:style-name="T75">art C Flow Diagramm</text:span></text:p>
      <text:p text:style-name="P78"><text:span text:style-name="T117"/></text:p>
      <text:p text:style-name="P78"><text:span text:style-name="T117"><text:tab/></text:span><text:span text:style-name="T122">H μονάδα VSYNC είναι όμοια με την μονάδα HSYNC που περιγράφηκε παραπάνω, οπότε εδώ θα δωθεί έμφαση σε σημεία στα οποία οι δύο μονάδες διαφέρουν</text:span></text:p>
      <text:p text:style-name="P80"><text:span text:style-name="T117"><text:tab/></text:span><text:span text:style-name="T123">Στον παρακάτω πίνακα φαίνονται </text:span><text:span text:style-name="T79">οι τιμές των διαστημάτων, καθώς και οι κύριοι έξοδοι της μονάδας </text:span><text:span text:style-name="T122">V</text:span><text:span text:style-name="T79">SYNC για κάθε διάστημα </text:span><text:span text:style-name="T122">(οι οποίες λειτουργούν όμοια με αυτές της μονάδας HSYNC)</text:span><text:span text:style-name="T79">. Ακολουθείται απο ένα σχήμα το οποίο δείχνει γραφικά αυτά τα διαστήματα. </text:span></text:p>
      <text:p text:style-name="P80"><text:span text:style-name="T79"/></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81">Διάστημα</text:p>
          </table:table-cell>
          <table:table-cell table:style-name="Table4.A1" office:value-type="string">
            <text:p text:style-name="P81">Περιγραφή</text:p>
          </table:table-cell>
          <table:table-cell table:style-name="Table4.A1" office:value-type="string">
            <text:p text:style-name="P81">HSYNC</text:p>
          </table:table-cell>
          <table:table-cell table:style-name="Table4.A1" office:value-type="string">
            <text:p text:style-name="P81">RGB</text:p>
          </table:table-cell>
          <table:table-cell table:style-name="Table4.E1" office:value-type="string">
            <text:p text:style-name="P81">Χρόνος</text:p>
          </table:table-cell>
        </table:table-row>
        <table:table-row>
          <table:table-cell table:style-name="Table4.A2" office:value-type="string">
            <text:p text:style-name="P82">O</text:p>
          </table:table-cell>
          <table:table-cell table:style-name="Table4.A2" office:value-type="string">
            <text:p text:style-name="P83"><text:span text:style-name="T124">Total Frame</text:span> Time</text:p>
          </table:table-cell>
          <table:table-cell table:style-name="Table4.A2" office:value-type="string">
            <text:p text:style-name="P84">-</text:p>
          </table:table-cell>
          <table:table-cell table:style-name="Table4.A2" office:value-type="string">
            <text:p text:style-name="P84">-</text:p>
          </table:table-cell>
          <table:table-cell table:style-name="Table4.E2" office:value-type="string">
            <text:p text:style-name="P85">16.672msec</text:p>
          </table:table-cell>
        </table:table-row>
        <table:table-row>
          <table:table-cell table:style-name="Table4.A2" office:value-type="string">
            <text:p text:style-name="P82">P</text:p>
          </table:table-cell>
          <table:table-cell table:style-name="Table4.A2" office:value-type="string">
            <text:p text:style-name="P83"><text:span text:style-name="T124">V</text:span>SYNC Pulse Width</text:p>
          </table:table-cell>
          <table:table-cell table:style-name="Table4.A2" office:value-type="string">
            <text:p text:style-name="P83">0</text:p>
          </table:table-cell>
          <table:table-cell table:style-name="Table4.A2" office:value-type="string">
            <text:p text:style-name="P83">0</text:p>
          </table:table-cell>
          <table:table-cell table:style-name="Table4.E2" office:value-type="string">
            <text:p text:style-name="P83"><text:span text:style-name="T125">6</text:span>4μsec</text:p>
          </table:table-cell>
        </table:table-row>
        <table:table-row>
          <table:table-cell table:style-name="Table4.A2" office:value-type="string">
            <text:p text:style-name="P82">Q</text:p>
          </table:table-cell>
          <table:table-cell table:style-name="Table4.A2" office:value-type="string">
            <text:p text:style-name="P83">Back Porch</text:p>
          </table:table-cell>
          <table:table-cell table:style-name="Table4.A2" office:value-type="string">
            <text:p text:style-name="P83">1</text:p>
          </table:table-cell>
          <table:table-cell table:style-name="Table4.A2" office:value-type="string">
            <text:p text:style-name="P83">0</text:p>
          </table:table-cell>
          <table:table-cell table:style-name="Table4.E2" office:value-type="string">
            <text:p text:style-name="P83"><text:span text:style-name="T126">928</text:span>μsec</text:p>
          </table:table-cell>
        </table:table-row>
        <table:table-row>
          <table:table-cell table:style-name="Table4.A2" office:value-type="string">
            <text:p text:style-name="P82">R</text:p>
          </table:table-cell>
          <table:table-cell table:style-name="Table4.A2" office:value-type="string">
            <text:p text:style-name="P83"><text:span text:style-name="T127">Active Video </text:span>Time</text:p>
          </table:table-cell>
          <table:table-cell table:style-name="Table4.A2" office:value-type="string">
            <text:p text:style-name="P83">1</text:p>
          </table:table-cell>
          <table:table-cell table:style-name="Table4.A2" office:value-type="string">
            <text:p text:style-name="P83">1</text:p>
          </table:table-cell>
          <table:table-cell table:style-name="Table4.E2" office:value-type="string">
            <text:p text:style-name="P83"><text:span text:style-name="T128">15</text:span>.<text:span text:style-name="T128">3</text:span>6<text:span text:style-name="T128">m</text:span>sec</text:p>
          </table:table-cell>
        </table:table-row>
        <table:table-row>
          <table:table-cell table:style-name="Table4.A2" office:value-type="string">
            <text:p text:style-name="P82">S</text:p>
          </table:table-cell>
          <table:table-cell table:style-name="Table4.A2" office:value-type="string">
            <text:p text:style-name="P83">Front Porch</text:p>
          </table:table-cell>
          <table:table-cell table:style-name="Table4.A2" office:value-type="string">
            <text:p text:style-name="P83">1</text:p>
          </table:table-cell>
          <table:table-cell table:style-name="Table4.A2" office:value-type="string">
            <text:p text:style-name="P83">0</text:p>
          </table:table-cell>
          <table:table-cell table:style-name="Table4.E2" office:value-type="string">
            <text:p text:style-name="P83"><text:span text:style-name="T129">320</text:span>μsec</text:p>
          </table:table-cell>
        </table:table-row>
      </table:table>
      <text:p text:style-name="P86"><text:span text:style-name="T79"/></text:p>
      <text:p text:style-name="P87"><text:span text:style-name="T79">Part </text:span><text:span text:style-name="T130">C</text:span><text:span text:style-name="T79"> Timings for Each State</text:span></text:p>
      <text:p text:style-name="P80"><text:span text:style-name="T79"/></text:p>
      <text:p text:style-name="P80"><draw:frame draw:style-name="fr7" draw:name="Image14" text:anchor-type="char" svg:width="5.5409in" svg:height="1.6772in" draw:z-index="13"><draw:image xlink:href="Pictures/1000000100000214000000A191008172.png" xlink:type="simple" xlink:show="embed" xlink:actuate="onLoad" draw:mime-type="image/png"/></draw:frame><text:soft-page-break/><text:span text:style-name="T79"/></text:p>
      <text:p text:style-name="P88"><text:span text:style-name="T79">Part </text:span><text:span text:style-name="T131">C </text:span><text:span text:style-name="T25">Horizontal VGA Synchronisation</text:span></text:p>
      <text:p text:style-name="P80"><text:span text:style-name="T79"/></text:p>
      <text:p text:style-name="P78"><text:span text:style-name="T117"><text:tab/></text:span><text:span text:style-name="T132">Το σωστό χρονισμό θα υλοποιήσουμε ξανά με χρήση FSM με δύο always blocks όπως και παραπάνω. Παρακάτω φαίνονται διαφορές μεταξύ των state αυτής της FSM και αυτής που υλοποιήθηκε παραπάνω, και ένα διάγραμμα που περιέχει τη δομή της FSM. </text:span><text:span text:style-name="T133">Ο αντίστοιχος μετρητής timeCount λειτουργεί επίσης όμοια με πάνω, όπως και η λογική πίσω απο την αλλαγή απο κάθε στο επόμενο state </text:span><text:span text:style-name="T134">(προφανώς τα ονόματα και οι χρόνοι ορισμένοι με parameter είναι διαφορετικοί, αλλα έχουν οριστεί με όμοια λογική με πάνω)</text:span><text:span text:style-name="T133">.</text:span></text:p>
      <text:p text:style-name="P78"><text:span text:style-name="T132"/></text:p>
      <text:p text:style-name="P89"><text:span text:style-name="T82"/></text:p>
      <text:list text:continue-list="list1009839723" text:style-name="L7">
        <text:list-item>
          <text:p text:style-name="P90"><text:span text:style-name="T84">O</text:span><text:span text:style-name="T85">FF</text:span><text:span text:style-name="T1">(000): </text:span><text:span text:style-name="T135">Λειτουργεί ομοια με παραπάνω.</text:span></text:p>
        </text:list-item>
        <text:list-item>
          <text:p text:style-name="P90"><text:span text:style-name="T85">PULSE</text:span><text:span text:style-name="T1">(001): </text:span><text:span text:style-name="T135">Θ</text:span><text:span text:style-name="T1">α δημιουργήσουμε τον παλμό </text:span><text:span text:style-name="T135">V</text:span><text:span text:style-name="T1">SYNC για να χρονίσουμε την κατακόρυφη συντεταγμένη στην οθόνη. </text:span><text:span text:style-name="T87">Κατα τη διάρκεια του παλμού η οθόνη θα είναι κλειστή. </text:span></text:p>
        </text:list-item>
        <text:list-item>
          <text:p text:style-name="P91"><text:span text:style-name="T89">B</text:span><text:span text:style-name="T85">ACK_PORCH</text:span><text:span text:style-name="T1">(010): </text:span><text:span text:style-name="T90">Η</text:span><text:span text:style-name="T91"> οθόνη θα είναι απενεργοποιημένη </text:span><text:span text:style-name="T90">για ένα χρονικό διάστημα μετά τον παλμό, ό</text:span><text:span text:style-name="T136">πως και παραπάνω</text:span><text:span text:style-name="T91">.</text:span></text:p>
        </text:list-item>
        <text:list-item>
          <text:p text:style-name="P92"><text:span text:style-name="T137">ACTIVE_VIDEO</text:span><text:span text:style-name="T92">(011): Στο state αυτό η οθόνη θα είναι ενεργοποιημένη και θα γράφουμε πάνω της. Θα ενεργοποιηθεί και μια έξοδος </text:span><text:span text:style-name="T138">video</text:span><text:span text:style-name="T92">_i για να σηματοδοτήσει στον μετρητή </text:span><text:span text:style-name="T139">V</text:span><text:span text:style-name="T92">PIXEL ότι η εγγραφή είναι ενεργή (λεπτομμέρειες για την υλοποίησή του παρακάτω).</text:span></text:p>
        </text:list-item>
        <text:list-item>
          <text:p text:style-name="P93"><text:span text:style-name="T94">F</text:span><text:span text:style-name="T140">RONT_PORCH</text:span><text:span text:style-name="T141">(100): Όμοια με τ</text:span><text:span text:style-name="T97">ο BACK PORCH, η οθόνη θα παραμείνει κλειστή πρίν τον επόμενο παλμό </text:span><text:span text:style-name="T142">V</text:span><text:span text:style-name="T97">SYNC.</text:span></text:p>
        </text:list-item>
      </text:list>
      <text:p text:style-name="P94"><text:span text:style-name="T91"/></text:p>
      <text:p text:style-name="P94"><draw:frame draw:style-name="fr7" draw:name="Image15" text:anchor-type="char" svg:width="5.6091in" svg:height="9.2756in" draw:z-index="14"><draw:image xlink:href="Pictures/10000001000002B80000047F6F0F0D91.png" xlink:type="simple" xlink:show="embed" xlink:actuate="onLoad" draw:mime-type="image/png"/></draw:frame><text:soft-page-break/><text:span text:style-name="T91"/></text:p>
      <text:p text:style-name="P95"><text:span text:style-name="T98">P</text:span><text:span text:style-name="T117">art</text:span><text:span text:style-name="T143">C</text:span><text:span text:style-name="T117"> FSM Diagramm</text:span></text:p>
      <text:p text:style-name="P78"><text:span text:style-name="T117"/></text:p>
      <text:p text:style-name="P78"><text:span text:style-name="T117"/></text:p>
      <text:p text:style-name="P96"><text:soft-page-break/><text:span text:style-name="T117"><text:tab/></text:span><text:span text:style-name="T144">Για την υλοποίσηση του μετρητή VPIXEL, θα χρησιμοποιήσουμε πάλι ένα ακολουθιακό always block. Για να λειτουργήσει σωστά θα μετρήσουμε την εγραφή 5 γραμμών πρίν αλλάξουμε τη τιμή του, αποσυμπιέζοντας </text:span><text:span text:style-name="T145">την εινόνα που είναι αποθηκευμένη στη μνήμη. </text:span><text:span text:style-name="T146">Αυτή η αύξηση θα γίνεται μόνο όταν βρισκόμαστε στο </text:span><text:span text:style-name="T147">active video</text:span><text:span text:style-name="T146"> state (όταν το σήμα </text:span><text:span text:style-name="T148">video</text:span><text:span text:style-name="T146">_i είναι ίσο με 1). </text:span><text:span text:style-name="T149">Εντοπίζουμε την αλλαγή γραμμής με τη χρήση της εισόδου pixel_ok, που παρέχεται απο την μονάδα HSYNC. </text:span><text:span text:style-name="T150">Εκτός του video state ο μετρητής μηδενίζεται.</text:span></text:p>
      <text:p text:style-name="P96"><text:span text:style-name="T150"/></text:p>
      <text:p text:style-name="P97"><text:tab/>Για την ολοκλήρωση του VGA_DRIVER μας μένει η σωστή οδήγηση των εξόδων και τον εισόδων στις μονάδες. Στα constraints, εκτός απο το clk και το reset, που θα οδηγηθούν όπως σε προηγούμενα εργαστήρια, θα προσθπεσουμε τα εξής:</text:p>
      <text:list text:style-name="L9">
        <text:list-item>
          <text:p text:style-name="P98">Οι εξόδοι VGA_HSYNC και VGA_VSYNC θα οδηγηθούν στα pins B11 και B12 αντίστοιχα.</text:p>
        </text:list-item>
        <text:list-item>
          <text:p text:style-name="P99"><text:span text:style-name="T75">Για το κάθε χρώμα υπάρχουν τέσσερα pins στις οποίες μπορούμε να τα οδηγήσουμε, το καθένα με διαφορετική αντίσταση, το οποίο επιτρέπει στη προβολή χρωμάτων διαφορετικής έντασης, κα</text:span><text:span text:style-name="T151">θώς και σε μεγάλο εύρος αποχρώσεων</text:span><text:span text:style-name="T75">. </text:span><text:span text:style-name="T151">Εμάς μας αρκεί η προβολή βασικών χρωμάτων, οπότε θα οδηγήσουμε τις εξόδους των χρωμάτων και στα τέσσερα αντίστοιχα pins. Για παράδειγμα, θα οδηγήσουμε την έξοδο VGA_RED στα pins A3, B4, C5 και Α4 </text:span><text:span text:style-name="T152">(όμοια τα υπόλοιπα).</text:span></text:p>
        </text:list-item>
      </text:list>
      <text:p text:style-name="P100"><text:span text:style-name="T152"/></text:p>
      <text:p text:style-name="P100"><text:span text:style-name="T152"><text:tab/></text:span><text:span text:style-name="T153">Για τη σωστή εξαγωγή δεδομένων απο τη μνήμη, θα κάνουμε concatenate το HPIXEL και το VPIXEL με την έκφραση assign address = {VPIXEL, HPIXEL};. </text:span><text:span text:style-name="T154">Επίσης οι έξοδοι VGA_RED, VGA_GREEN και VGA_BLUE δεν πρέπει να περιέχουν δεδομένα όταν η οθόνη είναι κλειστή, δηλαδή όταν είτε το HRGB είτε το VRGB είναι ίσα με 0, οι τιμές τους θα είναι επίσης ίσες με 0. </text:span><text:span text:style-name="T155">Για το reset θα χρησιμοποιήσουμε έναν συγχρονιστή και ένα antibounce, που έχουμε υλοποιήσει σε προηγούμενο εργαστήριο.</text:span><text:span text:style-name="T153"> </text:span></text:p>
      <text:p text:style-name="P100"><text:span text:style-name="T153"/></text:p>
      <text:p text:style-name="P101"><text:span text:style-name="T153"><text:tab/></text:span><text:span text:style-name="T156">Για να επαληθεύσουμε τη σωστή λειτουργία της μονάδας, </text:span><text:span text:style-name="T157">αρχικά </text:span><text:span text:style-name="T156">θα πρέπει να ελέγξουμε, </text:span><text:span text:style-name="T157">όπως και για το HSYNC,</text:span><text:span text:style-name="T156"> οτι οι χρόνοι </text:span><text:span text:style-name="T158">στο VSYNC </text:span><text:span text:style-name="T156">μεταξύ κάθε κατάστασης της FSM είναι σωστοί, ή τουλάχιστον δεν έχουν απόκλιση απο τους επιθυμιτούς χρόνους παραπάνω απο 2nsec. Παρακάτω φαίνονται screenshots απο </text:span><text:span text:style-name="T159">post-implementation timing simulation στα οποία μετριούνται οι χρόνοι για κάθε state, καθώς και ένας πίνακας που περιέχει τους πραγματικούς χρόνους σε σύγκριση με τους αναμενόμενους. </text:span><text:span text:style-name="T160">Θα παρατηρήσουμε πως τa σφάλμα</text:span><text:span text:style-name="T161">τ</text:span><text:span text:style-name="T162">α</text:span><text:span text:style-name="T160"> μεταξύ του αναμενόμενου και του πραγματικού χρόνου μεταξύ κάθε state βρίσκ</text:span><text:span text:style-name="T162">ον</text:span><text:span text:style-name="T160">ται εντός του ορίου ανοχής </text:span><text:span text:style-name="T163">των 2nsec</text:span><text:span text:style-name="T160">. </text:span></text:p>
      <text:p text:style-name="P101"><text:span text:style-name="T160"><text:tab/></text:span><text:span text:style-name="T164">Η δοκιμή αρχικά θα γίνει με την μονάδα VSYNC μεμονομένα, με όμοιο testbench με αυτό που χρησιμοποιήσαμε στο HSYNC, για να έχουμε πιο εύκολα αναγνώσιμες εξόδους. </text:span><text:span text:style-name="T165">Θα οδηγήσουμε την είσοδο pixel_ok στο 0, καθώς είναι βολικότερο να ελέγξουμε την ορθή της λειτουργία του μετρητή VPIXEL όταν </text:span><text:span text:style-name="T166">θα ελέγχουμε ολικά το κύκλωμα, γιατί το σήμα pixel_ok θα οδηγείται αυτόματα απο το HSYNC.</text:span></text:p>
      <text:p text:style-name="P101"><text:span text:style-name="T166"/></text:p>
      <text:p text:style-name="P101"><draw:frame draw:style-name="fr7" draw:name="Image16" text:anchor-type="char" svg:width="5.2898in" svg:height="1.8134in" draw:z-index="15"><draw:image xlink:href="Pictures/1000000100000250000000CB78DBEA25.png" xlink:type="simple" xlink:show="embed" xlink:actuate="onLoad" draw:mime-type="image/png"/></draw:frame><text:span text:style-name="T166"/></text:p>
      <text:p text:style-name="P102"><text:span text:style-name="T167">Part</text:span><text:span text:style-name="T168">C</text:span><text:span text:style-name="T167"> Post-Implementation Timing Simulation, Pulse State Timings</text:span></text:p>
      <text:p text:style-name="P102"><text:span text:style-name="T153"/></text:p>
      <text:p text:style-name="P102"><draw:frame draw:style-name="fr7" draw:name="Image17" text:anchor-type="char" svg:width="5.7583in" svg:height="1.6764in" draw:z-index="16"><draw:image xlink:href="Pictures/10000001000002B9000000CBDC3B89F3.png" xlink:type="simple" xlink:show="embed" xlink:actuate="onLoad" draw:mime-type="image/png"/></draw:frame><text:soft-page-break/><text:span text:style-name="T153"/></text:p>
      <text:p text:style-name="P103"><text:span text:style-name="T167">Part</text:span><text:span text:style-name="T169">C</text:span><text:span text:style-name="T167"> Post-Implementation Timing Simulation, Back Porch State Timings</text:span></text:p>
      <text:p text:style-name="P103"/>
      <text:p text:style-name="P103"><draw:frame draw:style-name="fr7" draw:name="Image18" text:anchor-type="char" svg:width="6.4665in" svg:height="1.6445in" draw:z-index="17"><draw:image xlink:href="Pictures/100000010000031E000000CBBBFF90EA.png" xlink:type="simple" xlink:show="embed" xlink:actuate="onLoad" draw:mime-type="image/png"/></draw:frame></text:p>
      <text:p text:style-name="P104">Part<text:span text:style-name="T170">C</text:span> Post-Implementation Timing Simulation, <text:span text:style-name="T171">Active Video</text:span> State Timings</text:p>
      <text:p text:style-name="P104"/>
      <text:p text:style-name="P104"><draw:frame draw:style-name="fr3" draw:name="Image19" text:anchor-type="char" svg:width="6.6929in" svg:height="1.6402in" draw:z-index="18"><draw:image xlink:href="Pictures/100000010000033C000000CBCEB80DCE.png" xlink:type="simple" xlink:show="embed" xlink:actuate="onLoad" draw:mime-type="image/png"/></draw:frame></text:p>
      <text:p text:style-name="P105"><text:span text:style-name="T108">Part</text:span><text:span text:style-name="T172">C</text:span><text:span text:style-name="T108"> Post-Implementation Timing Simulation, </text:span><text:span text:style-name="T110">Front</text:span><text:span text:style-name="T108"> Porch State Timings</text:span></text:p>
      <text:p text:style-name="P105"><text:span text:style-name="T108"/></text:p>
      <text:p text:style-name="P106"/>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107">Περιγραφή</text:p>
          </table:table-cell>
          <table:table-cell table:style-name="Table5.A1" office:value-type="string">
            <text:p text:style-name="P107">Αναμενόμενος Χρόνος</text:p>
          </table:table-cell>
          <table:table-cell table:style-name="Table5.A1" office:value-type="string">
            <text:p text:style-name="P107">Πραγματικός Χρόνος</text:p>
          </table:table-cell>
          <table:table-cell table:style-name="Table5.D1" office:value-type="string">
            <text:p text:style-name="P108">Διαφορά</text:p>
          </table:table-cell>
        </table:table-row>
        <table:table-row>
          <table:table-cell table:style-name="Table5.A2" office:value-type="string">
            <text:p text:style-name="P109">HSYNC Pulse Width</text:p>
          </table:table-cell>
          <table:table-cell table:style-name="Table5.A2" office:value-type="string">
            <text:p text:style-name="P83"><text:span text:style-name="T125">6</text:span>4μsec</text:p>
          </table:table-cell>
          <table:table-cell table:style-name="Table5.A2" office:value-type="string">
            <text:p text:style-name="P110"><text:span text:style-name="T173">63.999843</text:span><text:span text:style-name="T111">μsec</text:span></text:p>
          </table:table-cell>
          <table:table-cell table:style-name="Table5.D2" office:value-type="string">
            <text:p text:style-name="P111">0.<text:span text:style-name="T174">157</text:span>nsec</text:p>
          </table:table-cell>
        </table:table-row>
        <table:table-row>
          <table:table-cell table:style-name="Table5.A2" office:value-type="string">
            <text:p text:style-name="P109">Back Porch</text:p>
          </table:table-cell>
          <table:table-cell table:style-name="Table5.A2" office:value-type="string">
            <text:p text:style-name="P83"><text:span text:style-name="T126">928</text:span>μsec</text:p>
          </table:table-cell>
          <table:table-cell table:style-name="Table5.A2" office:value-type="string">
            <text:p text:style-name="P112">927.999807μsec</text:p>
          </table:table-cell>
          <table:table-cell table:style-name="Table5.D2" office:value-type="string">
            <text:p text:style-name="P111">0.<text:span text:style-name="T175">193</text:span>nsec</text:p>
          </table:table-cell>
        </table:table-row>
        <table:table-row>
          <table:table-cell table:style-name="Table5.A2" office:value-type="string">
            <text:p text:style-name="P107">Display Time</text:p>
          </table:table-cell>
          <table:table-cell table:style-name="Table5.A2" office:value-type="string">
            <text:p text:style-name="P83"><text:span text:style-name="T128">15</text:span>.<text:span text:style-name="T128">3</text:span>6<text:span text:style-name="T128">m</text:span>sec</text:p>
          </table:table-cell>
          <table:table-cell table:style-name="Table5.A2" office:value-type="string">
            <text:p text:style-name="P113"><text:span text:style-name="T128">15</text:span>.<text:span text:style-name="T128">3</text:span>6<text:span text:style-name="T128">m</text:span>sec</text:p>
          </table:table-cell>
          <table:table-cell table:style-name="Table5.D2" office:value-type="string">
            <text:p text:style-name="P110">0<text:span text:style-name="T112">nsec</text:span></text:p>
          </table:table-cell>
        </table:table-row>
        <table:table-row>
          <table:table-cell table:style-name="Table5.A2" office:value-type="string">
            <text:p text:style-name="P109"><text:span text:style-name="T113">Front</text:span> Porch</text:p>
          </table:table-cell>
          <table:table-cell table:style-name="Table5.A2" office:value-type="string">
            <text:p text:style-name="P83"><text:span text:style-name="T129">320</text:span>μsec</text:p>
          </table:table-cell>
          <table:table-cell table:style-name="Table5.A2" office:value-type="string">
            <text:p text:style-name="P114"><text:bookmark-start text:name="__DdeLink__5149_92527354"/><text:span text:style-name="T129">320.</text:span><text:span text:style-name="T176">000350</text:span>μsec<text:bookmark-end text:name="__DdeLink__5149_92527354"/></text:p>
          </table:table-cell>
          <table:table-cell table:style-name="Table5.D2" office:value-type="string">
            <text:p text:style-name="P111">0.<text:span text:style-name="T177">350</text:span>nsec</text:p>
          </table:table-cell>
        </table:table-row>
      </table:table>
      <text:p text:style-name="P115"/>
      <text:p text:style-name="P115"><text:span text:style-name="T75">Part</text:span><text:span text:style-name="T178">C</text:span><text:span text:style-name="T75"> Post-Implementation Timing Simulation, </text:span><text:span text:style-name="T179">Differences Between Expected and Real Times</text:span></text:p>
      <text:p text:style-name="P104"/>
      <text:p text:style-name="P116"><text:tab/><text:span text:style-name="T180">Πρέπει να ελέγξουμε επίσης οτι το top module δεν θα προσθέσει σημαντική καθυστέρηση μεταξύ των σημάτων. Απο τη στιγμή που οι χρονισμοί μεταξύ του ίδιου σήματος εξαρτώνται μόνο απο τη μονάδα HSYNC η VSYNC, και αφού στο top module η λογική μεταξύ HSYNC και VSYNC, όπως και μεταξύ του HRGB και VRGB είναι η ίδια, αρκεί να ελέγξουμε ότι το HSYNC και το HRGB έχουν μικρή διαφορά μεταξύ τους. </text:span><text:span text:style-name="T181">Αυτό φαίνεται στα παρακάτω στιγμιότυπα.</text:span></text:p>
      <text:p text:style-name="P116"><text:span text:style-name="T180"/></text:p>
      <text:p text:style-name="P78"><draw:frame draw:style-name="fr7" draw:name="Image20" text:anchor-type="char" svg:width="5.852in" svg:height="2.1681in" draw:z-index="19"><draw:image xlink:href="Pictures/10000001000002C3000001067F24D5B3.png" xlink:type="simple" xlink:show="embed" xlink:actuate="onLoad" draw:mime-type="image/png"/></draw:frame><text:soft-page-break/><text:span text:style-name="T117"/></text:p>
      <text:p text:style-name="P117"><text:span text:style-name="T167">Part</text:span><text:span text:style-name="T169">C</text:span><text:span text:style-name="T167"> Post-Implementation Timing Simulation </text:span><text:span text:style-name="T182">(Full Circuit)</text:span><text:span text:style-name="T167">, Back Porch State Timings</text:span></text:p>
      <text:p text:style-name="P78"><text:span text:style-name="T117"/></text:p>
      <text:p text:style-name="P78"><draw:frame draw:style-name="fr7" draw:name="Image21" text:anchor-type="char" svg:width="4.9654in" svg:height="2.239in" draw:z-index="20"><draw:image xlink:href="Pictures/100000010000024500000106DD26CBD2.png" xlink:type="simple" xlink:show="embed" xlink:actuate="onLoad" draw:mime-type="image/png"/></draw:frame><text:span text:style-name="T117"/></text:p>
      <text:p text:style-name="P78"><text:span text:style-name="T117"/></text:p>
      <text:p text:style-name="P118"><text:tab/></text:p>
      <text:p text:style-name="P119"><text:span text:style-name="T117"/></text:p>
      <text:p text:style-name="P119"><text:span text:style-name="T117"/></text:p>
      <text:p text:style-name="P119"><text:span text:style-name="T117"/></text:p>
      <text:p text:style-name="P119"><text:span text:style-name="T117"/></text:p>
      <text:p text:style-name="P119"><text:span text:style-name="T117"/></text:p>
      <text:p text:style-name="P119"><text:span text:style-name="T117"/></text:p>
      <text:p text:style-name="P119"><text:span text:style-name="T117"/></text:p>
      <text:p text:style-name="P119"><text:span text:style-name="T117"/></text:p>
      <text:p text:style-name="P119"><text:span text:style-name="T117"/></text:p>
      <text:p text:style-name="P119"><text:span text:style-name="T117"/></text:p>
      <text:p text:style-name="P120"><text:span text:style-name="T167">Part</text:span><text:span text:style-name="T169">C</text:span><text:span text:style-name="T167"> Post-Implementation Timing Simulation </text:span><text:span text:style-name="T183">(Full Circuit)</text:span><text:span text:style-name="T167">, </text:span><text:span text:style-name="T183">Front</text:span><text:span text:style-name="T167"> Porch State Timing</text:span><text:span text:style-name="T184">s</text:span></text:p>
      <text:p text:style-name="P120"/>
      <text:p text:style-name="P121"><text:span text:style-name="T75"><text:tab/></text:span><text:span text:style-name="T185">Οι παραπάνω έλεγχοι γίνονται μεταξύ του HSYNC και των σημάτων VGA_color, επειδή και τα δύο είναι εξόδοι. Αντίθετα, το σήμα HRGB είναι εσωτερικό της μονάδας HSYNC, οπότε δεν είναι αντιπροσωπευτικό της πραγματικής καθυστέρησης.</text:span></text:p>
      <text:p text:style-name="P119"><text:span text:style-name="T117"><text:tab/></text:span><text:span text:style-name="T186">Για τον μετρητή VSYNC αρκεί επίσης να ελέγξουμε ο</text:span><text:span text:style-name="T187">τι όντως αυξάνεται μόνο όσο είμαστε στο display state και μηδενίζεται εκτός του, κάτι που φαίνεται και απο τα παραπάνω στιγμιότυπα, και οτι μεγιστοποιείται με τιμή </text:span><text:span text:style-name="T188">95</text:span><text:span text:style-name="T187">.</text:span></text:p>
      <text:p text:style-name="P119"><text:span text:style-name="T187"/></text:p>
      <text:p text:style-name="P119"><draw:frame draw:style-name="fr7" draw:name="Image23" text:anchor-type="char" svg:width="4.678in" svg:height="2.3752in" draw:z-index="22"><draw:image xlink:href="Pictures/1000000100000202000001053A2A875B.png" xlink:type="simple" xlink:show="embed" xlink:actuate="onLoad" draw:mime-type="image/png"/></draw:frame><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19"><text:span text:style-name="T187"/></text:p>
      <text:p text:style-name="P122"><text:span text:style-name="T187">PartB Post-Implementation Timing Simulation </text:span><text:span text:style-name="T189">(Full Circuit)</text:span><text:span text:style-name="T187">, </text:span><text:span text:style-name="T189">V</text:span><text:span text:style-name="T116">PIXEL M</text:span><text:span text:style-name="T190">in</text:span><text:span text:style-name="T116"> Value</text:span></text:p>
      <text:p text:style-name="P119"><text:span text:style-name="T187"/></text:p>
      <text:p text:style-name="P119"><draw:frame draw:style-name="fr7" draw:name="Image22" text:anchor-type="char" svg:width="4.8362in" svg:height="2.1992in" draw:z-index="21"><draw:image xlink:href="Pictures/100000010000024000000106390A0451.png" xlink:type="simple" xlink:show="embed" xlink:actuate="onLoad" draw:mime-type="image/png"/></draw:frame><text:soft-page-break/><text:span text:style-name="T187"/></text:p>
      <text:p text:style-name="P123"><text:span text:style-name="T75"/></text:p>
      <text:p text:style-name="P123"><text:span text:style-name="T75"/></text:p>
      <text:p text:style-name="P123"><text:span text:style-name="T75"/></text:p>
      <text:p text:style-name="P123"><text:span text:style-name="T75"/></text:p>
      <text:p text:style-name="P123"><text:span text:style-name="T75"/></text:p>
      <text:p text:style-name="P123"><text:span text:style-name="T75"/></text:p>
      <text:p text:style-name="P123"><text:span text:style-name="T75"/></text:p>
      <text:p text:style-name="P123"><text:span text:style-name="T75"/></text:p>
      <text:p text:style-name="P123"><text:span text:style-name="T75"/></text:p>
      <text:p text:style-name="P123"><text:span text:style-name="T75"/></text:p>
      <text:p text:style-name="P123"><text:span text:style-name="T75"/></text:p>
      <text:p text:style-name="P123"><text:span text:style-name="T75"/></text:p>
      <text:p text:style-name="P123"><text:span text:style-name="T75">PartB Post-Implementation Timing Simulation </text:span><text:span text:style-name="T189">(Full Circuit)</text:span><text:span text:style-name="T75">, </text:span><text:span text:style-name="T189">V</text:span><text:span text:style-name="T116">PIXEL Max Value</text:span></text:p>
      <text:p text:style-name="P78"><text:span text:style-name="T117"/></text:p>
      <text:p text:style-name="P124"><text:span text:style-name="T117"><text:tab/></text:span><text:span text:style-name="T191">Κάποια προβλήματα στην υλοποίηση φανερώθηκαν </text:span><text:span text:style-name="T192">κατα τη διάρκεια της επαλήθευσης</text:span><text:span text:style-name="T191">. </text:span><text:span text:style-name="T192">Αρχικά η υλοποίηση αλλαγής των state γινόταν εκτός της fsm, στο ίδιο always block με τον μετρητή. Όταν η τιμή του μετρητή γινόταν ίση με τις κατάλληλες τιμές που όριζαν οι παράμετροι ένας παλμός σε μία μεταβλητή switch στελνόταν στην FSM, που προκαλούσε την αλλαγή state. Αυτό, εκτός του γεγονότος οτι οδηγεί σε ακριβή κυκλωματική υλοποίηση, οδηγούσε σε καθυστέρηυση 128 κύκλων της VSYNC όταν η FSM άλλαζε απο PULSE σε BACK PORCH state.</text:span></text:p>
      <text:p text:style-name="P125"><text:span text:style-name="T192"><text:tab/></text:span><text:span text:style-name="T193">Το επόμενο πρόβλημα αποτελεί και τον λόγο οπου το κύκλωμα δεν λειτουργούσε σωστά στη πλακέτα κατα τη τελική δοκιμή. Το HSYNC και το VSYNC ορίστηκαν ως 8bit μεταβλητές αντί για 7bit, που οδηγούσε κατα δύο περισσότερα bit κατα το concatenation με το address. Ο συνθέτης αφαιρούσε τα δύο “περιττά” πιο σημαντικά bit απο το VSYNC, το οποίο φανέρωσε το λάθος στο σήμα κατά τον έλεγχο.</text:span></text:p>
      <text:p text:style-name="P126"><text:span text:style-name="T193"><text:tab/></text:span><text:span text:style-name="T194">Αν και δέν φανερώθηκε απευθείας απο τις δοκιμές, ανάθεση στο address γινόταν με πολλαπλασιασμό, κάτι που είναι σχετικά αργό. Κατα τη προσπάθεια βελτιστοποίησης του κυκλώματος, η </text:span><text:span text:style-name="T195">υλοποίηση άλλαξε ωστε να χρησιμοποιεί <text:s/></text:span><text:span text:style-name="T194">concatenation.</text:span></text:p>
      <text:p text:style-name="P126"><text:span text:style-name="T194"><text:tab/></text:span><text:span text:style-name="T196">Αξίζει να σημειωθεί οτι έγιναν εκτενείς δοκιμές στον χρονισμό των σημάτων, και στα δύο στάδια. Μετά την αλλαγή στην FSM που περιγράφηκε παραπάνω, </text:span><text:span text:style-name="T197">δεν παρατηρήθηκαν λάθη στον χρονισμό</text:span><text:span text:style-name="T196"> </text:span></text:p>
      <text:p text:style-name="P127"><text:span text:style-name="T194"><text:tab/></text:span><text:span text:style-name="T198">Τέλος, </text:span><text:span text:style-name="T199">π</text:span><text:span text:style-name="T117">ροειδοποιήσεις του vivado αφορούσαν παράλληλη σύνθεση και virtual grid που μπορούμε να αγνοήσουμε.</text:span></text:p>
      <text:p text:style-name="P128"><text:span text:style-name="T194"/></text:p>
      <text:p text:style-name="P129"><text:span text:style-name="T194"><text:tab/></text:span><text:span text:style-name="T75">Πραγματοποιήθηκαν πολλοί προγραματισμοί στην πλακέτα FPGA, λόγω ενός βασικού λάθους στη κατανόηση της εκφώνησης, και τη λανθασμένη διάγνωση του προβλήματος. Την πρώτη φορά που προγραμμάτησα την πλακέτα κατα αυτή την εργασία ήταν κατα τις ώρες πλακέτας, στις οποίες ο χρόνος αρκούσε μόνο για έναν προγραμματισμό. Η εικόνα που φάνηκε στην οθόνη υποδύκνειε λάθος στον χρονισμό, συγκεκριμένα στον χρονισμό του VSYNC. Αυτό οδήγησε στην αλλαγή στην λογική της fsm που αναφέρθηκε παραπάνω. </text:span></text:p>
      <text:p text:style-name="P130"><text:span text:style-name="T75"><text:tab/>Οι υπόλοιποι προγραμματισμοί έγιναν κατα τη διάρκεια του τελευταίου εργαστηρίου. Εκεί παρατηρήθηκε πως ο χρόνος εμφάνισης μιας γραμμής της VRAM ηταν ο χρόνος εμφάνισης μίας εικόνας, η καλύτερα πως κάθε γραμμή της εικόνας εκτυπωνόταν σαν ξεχωριστή εικόνα. Το λάθος υπήρχε στη κατανόηση της λειτουργίας των σημάτων HSYNC και VSYNC, και εκ του αποτελέσματος στην υλοποίηση των HPIXEL και VPIXEL (συγκεκριμένα, νόμιζα πως κάθε παλμός του HSYNC αντιπροσώπευε την </text:span><text:span text:style-name="T200">αλλαγή ενός pixel αντί μιας γραμμής, και του VSYNC τον χρόνο μίας γραμμής αντί του χρόνου της εικόνας, </text:span><text:span text:style-name="T201">για αυτό αλλαζα το HPIXEL, VPIXEL ανα SCANLINE TIME και ACTIVE VIDEO TIME αντίστοιχα</text:span><text:span text:style-name="T200">)</text:span><text:span text:style-name="T75">. </text:span></text:p>
      <text:p text:style-name="P131"><text:span text:style-name="T200"><text:tab/>Οι δοκιμές για την αλλαγή του HPIXEL και του VPIXEL</text:span><text:span text:style-name="T75"> έ</text:span><text:span text:style-name="T200">γιναν κυρίως με απευθείας δοκιμή στη πλακέτα λόγω του μικρού χρονικού διαστήματος μέχρι τη λήξη του τελικού </text:span><text:soft-page-break/><text:span text:style-name="T200">εργαστηρίου. Στη τελευταία δοκιμή κατα τη διάρκεια της εξέτασης, η εικόνα εμφανιζόταν αλλα δεν φαινόταν σταθερή και φαινόταν σαν να ταξιδεύει προς τα πάνω. </text:span></text:p>
      <text:p text:style-name="P132"><text:tab/>Αυτό οφειλόταν σε σχεδιαστικές παραβλέψεις, όπως την άνοδο του μετρητή εκτός του video state, που παρόλο οπου παρατηρήθηκαν, καθιστούσαν τη λειτουργικότητα στη πλακέτα. χειρότερη. Το κύριο λάθος που δεν παρατηρήθηκε κατα την ώρα του εργαστηρίου αναφέρεται αφορά το μήκος των HPIXEL, VPIXEL και αναφέρεται αναλυτικότερα παραπάνω.</text:p>
      <text:p text:style-name="P133"><text:span text:style-name="T1"/></text:p>
      <text:p text:style-name="P72"><text:span text:style-name="T115"/></text:p>
      <text:p text:style-name="P72"><text:span text:style-name="T115"/></text:p>
      <text:p text:style-name="P72"><text:span text:style-name="T115"/></text:p>
      <text:p text:style-name="P72"><text:span text:style-name="T1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30T15:56:07.715786434</meta:creation-date>
    <dc:date>2026-05-11T16:08:52.997650445</dc:date>
    <meta:editing-duration>PT17H16M47S</meta:editing-duration>
    <meta:editing-cycles>250</meta:editing-cycles>
    <meta:generator>LibreOffice/26.2.3.2$Linux_X86_64 LibreOffice_project/620$Build-2</meta:generator>
    <meta:print-date>2024-12-02T23:42:35.831222036</meta:print-date>
    <meta:printed-by>PDF files</meta:printed-by>
    <meta:document-statistic meta:table-count="5" meta:image-count="28" meta:object-count="0" meta:page-count="19" meta:paragraph-count="243" meta:word-count="3713" meta:character-count="23544" meta:non-whitespace-character-count="20011"/>
  </office:meta>
</office:document-meta>
</file>