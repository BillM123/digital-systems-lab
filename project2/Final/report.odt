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950000015D97D2AE75.png" manifest:media-type="image/png"/>
  <manifest:file-entry manifest:full-path="Pictures/1000000100000BBE000001A1216CD7DF.png" manifest:media-type="image/png"/>
  <manifest:file-entry manifest:full-path="Pictures/10000001000004E80000018998CDA680.png" manifest:media-type="image/png"/>
  <manifest:file-entry manifest:full-path="Pictures/10000001000002A900000475DEC51B7F.png" manifest:media-type="image/png"/>
  <manifest:file-entry manifest:full-path="Pictures/10000001000008AB0000012F0A1008AA.png" manifest:media-type="image/png"/>
  <manifest:file-entry manifest:full-path="Pictures/10000001000004E800000189363F92B9.png" manifest:media-type="image/png"/>
  <manifest:file-entry manifest:full-path="Pictures/100000010000061A000000F38C16FE6F.png" manifest:media-type="image/png"/>
  <manifest:file-entry manifest:full-path="Pictures/10000001000000E6000000F42D6E871D.png" manifest:media-type="image/png"/>
  <manifest:file-entry manifest:full-path="Pictures/10000001000003310000076DD1E21A4F.png" manifest:media-type="image/png"/>
  <manifest:file-entry manifest:full-path="Pictures/100000010000027D000000F4EE32F324.png" manifest:media-type="image/png"/>
  <manifest:file-entry manifest:full-path="Pictures/10000001000008A8000001424D70C1CC.png" manifest:media-type="image/png"/>
  <manifest:file-entry manifest:full-path="Pictures/100000010000022B0000023025C6DA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06in" style:rel-column-width="16378*"/>
    </style:style>
    <style:style style:name="Table1.B" style:family="table-column">
      <style:table-column-properties style:column-width="1.7472in" style:rel-column-width="16536*"/>
    </style:style>
    <style:style style:name="Table1.C" style:family="table-column">
      <style:table-column-properties style:column-width="1.7139in" style:rel-column-width="16221*"/>
    </style:style>
    <style:style style:name="Table1.D" style:family="table-column">
      <style:table-column-properties style:column-width="1.7326in" style:rel-column-width="16400*"/>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8pt" style:text-underline-style="none" officeooo:rsid="000a518e" officeooo:paragraph-rsid="0006e984" style:font-size-asian="15.75pt" style:font-size-complex="18pt"/>
    </style:style>
    <style:style style:name="P2" style:family="paragraph" style:parent-style-name="Standard">
      <style:paragraph-properties fo:text-align="center" style:justify-single-word="false"/>
      <style:text-properties fo:font-size="18pt" fo:font-style="normal" style:text-underline-style="none" fo:font-weight="bold" officeooo:rsid="000ab5ce" officeooo:paragraph-rsid="0006e984" style:font-size-asian="15.75pt" style:font-style-asian="normal" style:font-weight-asian="bold" style:font-size-complex="18pt" style:font-style-complex="normal" style:font-weight-complex="bold"/>
    </style:style>
    <style:style style:name="P3" style:family="paragraph" style:parent-style-name="Standard">
      <style:paragraph-properties fo:text-align="center" style:justify-single-word="false"/>
      <style:text-properties fo:font-size="12pt" officeooo:rsid="0008792d" officeooo:paragraph-rsid="0006e984" style:font-size-asian="10.5pt" style:font-size-complex="12pt"/>
    </style:style>
    <style:style style:name="P4" style:family="paragraph" style:parent-style-name="Standard">
      <style:paragraph-properties fo:text-align="center" style:justify-single-word="false"/>
      <style:text-properties fo:font-size="12pt" officeooo:rsid="00c95c74" officeooo:paragraph-rsid="00c95c74" style:font-size-asian="10.5pt" style:font-size-complex="12pt"/>
    </style:style>
    <style:style style:name="P5" style:family="paragraph" style:parent-style-name="Standard">
      <style:paragraph-properties fo:text-align="center" style:justify-single-word="false"/>
      <style:text-properties fo:font-size="12pt" fo:font-style="normal" style:text-underline-style="none" fo:font-weight="normal" officeooo:rsid="000a518e" officeooo:paragraph-rsid="0007ca5c"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style:text-underline-style="none" officeooo:rsid="000a518e" officeooo:paragraph-rsid="0007ca5c" style:font-size-asian="10.5pt" style:font-size-complex="12pt"/>
    </style:style>
    <style:style style:name="P7" style:family="paragraph" style:parent-style-name="Standard">
      <style:paragraph-properties fo:text-align="center" style:justify-single-word="false"/>
      <style:text-properties fo:font-size="14pt" style:text-underline-style="none" officeooo:rsid="000c7975" officeooo:paragraph-rsid="0007ca5c" style:font-size-asian="12.25pt" style:font-size-complex="14pt"/>
    </style:style>
    <style:style style:name="P8" style:family="paragraph" style:parent-style-name="Standard" style:list-style-name="L1">
      <style:paragraph-properties fo:text-align="left" style:justify-single-word="false"/>
      <style:text-properties fo:font-size="14pt" fo:font-style="italic" style:text-underline-style="none" fo:font-weight="bold" officeooo:rsid="000c7975" officeooo:paragraph-rsid="0007ca5c" style:font-size-asian="12.25pt" style:font-style-asian="italic" style:font-weight-asian="bold" style:font-size-complex="14pt" style:font-style-complex="italic" style:font-weight-complex="bold"/>
    </style:style>
    <style:style style:name="P9" style:family="paragraph" style:parent-style-name="Standard">
      <style:paragraph-properties fo:text-align="left" style:justify-single-word="false"/>
      <style:text-properties fo:font-size="12pt" fo:font-style="normal" fo:font-weight="normal" officeooo:rsid="0007ca5c" officeooo:paragraph-rsid="0007ca5c"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left" style:justify-single-word="false"/>
      <style:text-properties fo:font-size="12pt" fo:font-style="normal" style:text-underline-style="none" fo:font-weight="normal" officeooo:rsid="00b0c840" officeooo:paragraph-rsid="00b0c840"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left" style:justify-single-word="false"/>
      <style:text-properties fo:font-size="12pt" style:text-underline-style="none" officeooo:rsid="00b26d85" officeooo:paragraph-rsid="00b26d85" style:font-size-asian="10.5pt" style:font-size-complex="12pt"/>
    </style:style>
    <style:style style:name="P12" style:family="paragraph" style:parent-style-name="Standard" style:list-style-name="L2">
      <style:paragraph-properties fo:text-align="left" style:justify-single-word="false"/>
      <style:text-properties fo:font-size="14pt" fo:font-style="italic" style:text-underline-style="none" fo:font-weight="bold" officeooo:rsid="0007ca5c" officeooo:paragraph-rsid="0007ca5c" style:font-size-asian="14pt" style:font-style-asian="italic" style:font-weight-asian="bold" style:font-size-complex="14pt" style:font-style-complex="italic" style:font-weight-complex="bold"/>
    </style:style>
    <style:style style:name="P13" style:family="paragraph" style:parent-style-name="Standard">
      <style:paragraph-properties fo:text-align="left" style:justify-single-word="false"/>
      <style:text-properties fo:font-size="12pt" fo:font-style="normal" style:text-underline-style="none" fo:font-weight="normal" officeooo:rsid="0007ca5c" officeooo:paragraph-rsid="0007ca5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left" style:justify-single-word="false"/>
      <style:text-properties fo:font-size="14pt" fo:font-style="italic" style:text-underline-style="none" fo:font-weight="bold" officeooo:rsid="0009860d" officeooo:paragraph-rsid="0009860d" style:font-size-asian="14pt" style:font-style-asian="italic" style:font-weight-asian="bold" style:font-size-complex="14pt" style:font-style-complex="italic" style:font-weight-complex="bold"/>
    </style:style>
    <style:style style:name="P15" style:family="paragraph" style:parent-style-name="Standard">
      <style:paragraph-properties fo:text-align="center" style:justify-single-word="false"/>
      <style:text-properties fo:font-size="12pt" fo:font-style="italic" style:text-underline-style="none" fo:font-weight="normal" officeooo:rsid="00b511fe" officeooo:paragraph-rsid="00b511fe"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left" style:justify-single-word="false"/>
      <style:text-properties fo:font-size="12pt" fo:font-style="normal" style:text-underline-style="none" fo:font-weight="normal" officeooo:rsid="00b511fe" officeooo:paragraph-rsid="00b5598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fo:font-style="italic" style:text-underline-style="none" fo:font-weight="normal" officeooo:rsid="00b55983" officeooo:paragraph-rsid="00b55983"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left" style:justify-single-word="false"/>
      <style:text-properties fo:font-size="12pt" fo:font-style="normal" style:text-underline-style="none" fo:font-weight="normal" officeooo:rsid="00b5c197" officeooo:paragraph-rsid="00b5598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left" style:justify-single-word="false"/>
      <style:text-properties fo:font-size="12pt" fo:font-style="italic" style:text-underline-style="none" fo:font-weight="normal" officeooo:rsid="00b55983" officeooo:paragraph-rsid="00ba1c33"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left" style:justify-single-word="false"/>
      <style:text-properties fo:font-size="12pt" fo:font-style="italic" style:text-underline-style="none" fo:font-weight="normal" officeooo:rsid="00b55983" officeooo:paragraph-rsid="00b55983"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left" style:justify-single-word="false"/>
      <style:text-properties fo:font-size="12pt" fo:font-style="normal" style:text-underline-style="none" fo:font-weight="normal" officeooo:rsid="00b5c197" officeooo:paragraph-rsid="00bb72d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left" style:justify-single-word="false"/>
      <style:text-properties fo:font-size="12pt" fo:font-style="italic" style:text-underline-style="none" fo:font-weight="normal" officeooo:rsid="00b55983" officeooo:paragraph-rsid="00bb72de"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center" style:justify-single-word="false"/>
      <style:text-properties fo:font-size="12pt" fo:font-style="italic" style:text-underline-style="none" fo:font-weight="normal" officeooo:rsid="00bb72de" officeooo:paragraph-rsid="00bb72de"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left" style:justify-single-word="false"/>
      <style:text-properties fo:font-size="12pt" fo:font-style="normal" style:text-underline-style="none" fo:font-weight="normal" officeooo:rsid="00b68c67" officeooo:paragraph-rsid="00bb72de" style:font-size-asian="10.5pt" style:font-style-asian="normal" style:font-weight-asian="normal" style:font-size-complex="12pt" style:font-style-complex="normal" style:font-weight-complex="normal"/>
    </style:style>
    <style:style style:name="P25" style:family="paragraph" style:parent-style-name="Standard" style:list-style-name="L3">
      <style:paragraph-properties fo:text-align="left" style:justify-single-word="false"/>
      <style:text-properties fo:font-size="14pt" fo:font-style="italic" style:text-underline-style="none" fo:font-weight="bold" officeooo:rsid="0009860d" officeooo:paragraph-rsid="0009860d" style:font-size-asian="14pt" style:font-style-asian="italic" style:font-weight-asian="bold" style:font-size-complex="14pt" style:font-style-complex="italic" style:font-weight-complex="bold"/>
    </style:style>
    <style:style style:name="P26" style:family="paragraph" style:parent-style-name="Standard">
      <style:paragraph-properties fo:text-align="left" style:justify-single-word="false"/>
      <style:text-properties fo:font-size="12pt" fo:font-style="normal" style:text-underline-style="none" fo:font-weight="normal" officeooo:rsid="0007ca5c" officeooo:paragraph-rsid="00103108"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left" style:justify-single-word="false"/>
      <style:text-properties fo:font-size="12pt" fo:font-style="normal" style:text-underline-style="none" fo:font-weight="normal" officeooo:rsid="0007ca5c" officeooo:paragraph-rsid="00507244" style:font-size-asian="10.5pt" style:font-style-asian="normal" style:font-weight-asian="normal" style:font-size-complex="12pt" style:font-style-complex="normal" style:font-weight-complex="normal"/>
    </style:style>
    <style:style style:name="P28" style:family="paragraph" style:parent-style-name="Table_20_Contents">
      <style:paragraph-properties fo:text-align="left" style:justify-single-word="false"/>
      <style:text-properties fo:font-size="14pt" officeooo:rsid="00549385" officeooo:paragraph-rsid="00549385" style:font-size-asian="14pt" style:font-size-complex="14pt"/>
    </style:style>
    <style:style style:name="P29" style:family="paragraph" style:parent-style-name="Table_20_Contents">
      <style:paragraph-properties fo:text-align="left" style:justify-single-word="false"/>
      <style:text-properties fo:font-size="14pt" officeooo:rsid="005600a2" officeooo:paragraph-rsid="005600a2" style:font-size-asian="14pt" style:font-size-complex="14pt"/>
    </style:style>
    <style:style style:name="P30" style:family="paragraph" style:parent-style-name="Table_20_Contents">
      <style:paragraph-properties fo:text-align="left" style:justify-single-word="false"/>
      <style:text-properties fo:font-size="14pt" officeooo:rsid="005893a3" officeooo:paragraph-rsid="005893a3" style:font-size-asian="14pt" style:font-size-complex="14pt"/>
    </style:style>
    <style:style style:name="P31" style:family="paragraph" style:parent-style-name="Table_20_Contents">
      <style:paragraph-properties fo:text-align="left" style:justify-single-word="false"/>
      <style:text-properties fo:font-size="14pt" officeooo:rsid="0059ef93" officeooo:paragraph-rsid="0059ef93" style:font-size-asian="14pt" style:font-size-complex="14pt"/>
    </style:style>
    <style:style style:name="P32" style:family="paragraph" style:parent-style-name="Table_20_Contents">
      <style:paragraph-properties fo:text-align="left" style:justify-single-word="false"/>
      <style:text-properties fo:font-size="14pt" officeooo:rsid="005a5a61" officeooo:paragraph-rsid="005a5a61" style:font-size-asian="14pt" style:font-size-complex="14pt"/>
    </style:style>
    <style:style style:name="P33" style:family="paragraph" style:parent-style-name="Table_20_Contents">
      <style:paragraph-properties fo:text-align="left" style:justify-single-word="false"/>
      <style:text-properties fo:font-size="14pt" officeooo:rsid="005da204" officeooo:paragraph-rsid="005da204" style:font-size-asian="14pt" style:font-size-complex="14pt"/>
    </style:style>
    <style:style style:name="P34" style:family="paragraph" style:parent-style-name="Table_20_Contents">
      <style:paragraph-properties fo:text-align="left" style:justify-single-word="false"/>
      <style:text-properties fo:font-size="14pt" officeooo:rsid="00602b03" officeooo:paragraph-rsid="00602b03" style:font-size-asian="14pt" style:font-size-complex="14pt"/>
    </style:style>
    <style:style style:name="P35" style:family="paragraph" style:parent-style-name="Table_20_Contents">
      <style:paragraph-properties fo:text-align="left" style:justify-single-word="false"/>
      <style:text-properties fo:font-size="14pt" officeooo:rsid="00632297" officeooo:paragraph-rsid="00632297" style:font-size-asian="14pt" style:font-size-complex="14pt"/>
    </style:style>
    <style:style style:name="P36" style:family="paragraph" style:parent-style-name="Table_20_Contents">
      <style:paragraph-properties fo:text-align="left" style:justify-single-word="false"/>
      <style:text-properties fo:font-size="14pt" officeooo:rsid="00657488" officeooo:paragraph-rsid="00657488" style:font-size-asian="14pt" style:font-size-complex="14pt"/>
    </style:style>
    <style:style style:name="P37" style:family="paragraph" style:parent-style-name="Table_20_Contents">
      <style:paragraph-properties fo:text-align="left" style:justify-single-word="false"/>
      <style:text-properties fo:font-size="14pt" officeooo:rsid="0068140b" officeooo:paragraph-rsid="0068140b" style:font-size-asian="14pt" style:font-size-complex="14pt"/>
    </style:style>
    <style:style style:name="P38" style:family="paragraph" style:parent-style-name="Table_20_Contents">
      <style:paragraph-properties fo:text-align="left" style:justify-single-word="false"/>
      <style:text-properties fo:font-size="14pt" officeooo:rsid="0069044e" officeooo:paragraph-rsid="0069044e" style:font-size-asian="14pt" style:font-size-complex="14pt"/>
    </style:style>
    <style:style style:name="P39" style:family="paragraph" style:parent-style-name="Table_20_Contents">
      <style:paragraph-properties fo:text-align="left" style:justify-single-word="false"/>
      <style:text-properties fo:font-size="14pt" officeooo:rsid="006bb975" officeooo:paragraph-rsid="006bb975" style:font-size-asian="14pt" style:font-size-complex="14pt"/>
    </style:style>
    <style:style style:name="P40" style:family="paragraph" style:parent-style-name="Standard">
      <style:paragraph-properties fo:text-align="center" style:justify-single-word="false"/>
      <style:text-properties fo:font-size="12pt" fo:font-style="italic" style:text-underline-style="none" fo:font-weight="normal" officeooo:rsid="007eba50" officeooo:paragraph-rsid="007eba50"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left" style:justify-single-word="false"/>
      <style:text-properties fo:font-size="14pt" fo:font-style="italic" style:text-underline-style="none" fo:font-weight="normal" officeooo:rsid="0009860d" officeooo:paragraph-rsid="0085c8f3" style:font-size-asian="14pt" style:font-style-asian="italic" style:font-weight-asian="normal" style:font-size-complex="14pt" style:font-style-complex="italic" style:font-weight-complex="normal"/>
    </style:style>
    <style:style style:name="P42" style:family="paragraph" style:parent-style-name="Standard">
      <style:paragraph-properties fo:text-align="center" style:justify-single-word="false"/>
      <style:text-properties fo:font-size="12pt" fo:font-style="italic" style:text-underline-style="none" fo:font-weight="normal" officeooo:rsid="007eba50" officeooo:paragraph-rsid="009c6694"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center" style:justify-single-word="false"/>
      <style:text-properties fo:font-size="12pt" fo:font-style="italic" style:text-underline-style="none" fo:font-weight="normal" officeooo:rsid="007eba50" officeooo:paragraph-rsid="0085c8f3"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left" style:justify-single-word="false"/>
      <style:text-properties fo:font-size="12pt" fo:font-style="normal" style:text-underline-style="none" fo:font-weight="normal" officeooo:rsid="007eba50" officeooo:paragraph-rsid="0085c8f3"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left" style:justify-single-word="false"/>
      <style:text-properties fo:font-size="12pt" fo:font-style="normal" style:text-underline-style="none" fo:font-weight="normal" officeooo:rsid="0007ca5c" officeooo:paragraph-rsid="0009dcb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left" style:justify-single-word="false"/>
      <style:text-properties fo:font-size="12pt" fo:font-style="normal" style:text-underline-style="none" fo:font-weight="normal" officeooo:rsid="001116a6" officeooo:paragraph-rsid="001116a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fo:font-size="12pt" fo:font-style="italic" style:text-underline-style="none" fo:font-weight="normal" officeooo:rsid="0081fd3b" officeooo:paragraph-rsid="0081fd3b"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left" style:justify-single-word="false"/>
      <style:text-properties fo:font-size="12pt" fo:font-style="normal" style:text-underline-style="none" fo:font-weight="normal" officeooo:rsid="001116a6" officeooo:paragraph-rsid="0014452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left" style:justify-single-word="false"/>
      <style:text-properties fo:font-size="12pt" fo:font-style="normal" style:text-underline-style="none" fo:font-weight="normal" officeooo:rsid="001116a6" officeooo:paragraph-rsid="00167a3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left" style:justify-single-word="false"/>
      <style:text-properties fo:font-size="12pt" fo:font-style="normal" style:text-underline-style="none" fo:font-weight="normal" officeooo:rsid="001116a6" officeooo:paragraph-rsid="001fa72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left" style:justify-single-word="false"/>
      <style:text-properties fo:font-size="12pt" fo:font-style="normal" style:text-underline-style="none" fo:font-weight="normal" officeooo:rsid="001116a6" officeooo:paragraph-rsid="00488e51"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left" style:justify-single-word="false"/>
      <style:text-properties fo:font-size="12pt" fo:font-style="normal" style:text-underline-style="none" fo:font-weight="normal" officeooo:rsid="001116a6" officeooo:paragraph-rsid="0020b170"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left" style:justify-single-word="false"/>
      <style:text-properties fo:font-size="12pt" fo:font-style="normal" style:text-underline-style="none" fo:font-weight="normal" officeooo:rsid="001116a6" officeooo:paragraph-rsid="007bbfb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left" style:justify-single-word="false"/>
      <style:text-properties fo:font-size="14pt" fo:font-style="italic" style:text-underline-style="none" fo:font-weight="bold" officeooo:rsid="0009860d" officeooo:paragraph-rsid="00346d21" style:font-size-asian="14pt" style:font-style-asian="italic" style:font-weight-asian="bold" style:font-size-complex="14pt" style:font-style-complex="italic" style:font-weight-complex="bold"/>
    </style:style>
    <style:style style:name="P55" style:family="paragraph" style:parent-style-name="Standard">
      <style:paragraph-properties fo:text-align="center" style:justify-single-word="false"/>
      <style:text-properties fo:font-size="12pt" fo:font-style="italic" style:text-underline-style="none" fo:font-weight="normal" officeooo:rsid="007e3ea0" officeooo:paragraph-rsid="007e3ea0"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left" style:justify-single-word="false"/>
      <style:text-properties fo:font-size="14pt" fo:font-style="italic" style:text-underline-style="none" fo:font-weight="normal" officeooo:rsid="0009860d" officeooo:paragraph-rsid="00880311" style:font-size-asian="14pt" style:font-style-asian="italic" style:font-weight-asian="normal" style:font-size-complex="14pt" style:font-style-complex="italic" style:font-weight-complex="normal"/>
    </style:style>
    <style:style style:name="P57" style:family="paragraph" style:parent-style-name="Standard">
      <style:paragraph-properties fo:text-align="left" style:justify-single-word="false"/>
      <style:text-properties officeooo:paragraph-rsid="00880311"/>
    </style:style>
    <style:style style:name="P58" style:family="paragraph" style:parent-style-name="Standard">
      <style:paragraph-properties fo:text-align="center" style:justify-single-word="false"/>
      <style:text-properties fo:font-size="12pt" fo:font-style="italic" style:text-underline-style="none" fo:font-weight="normal" officeooo:rsid="007eba50" officeooo:paragraph-rsid="00901c3d" style:font-size-asian="10.5pt" style:font-style-asian="italic" style:font-weight-asian="normal" style:font-size-complex="12pt" style:font-style-complex="italic" style:font-weight-complex="normal"/>
    </style:style>
    <style:style style:name="P59" style:family="paragraph" style:parent-style-name="Standard" style:list-style-name="L3">
      <style:paragraph-properties fo:text-align="left" style:justify-single-word="false"/>
      <style:text-properties fo:font-size="14pt" fo:font-style="italic" style:text-underline-style="none" fo:font-weight="bold" officeooo:rsid="0009860d" officeooo:paragraph-rsid="00346d21" style:font-size-asian="14pt" style:font-style-asian="italic" style:font-weight-asian="bold" style:font-size-complex="14pt" style:font-style-complex="italic" style:font-weight-complex="bold"/>
    </style:style>
    <style:style style:name="P60" style:family="paragraph" style:parent-style-name="Standard">
      <style:paragraph-properties fo:text-align="left" style:justify-single-word="false"/>
      <style:text-properties fo:font-size="12pt" fo:font-style="normal" style:text-underline-style="none" fo:font-weight="normal" officeooo:rsid="0007ca5c" officeooo:paragraph-rsid="003e58b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left" style:justify-single-word="false"/>
      <style:text-properties fo:font-size="12pt" fo:font-style="normal" style:text-underline-style="none" fo:font-weight="normal" officeooo:rsid="0007ca5c" officeooo:paragraph-rsid="00823c80"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center" style:justify-single-word="false"/>
      <style:text-properties fo:font-size="12pt" fo:font-style="italic" style:text-underline-style="none" fo:font-weight="normal" officeooo:rsid="0081fd3b" officeooo:paragraph-rsid="0083fa50"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left" style:justify-single-word="false"/>
      <style:text-properties fo:font-size="12pt" fo:font-style="normal" style:text-underline-style="none" fo:font-weight="normal" officeooo:rsid="0007ca5c" officeooo:paragraph-rsid="004ecb4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left" style:justify-single-word="false"/>
      <style:text-properties fo:font-size="12pt" fo:font-style="normal" style:text-underline-style="none" fo:font-weight="normal" officeooo:rsid="0007ca5c" officeooo:paragraph-rsid="0049f4e5"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left" style:justify-single-word="false"/>
      <style:text-properties fo:font-size="12pt" fo:font-style="normal" style:text-underline-style="none" fo:font-weight="normal" officeooo:rsid="0007ca5c" officeooo:paragraph-rsid="007407e5"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left" style:justify-single-word="false"/>
      <style:text-properties fo:font-size="12pt" fo:font-style="normal" style:text-underline-style="none" fo:font-weight="normal" officeooo:rsid="00457772" officeooo:paragraph-rsid="0045777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left" style:justify-single-word="false"/>
      <style:text-properties fo:font-size="14pt" fo:font-style="italic" style:text-underline-style="none" fo:font-weight="bold" officeooo:rsid="00857564" officeooo:paragraph-rsid="00857564" style:font-size-asian="14pt" style:font-style-asian="italic" style:font-weight-asian="bold" style:font-size-complex="14pt" style:font-style-complex="italic" style:font-weight-complex="bold"/>
    </style:style>
    <style:style style:name="P68" style:family="paragraph" style:parent-style-name="Standard">
      <style:paragraph-properties fo:text-align="center" style:justify-single-word="false"/>
      <style:text-properties fo:font-size="12pt" fo:font-style="italic" style:text-underline-style="none" fo:font-weight="normal" officeooo:rsid="007e3ea0" officeooo:paragraph-rsid="00857564" style:font-size-asian="10.5pt" style:font-style-asian="italic" style:font-weight-asian="normal" style:font-size-complex="12pt" style:font-style-complex="italic" style:font-weight-complex="normal"/>
    </style:style>
    <style:style style:name="P69" style:family="paragraph" style:parent-style-name="Standard">
      <style:paragraph-properties fo:text-align="left" style:justify-single-word="false"/>
      <style:text-properties fo:font-size="14pt" fo:font-style="italic" style:text-underline-style="none" fo:font-weight="normal" officeooo:rsid="0009860d" officeooo:paragraph-rsid="0089d210" style:font-size-asian="14pt" style:font-style-asian="italic" style:font-weight-asian="normal" style:font-size-complex="14pt" style:font-style-complex="italic" style:font-weight-complex="normal"/>
    </style:style>
    <style:style style:name="P70" style:family="paragraph" style:parent-style-name="Standard">
      <style:paragraph-properties fo:text-align="center" style:justify-single-word="false"/>
      <style:text-properties fo:font-size="12pt" fo:font-style="italic" style:text-underline-style="none" fo:font-weight="normal" officeooo:rsid="007eba50" officeooo:paragraph-rsid="00a2e35c" style:font-size-asian="10.5pt" style:font-style-asian="italic" style:font-weight-asian="normal" style:font-size-complex="12pt" style:font-style-complex="italic" style:font-weight-complex="normal"/>
    </style:style>
    <style:style style:name="P71" style:family="paragraph" style:parent-style-name="Standard">
      <style:paragraph-properties fo:text-align="left" style:justify-single-word="false"/>
      <style:text-properties fo:font-size="12pt" fo:font-style="normal" style:text-underline-style="none" fo:font-weight="normal" officeooo:rsid="0009860d" officeooo:paragraph-rsid="0009860d"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center" style:justify-single-word="false"/>
      <style:text-properties fo:font-size="12pt" fo:font-style="italic" style:text-underline-style="none" fo:font-weight="normal" officeooo:rsid="007eba50" officeooo:paragraph-rsid="00aee2e3" style:font-size-asian="10.5pt" style:font-style-asian="italic" style:font-weight-asian="normal" style:font-size-complex="12pt" style:font-style-complex="italic" style:font-weight-complex="normal"/>
    </style:style>
    <style:style style:name="P73" style:family="paragraph" style:parent-style-name="Standard">
      <style:paragraph-properties fo:text-align="left" style:justify-single-word="false"/>
      <style:text-properties fo:font-size="12pt" fo:font-style="normal" style:text-underline-style="none" fo:font-weight="normal" officeooo:rsid="0007ca5c" officeooo:paragraph-rsid="00a8338c"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center" style:justify-single-word="false"/>
      <style:text-properties fo:font-size="12pt" fo:font-style="italic" style:text-underline-style="none" fo:font-weight="normal" officeooo:rsid="007eba50" officeooo:paragraph-rsid="00acffab" style:font-size-asian="10.5pt" style:font-style-asian="italic" style:font-weight-asian="normal" style:font-size-complex="12pt" style:font-style-complex="italic" style:font-weight-complex="normal"/>
    </style:style>
    <style:style style:name="P75" style:family="paragraph" style:parent-style-name="Standard">
      <style:paragraph-properties fo:text-align="center" style:justify-single-word="false"/>
      <style:text-properties fo:font-size="12pt" fo:font-style="normal" style:text-underline-style="none" fo:font-weight="normal" officeooo:rsid="007eba50" officeooo:paragraph-rsid="00acffab"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left" style:justify-single-word="false"/>
      <style:text-properties fo:font-size="12pt" fo:font-style="normal" style:text-underline-style="none" fo:font-weight="normal" officeooo:rsid="00b06aa7" officeooo:paragraph-rsid="00b06aa7"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left" style:justify-single-word="false"/>
      <style:text-properties fo:font-size="14pt" fo:font-style="italic" fo:font-weight="bold" officeooo:rsid="000d1f15" officeooo:paragraph-rsid="000d146d" style:font-size-asian="12.25pt" style:font-style-asian="italic" style:font-weight-asian="bold" style:font-size-complex="14pt" style:font-style-complex="italic" style:font-weight-complex="bold"/>
    </style:style>
    <style:style style:name="P78" style:family="paragraph" style:parent-style-name="Standard" style:list-style-name="L4">
      <style:paragraph-properties fo:text-align="left" style:justify-single-word="false"/>
      <style:text-properties fo:font-size="14pt" fo:font-style="italic" style:text-underline-style="none" fo:font-weight="bold" officeooo:rsid="000d1f15" officeooo:paragraph-rsid="000d146d" style:font-size-asian="12.25pt" style:font-style-asian="italic" style:font-weight-asian="bold" style:font-size-complex="14pt" style:font-style-complex="italic" style:font-weight-complex="bold"/>
    </style:style>
    <style:style style:name="P79" style:family="paragraph" style:parent-style-name="Standard">
      <style:paragraph-properties fo:text-align="left" style:justify-single-word="false"/>
      <style:text-properties fo:font-size="14pt" fo:font-style="italic" style:text-underline-style="none" fo:font-weight="bold" officeooo:rsid="000d1f15" officeooo:paragraph-rsid="000d146d" style:font-size-asian="12.25pt" style:font-style-asian="italic" style:font-weight-asian="bold" style:font-size-complex="14pt" style:font-style-complex="italic" style:font-weight-complex="bold"/>
    </style:style>
    <style:style style:name="P80" style:family="paragraph" style:parent-style-name="Standard">
      <style:paragraph-properties fo:text-align="left" style:justify-single-word="false"/>
      <style:text-properties fo:font-size="12pt" fo:font-style="normal" style:text-underline-style="none" fo:font-weight="normal" officeooo:rsid="00c24381" officeooo:paragraph-rsid="00c24381" style:font-size-asian="10.5pt" style:font-style-asian="normal" style:font-weight-asian="normal" style:font-size-complex="12pt"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officeooo:rsid="0006e984"/>
    </style:style>
    <style:style style:name="T3" style:family="text">
      <style:text-properties officeooo:rsid="00c95c74"/>
    </style:style>
    <style:style style:name="T4" style:family="text">
      <style:text-properties officeooo:rsid="00075b45"/>
    </style:style>
    <style:style style:name="T5" style:family="text">
      <style:text-properties fo:font-size="12pt" fo:font-style="normal" fo:font-weight="normal" officeooo:rsid="000a518e" style:font-size-asian="10.5pt" style:font-style-asian="normal" style:font-weight-asian="normal" style:font-size-complex="12pt" style:font-style-complex="normal" style:font-weight-complex="normal"/>
    </style:style>
    <style:style style:name="T6" style:family="text">
      <style:text-properties style:text-underline-style="none" officeooo:rsid="000c7975"/>
    </style:style>
    <style:style style:name="T7" style:family="text">
      <style:text-properties officeooo:rsid="00b1b418"/>
    </style:style>
    <style:style style:name="T8" style:family="text">
      <style:text-properties fo:font-style="normal" fo:font-weight="normal" officeooo:rsid="00b432bd" style:font-style-asian="normal" style:font-weight-asian="normal" style:font-style-complex="normal" style:font-weight-complex="normal"/>
    </style:style>
    <style:style style:name="T9" style:family="text">
      <style:text-properties officeooo:rsid="00b55983"/>
    </style:style>
    <style:style style:name="T10" style:family="text">
      <style:text-properties fo:font-style="normal" officeooo:rsid="00b5c197" style:font-style-asian="normal" style:font-style-complex="normal"/>
    </style:style>
    <style:style style:name="T11" style:family="text">
      <style:text-properties fo:font-style="normal" officeooo:rsid="00b68c67" style:font-style-asian="normal" style:font-style-complex="normal"/>
    </style:style>
    <style:style style:name="T12" style:family="text">
      <style:text-properties fo:font-style="normal" officeooo:rsid="00ba1c33" style:font-style-asian="normal" style:font-style-complex="normal"/>
    </style:style>
    <style:style style:name="T13" style:family="text">
      <style:text-properties officeooo:rsid="000d7ef8"/>
    </style:style>
    <style:style style:name="T14" style:family="text">
      <style:text-properties officeooo:rsid="000dea51"/>
    </style:style>
    <style:style style:name="T15" style:family="text">
      <style:text-properties officeooo:rsid="000f7b88"/>
    </style:style>
    <style:style style:name="T16" style:family="text">
      <style:text-properties officeooo:rsid="00103108"/>
    </style:style>
    <style:style style:name="T17" style:family="text">
      <style:text-properties officeooo:rsid="000fef3c"/>
    </style:style>
    <style:style style:name="T18" style:family="text">
      <style:text-properties officeooo:rsid="0051f604"/>
    </style:style>
    <style:style style:name="T19" style:family="text">
      <style:text-properties officeooo:rsid="00507244"/>
    </style:style>
    <style:style style:name="T20" style:family="text">
      <style:text-properties officeooo:rsid="006d6ea8"/>
    </style:style>
    <style:style style:name="T21" style:family="text">
      <style:text-properties officeooo:rsid="006f46f3"/>
    </style:style>
    <style:style style:name="T22" style:family="text">
      <style:text-properties officeooo:rsid="005b5fa3"/>
    </style:style>
    <style:style style:name="T23" style:family="text">
      <style:text-properties officeooo:rsid="005f6549"/>
    </style:style>
    <style:style style:name="T24" style:family="text">
      <style:text-properties officeooo:rsid="0061b462"/>
    </style:style>
    <style:style style:name="T25" style:family="text">
      <style:text-properties officeooo:rsid="006440e3"/>
    </style:style>
    <style:style style:name="T26" style:family="text">
      <style:text-properties officeooo:rsid="00676cb2"/>
    </style:style>
    <style:style style:name="T27" style:family="text">
      <style:text-properties officeooo:rsid="006a3a2c"/>
    </style:style>
    <style:style style:name="T28" style:family="text">
      <style:text-properties fo:font-size="12pt" officeooo:rsid="0085c8f3" style:font-size-asian="10.5pt" style:font-size-complex="12pt"/>
    </style:style>
    <style:style style:name="T29" style:family="text">
      <style:text-properties fo:font-size="12pt" fo:font-style="normal" officeooo:rsid="0085c8f3" style:font-size-asian="10.5pt" style:font-style-asian="normal" style:font-size-complex="12pt" style:font-style-complex="normal"/>
    </style:style>
    <style:style style:name="T30" style:family="text">
      <style:text-properties officeooo:rsid="0085c8f3"/>
    </style:style>
    <style:style style:name="T31" style:family="text">
      <style:text-properties officeooo:rsid="009c6694"/>
    </style:style>
    <style:style style:name="T32" style:family="text">
      <style:text-properties officeooo:rsid="0086c213"/>
    </style:style>
    <style:style style:name="T33" style:family="text">
      <style:text-properties officeooo:rsid="008740b5"/>
    </style:style>
    <style:style style:name="T34" style:family="text">
      <style:text-properties officeooo:rsid="0033add0"/>
    </style:style>
    <style:style style:name="T35" style:family="text">
      <style:text-properties officeooo:rsid="00141a89"/>
    </style:style>
    <style:style style:name="T36" style:family="text">
      <style:text-properties officeooo:rsid="008089a0"/>
    </style:style>
    <style:style style:name="T37" style:family="text">
      <style:text-properties officeooo:rsid="00823c80"/>
    </style:style>
    <style:style style:name="T38" style:family="text">
      <style:text-properties officeooo:rsid="00144529"/>
    </style:style>
    <style:style style:name="T39" style:family="text">
      <style:text-properties officeooo:rsid="00167a31"/>
    </style:style>
    <style:style style:name="T40" style:family="text">
      <style:text-properties officeooo:rsid="0017c82c"/>
    </style:style>
    <style:style style:name="T41" style:family="text">
      <style:text-properties officeooo:rsid="00156d48"/>
    </style:style>
    <style:style style:name="T42" style:family="text">
      <style:text-properties officeooo:rsid="0019dca5"/>
    </style:style>
    <style:style style:name="T43" style:family="text">
      <style:text-properties officeooo:rsid="00281d54"/>
    </style:style>
    <style:style style:name="T44" style:family="text">
      <style:text-properties officeooo:rsid="0031afbf"/>
    </style:style>
    <style:style style:name="T45" style:family="text">
      <style:text-properties officeooo:rsid="0031d0c3"/>
    </style:style>
    <style:style style:name="T46" style:family="text">
      <style:text-properties officeooo:rsid="00334d94"/>
    </style:style>
    <style:style style:name="T47" style:family="text">
      <style:text-properties officeooo:rsid="0047757a"/>
    </style:style>
    <style:style style:name="T48" style:family="text">
      <style:text-properties officeooo:rsid="001b2b34"/>
    </style:style>
    <style:style style:name="T49" style:family="text">
      <style:text-properties officeooo:rsid="001ce2e2"/>
    </style:style>
    <style:style style:name="T50" style:family="text">
      <style:text-properties officeooo:rsid="001d1972"/>
    </style:style>
    <style:style style:name="T51" style:family="text">
      <style:text-properties officeooo:rsid="001e0023"/>
    </style:style>
    <style:style style:name="T52" style:family="text">
      <style:text-properties officeooo:rsid="001f1d19"/>
    </style:style>
    <style:style style:name="T53" style:family="text">
      <style:text-properties officeooo:rsid="0020b170"/>
    </style:style>
    <style:style style:name="T54" style:family="text">
      <style:text-properties officeooo:rsid="0021fae5"/>
    </style:style>
    <style:style style:name="T55" style:family="text">
      <style:text-properties officeooo:rsid="00244195"/>
    </style:style>
    <style:style style:name="T56" style:family="text">
      <style:text-properties officeooo:rsid="00488e51"/>
    </style:style>
    <style:style style:name="T57" style:family="text">
      <style:text-properties officeooo:rsid="00488f44"/>
    </style:style>
    <style:style style:name="T58" style:family="text">
      <style:text-properties officeooo:rsid="00457772"/>
    </style:style>
    <style:style style:name="T59" style:family="text">
      <style:text-properties officeooo:rsid="002aa01f"/>
    </style:style>
    <style:style style:name="T60" style:family="text">
      <style:text-properties officeooo:rsid="006fc743"/>
    </style:style>
    <style:style style:name="T61" style:family="text">
      <style:text-properties officeooo:rsid="00713f63"/>
    </style:style>
    <style:style style:name="T62" style:family="text">
      <style:text-properties officeooo:rsid="002b2280"/>
    </style:style>
    <style:style style:name="T63" style:family="text">
      <style:text-properties officeooo:rsid="002edca9"/>
    </style:style>
    <style:style style:name="T64" style:family="text">
      <style:text-properties officeooo:rsid="0041da95"/>
    </style:style>
    <style:style style:name="T65" style:family="text">
      <style:text-properties officeooo:rsid="00309a5d"/>
    </style:style>
    <style:style style:name="T66" style:family="text">
      <style:text-properties officeooo:rsid="0031113a"/>
    </style:style>
    <style:style style:name="T67" style:family="text">
      <style:text-properties officeooo:rsid="007af0e3"/>
    </style:style>
    <style:style style:name="T68" style:family="text">
      <style:text-properties officeooo:rsid="00a83c36"/>
    </style:style>
    <style:style style:name="T69" style:family="text">
      <style:text-properties officeooo:rsid="007bbfb9"/>
    </style:style>
    <style:style style:name="T70" style:family="text">
      <style:text-properties fo:font-size="12pt" fo:font-style="normal" officeooo:rsid="008ebc86" style:font-size-asian="10.5pt" style:font-style-asian="normal" style:font-size-complex="12pt" style:font-style-complex="normal"/>
    </style:style>
    <style:style style:name="T71" style:family="text">
      <style:text-properties fo:font-size="12pt" fo:font-style="normal" officeooo:rsid="0096cf50" style:font-size-asian="10.5pt" style:font-style-asian="normal" style:font-size-complex="12pt" style:font-style-complex="normal"/>
    </style:style>
    <style:style style:name="T72" style:family="text">
      <style:text-properties fo:font-size="12pt" fo:font-style="normal" officeooo:rsid="009e9528" style:font-size-asian="10.5pt" style:font-style-asian="normal" style:font-size-complex="12pt" style:font-style-complex="normal"/>
    </style:style>
    <style:style style:name="T73" style:family="text">
      <style:text-properties fo:font-size="12pt" fo:font-style="normal" officeooo:rsid="00a06491" style:font-size-asian="10.5pt" style:font-style-asian="normal" style:font-size-complex="12pt" style:font-style-complex="normal"/>
    </style:style>
    <style:style style:name="T74" style:family="text">
      <style:text-properties officeooo:rsid="008ebc86"/>
    </style:style>
    <style:style style:name="T75" style:family="text">
      <style:text-properties officeooo:rsid="009150c3"/>
    </style:style>
    <style:style style:name="T76" style:family="text">
      <style:text-properties officeooo:rsid="0092e326"/>
    </style:style>
    <style:style style:name="T77" style:family="text">
      <style:text-properties fo:font-size="12pt" fo:font-style="normal" fo:font-weight="normal" officeooo:rsid="0096a1ba"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96cf50"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098c0c5" style:font-size-asian="10.5pt" style:font-style-asian="normal" style:font-weight-asian="normal" style:font-size-complex="12pt" style:font-style-complex="normal" style:font-weight-complex="normal"/>
    </style:style>
    <style:style style:name="T80" style:family="text">
      <style:text-properties officeooo:rsid="00346d21"/>
    </style:style>
    <style:style style:name="T81" style:family="text">
      <style:text-properties officeooo:rsid="0039ac9f"/>
    </style:style>
    <style:style style:name="T82" style:family="text">
      <style:text-properties officeooo:rsid="003b4c5d"/>
    </style:style>
    <style:style style:name="T83" style:family="text">
      <style:text-properties officeooo:rsid="003b546c"/>
    </style:style>
    <style:style style:name="T84" style:family="text">
      <style:text-properties officeooo:rsid="003d4335"/>
    </style:style>
    <style:style style:name="T85" style:family="text">
      <style:text-properties officeooo:rsid="003e58ba"/>
    </style:style>
    <style:style style:name="T86" style:family="text">
      <style:text-properties officeooo:rsid="009a7e94"/>
    </style:style>
    <style:style style:name="T87" style:family="text">
      <style:text-properties officeooo:rsid="00844acf"/>
    </style:style>
    <style:style style:name="T88" style:family="text">
      <style:text-properties officeooo:rsid="003edbb5"/>
    </style:style>
    <style:style style:name="T89" style:family="text">
      <style:text-properties officeooo:rsid="00725dc8"/>
    </style:style>
    <style:style style:name="T90" style:family="text">
      <style:text-properties officeooo:rsid="003ffce9"/>
    </style:style>
    <style:style style:name="T91" style:family="text">
      <style:text-properties officeooo:rsid="0041ac21"/>
    </style:style>
    <style:style style:name="T92" style:family="text">
      <style:text-properties officeooo:rsid="0043cf13"/>
    </style:style>
    <style:style style:name="T93" style:family="text">
      <style:text-properties officeooo:rsid="0042d98a"/>
    </style:style>
    <style:style style:name="T94" style:family="text">
      <style:text-properties officeooo:rsid="004d34ba"/>
    </style:style>
    <style:style style:name="T95" style:family="text">
      <style:text-properties officeooo:rsid="004ecb4a"/>
    </style:style>
    <style:style style:name="T96" style:family="text">
      <style:text-properties officeooo:rsid="004eed12"/>
    </style:style>
    <style:style style:name="T97" style:family="text">
      <style:text-properties officeooo:rsid="004934ea"/>
    </style:style>
    <style:style style:name="T98" style:family="text">
      <style:text-properties officeooo:rsid="0049f4e5"/>
    </style:style>
    <style:style style:name="T99" style:family="text">
      <style:text-properties officeooo:rsid="004ba936"/>
    </style:style>
    <style:style style:name="T100" style:family="text">
      <style:text-properties officeooo:rsid="009cc968"/>
    </style:style>
    <style:style style:name="T101" style:family="text">
      <style:text-properties officeooo:rsid="007407e5"/>
    </style:style>
    <style:style style:name="T102" style:family="text">
      <style:text-properties officeooo:rsid="0074f0de"/>
    </style:style>
    <style:style style:name="T103" style:family="text">
      <style:text-properties officeooo:rsid="00778b42"/>
    </style:style>
    <style:style style:name="T104" style:family="text">
      <style:text-properties officeooo:rsid="00783b76"/>
    </style:style>
    <style:style style:name="T105" style:family="text">
      <style:text-properties officeooo:rsid="0079544c"/>
    </style:style>
    <style:style style:name="T106" style:family="text">
      <style:text-properties officeooo:rsid="00857564"/>
    </style:style>
    <style:style style:name="T107" style:family="text">
      <style:text-properties fo:font-size="12pt" fo:font-style="normal" officeooo:rsid="00a1e558" style:font-size-asian="10.5pt" style:font-style-asian="normal" style:font-size-complex="12pt" style:font-style-complex="normal"/>
    </style:style>
    <style:style style:name="T108" style:family="text">
      <style:text-properties fo:font-size="12pt" fo:font-style="normal" officeooo:rsid="00a208bd" style:font-size-asian="10.5pt" style:font-style-asian="normal" style:font-size-complex="12pt" style:font-style-complex="normal"/>
    </style:style>
    <style:style style:name="T109" style:family="text">
      <style:text-properties fo:font-size="12pt" fo:font-style="normal" officeooo:rsid="00a6c25e" style:font-size-asian="10.5pt" style:font-style-asian="normal" style:font-size-complex="12pt" style:font-style-complex="normal"/>
    </style:style>
    <style:style style:name="T110" style:family="text">
      <style:text-properties officeooo:rsid="00acf9bf"/>
    </style:style>
    <style:style style:name="T111" style:family="text">
      <style:text-properties officeooo:rsid="00a47b59"/>
    </style:style>
    <style:style style:name="T112" style:family="text">
      <style:text-properties officeooo:rsid="00a5d75e"/>
    </style:style>
    <style:style style:name="T113" style:family="text">
      <style:text-properties officeooo:rsid="00a6c25e"/>
    </style:style>
    <style:style style:name="T114" style:family="text">
      <style:text-properties officeooo:rsid="00a6e5cf"/>
    </style:style>
    <style:style style:name="T115" style:family="text">
      <style:text-properties officeooo:rsid="00a7303f"/>
    </style:style>
    <style:style style:name="T116" style:family="text">
      <style:text-properties officeooo:rsid="00a7ee5b"/>
    </style:style>
    <style:style style:name="T117" style:family="text">
      <style:text-properties officeooo:rsid="00a9a9c4"/>
    </style:style>
    <style:style style:name="T118" style:family="text">
      <style:text-properties officeooo:rsid="00aee2e3"/>
    </style:style>
    <style:style style:name="T119" style:family="text">
      <style:text-properties fo:font-style="italic" officeooo:rsid="0085c8f3" style:font-style-asian="italic" style:font-style-complex="italic"/>
    </style:style>
    <style:style style:name="T120" style:family="text">
      <style:text-properties officeooo:rsid="00ac38d9"/>
    </style:style>
    <style:style style:name="T121" style:family="text">
      <style:text-properties officeooo:rsid="00acffab"/>
    </style:style>
    <style:style style:name="T122" style:family="text">
      <style:text-properties style:text-underline-style="none"/>
    </style:style>
    <style:style style:name="T123" style:family="text">
      <style:text-properties officeooo:rsid="00c383e4"/>
    </style:style>
    <style:style style:name="T124" style:family="text">
      <style:text-properties officeooo:rsid="00c50d2c"/>
    </style:style>
    <style:style style:name="T125" style:family="text">
      <style:text-properties officeooo:rsid="00c7cc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Αναφορά πάνω στην <text:span text:style-name="T2">2</text:span>η εργασία</text:p>
      <text:p text:style-name="P3"/>
      <text:p text:style-name="P4">###### ######</text:p>
      <text:p text:style-name="P3">ΑΕΜ: <text:span text:style-name="T3">####</text:span></text:p>
      <text:p text:style-name="P5"><text:span text:style-name="T4">10</text:span>/1<text:span text:style-name="T4">1</text:span>/2024</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7"><text:span text:style-name="T5"/></text:p>
      <text:list text:style-name="L1">
        <text:list-item>
          <text:p text:style-name="P8">Περίληψη:<text:tab/></text:p>
        </text:list-item>
      </text:list>
      <text:p text:style-name="P9"><text:span text:style-name="T6"/></text:p>
      <text:p text:style-name="P10">Στην αναφορά αυτή παρουσιάζεται η υλοποίηση ενός ζευγαριού αποστολέα και δέκτη, που χρησιμοποιούν το πρωτόκολλο UART για τη σειριακή μεταφορά δεδομένων, <text:span text:style-name="T7">η εξήγηση και λεπτομέρειες αυτής, καθώς και λεπτομέρειες σχετικά με την επαλήθευση σωστής λειτουργίας τους</text:span>.</text:p>
      <text:p text:style-name="P11"><text:span text:style-name="T1">Συγκεκριμένα παρουσιάζεται η υλοποίηση μονάδας ελέγχου baud rate για τον συγχρονισμό τους, </text:span><text:span text:style-name="T8">την υλοποίηση των fsm που στηρίζουν τη λογική τους και περιφεριακά κομμάτια της που επιτρέπει τη σωστή λειτουργία τους.</text:span></text:p>
      <text:p text:style-name="P11"><text:span text:style-name="T8"/></text:p>
      <text:p text:style-name="P11"><text:span text:style-name="T8"/></text:p>
      <text:p text:style-name="P11"><text:span text:style-name="T8"/></text:p>
      <text:p text:style-name="P11"><text:span text:style-name="T8"/></text:p>
      <text:p text:style-name="P11"><text:span text:style-name="T8"/></text:p>
      <text:list text:style-name="L2">
        <text:list-item>
          <text:p text:style-name="P12">Εισαγωγή:</text:p>
        </text:list-item>
      </text:list>
      <text:p text:style-name="P13"><draw:frame draw:style-name="fr1" draw:name="Image10" text:anchor-type="char" svg:x="1.8165in" svg:y="0.1827in" svg:width="3.1307in" svg:height="3.1583in" draw:z-index="9"><draw:image xlink:href="Pictures/100000010000022B0000023025C6DAB2.png" xlink:type="simple" xlink:show="embed" xlink:actuate="onLoad" draw:mime-type="image/png"/></draw:frame></text:p>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Παράδειγμα γενικής μορφής αποστολέα και δέκτη</text:p>
      <text:p text:style-name="P14"/>
      <text:p text:style-name="P16"><text:soft-page-break/><text:tab/>Όπως αναφέρθηκε προηγουμένως, κύριος στόχος της εργασίας είναι η υλοποίηση ενός UART transmitter και ενός UART receiver, <text:span text:style-name="T9">και η ασύγχρονη επικοινωνία μεταξύ τους</text:span>. <text:span text:style-name="T9">Για την επικοινωνία ενός συμβόλου ο αποστολέας θα χρησιμοποιήσει το παρακάτω χρονοδιάγραμμα για την αποστολή ενός συμβόλου (8-bit). </text:span></text:p>
      <text:p text:style-name="P16"/>
      <text:p text:style-name="P16"><draw:frame draw:style-name="fr2" draw:name="Image11" text:anchor-type="char" svg:width="5.6772in" svg:height="2.1756in" draw:z-index="10"><draw:image xlink:href="Pictures/100000010000027D000000F4EE32F324.png" xlink:type="simple" xlink:show="embed" xlink:actuate="onLoad" draw:mime-type="image/png"/></draw:frame><text:s/></text:p>
      <text:p text:style-name="P17">Χρονοδιάγραμμα αποστολής ενός συμβόλου</text:p>
      <text:p text:style-name="P17"/>
      <text:p text:style-name="P18"><text:tab/>Το start bit σηματοδοτεί στον δέκτη την έναρξη αποστολής δεδομένων και τον επιτρέπει να ευθυγραμμιστεί, ενώ το stop bit σηματοδοτεί το τέλος αποστολής δεδομένων. Το parity bit αταδεικνύει αν το σύμβολο που μεταβιβάστηκε εμπεριέχει άρτιο ή περιττό αριθμό λογικών άσσων, και χρησιμοποιείται ως έλεγχος ορθότητας των δεδομένων απο τον δέκτη.</text:p>
      <text:p text:style-name="P19"><text:span text:style-name="T10"><text:tab/></text:span><text:span text:style-name="T11">Επειδή η </text:span><text:span text:style-name="T10">προσυμφωνία και η επιλογή μίας κοινής ταχύτητας δεν είναι μέρος του πρωτοκόλλου επικοινωνίας</text:span><text:span text:style-name="T11">, κάθε μονάδα περιλαμβάνει τον δικό της προγραμματιζόμενο ελεγκτή Baud Rate, ο οποίος θέτει τον ρυθμό μετάδοσης πριν την έναρξη της επικοινωνίας, <text:s/></text:span><text:span text:style-name="T12">γ</text:span><text:span text:style-name="T11">ια τον σωστό συγχρονισμό αποστολής και λήψης δεδομένων. </text:span><text:span text:style-name="T12">Υποστηρίζονται οκτώ ταχύτητες επικοινωνίας UART, οι οποίες φαίνονται στον παρακάτω πίνακα</text:span></text:p>
      <text:p text:style-name="P19"><draw:frame draw:style-name="fr1" draw:name="Image12" text:anchor-type="char" svg:x="2.4591in" svg:y="0in" svg:width="2.3953in" svg:height="2.5417in" draw:z-index="11"><draw:image xlink:href="Pictures/10000001000000E6000000F42D6E871D.png" xlink:type="simple" xlink:show="embed" xlink:actuate="onLoad" draw:mime-type="image/png"/></draw:frame><text:span text:style-name="T12"/></text:p>
      <text:p text:style-name="P20"><text:span text:style-name="T11"/></text:p>
      <text:p text:style-name="P21"><text:tab/></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3">Πίνακας υποστηριζόμενων ταχυτήτων αποστολής σε bits/s</text:p>
      <text:p text:style-name="P22"><text:span text:style-name="T10"/></text:p>
      <text:p text:style-name="P22"><text:span text:style-name="T10"/></text:p>
      <text:p text:style-name="P24">Παραπάνω λεπτομέρειες σχετικά με την υλοποίηση και εισόδους/εξόδους φαίνονται παρακάτω.</text:p>
      <text:p text:style-name="P14"/>
      <text:p text:style-name="P14"/>
      <text:p text:style-name="P14"><text:soft-page-break/></text:p>
      <text:list text:style-name="L3">
        <text:list-item>
          <text:p text:style-name="P25">Μέρος 1ο: Ελεγκτής Baud Rate</text:p>
        </text:list-item>
      </text:list>
      <text:p text:style-name="P14"/>
      <text:p text:style-name="P26"><text:span text:style-name="T13"><text:tab/>Σε αυτό το κομμάτι της εργασίας υλοποιούμε έναν ελεγκή baud rate, </text:span><text:span text:style-name="T14">το οποίο δημιουργεί ένα sampling σήμα </text:span><text:span text:style-name="T15">ανα δεδομένο χρονικό διάστημα, </text:span><text:span text:style-name="T16">η διάρκεια του οποίου μπορεί να πάρει μια απο οκτώ προκαθορισμένες τιμές</text:span><text:span text:style-name="T15">.</text:span></text:p>
      <text:p text:style-name="P26"><text:span text:style-name="T15"><text:tab/></text:span><text:span text:style-name="T16">Σαν εισόδους χρησιμοποιεί το </text:span><text:span text:style-name="T15">baud </text:span><text:span text:style-name="T17">select</text:span><text:span text:style-name="T15">, </text:span><text:span text:style-name="T16">που ρυθμίζει ποιά απο τις οκτώ διάρκειες θα επιλαγεί για την έξοδο</text:span><text:span text:style-name="T15"> ό</text:span><text:span text:style-name="T17">ταν είναι ανοιχτή, </text:span><text:span text:style-name="T16">και η είσοδος enable που θα σταματάει τη δημιουργία σημάτων sampling όταν δεν είναι ενεργό</text:span><text:span text:style-name="T15">. </text:span><text:span text:style-name="T17">Αποτελείται απο δύο always block, το ένα ακολουθιακής</text:span><text:span text:style-name="T16"> λογικής</text:span><text:span text:style-name="T17"> που χρησιμοποίει έναν μετρητή για να υπολογίσει πότε πρέπει να ανεβεί το sampling σήμα, ανάλογα με την μέγιστη τιμή που μπορεί να πάρει, και ένα δεύτερο που έχει στη λίστα ευαισθησίας του μόνο το baud select, και ανάλογα με τη τιμή του θα θέσει τη μέγιστη τιμη που μπορεί να πάρει ο μετρητής. </text:span><text:span text:style-name="T16">Το σήμα sampling ανεβεί για κάθε κύκλο που η τιμή του μετρητή γίνει ίση με την μέγιστη τιμή του. Όταν η είσοδος enable δέν είναι ανοιχτή, ο μετρητής μηδενίζεται. </text:span><text:span text:style-name="T18">Αξίζει να σημειωθεί πως δεν περιμένουμε αλλαγή του baud select χωρίς reset, οπότε δεν έχουμε πάρει μέτρα να αντιμετωπίσουμε τη περίπτωση και το θεωρούμε λάθος του χρήστη.</text:span></text:p>
      <text:p text:style-name="P27"><text:tab/><text:span text:style-name="T19">Για να μετρήσουμε σωστά την ποσότητα baud rate με το ρολόι, θα χρησιμοποιήσουμε τον τύπο NumOfClks = 1/(16*baudrate)*clk_period. Για παράδειγμα, για baud_rate = 9600 (που θα έχουμε για baud_sel = 4), ο αριθμός των κύκλων του ρολογιού που θέλουμε για να το μετρήσουμε, δηλαδή και η μέγιστη τιμή του μετρητή είναι NumOfClks = 1/(16*9600*10^-8) = 651.0416666, το οποίο θα στρογγυλοποιήσουμε σε 614. </text:span><text:span text:style-name="T20">Τα αποτελέσματα των πράξεων για κάθε διαφορετικό baud rate, καθώς και τα σφάλματα αυτών φαίνονται στον παρακάτω </text:span><text:span text:style-name="T21">πίνακα</text:span></text:p>
      <text:p text:style-name="P14"/>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Baud Select</text:p>
          </table:table-cell>
          <table:table-cell table:style-name="Table1.A1" office:value-type="string">
            <text:p text:style-name="P28">Baud Rate (Bits/s)</text:p>
          </table:table-cell>
          <table:table-cell table:style-name="Table1.A1" office:value-type="string">
            <text:p text:style-name="P28">Clock <text:span text:style-name="T22">C</text:span>ycles </text:p>
          </table:table-cell>
          <table:table-cell table:style-name="Table1.D1" office:value-type="string">
            <text:p text:style-name="P28">Rounding error</text:p>
          </table:table-cell>
        </table:table-row>
        <table:table-row>
          <table:table-cell table:style-name="Table1.A2" office:value-type="string">
            <text:p text:style-name="P28">000</text:p>
          </table:table-cell>
          <table:table-cell table:style-name="Table1.A2" office:value-type="string">
            <text:p text:style-name="P29">300</text:p>
          </table:table-cell>
          <table:table-cell table:style-name="Table1.A2" office:value-type="string">
            <text:p text:style-name="P30">20833</text:p>
          </table:table-cell>
          <table:table-cell table:style-name="Table1.D2" office:value-type="string">
            <text:p text:style-name="P31">0.3333...</text:p>
          </table:table-cell>
        </table:table-row>
        <table:table-row>
          <table:table-cell table:style-name="Table1.A2" office:value-type="string">
            <text:p text:style-name="P28">001</text:p>
          </table:table-cell>
          <table:table-cell table:style-name="Table1.A2" office:value-type="string">
            <text:p text:style-name="P29">1200</text:p>
          </table:table-cell>
          <table:table-cell table:style-name="Table1.A2" office:value-type="string">
            <text:p text:style-name="P32">5208</text:p>
          </table:table-cell>
          <table:table-cell table:style-name="Table1.D2" office:value-type="string">
            <text:p text:style-name="P33">0.3333...</text:p>
          </table:table-cell>
        </table:table-row>
        <table:table-row>
          <table:table-cell table:style-name="Table1.A2" office:value-type="string">
            <text:p text:style-name="P28">010</text:p>
          </table:table-cell>
          <table:table-cell table:style-name="Table1.A2" office:value-type="string">
            <text:p text:style-name="P29">4800</text:p>
          </table:table-cell>
          <table:table-cell table:style-name="Table1.A2" office:value-type="string">
            <text:p text:style-name="P33">130<text:span text:style-name="T23">3</text:span></text:p>
          </table:table-cell>
          <table:table-cell table:style-name="Table1.D2" office:value-type="string">
            <text:p text:style-name="P34">0.<text:span text:style-name="T24">1</text:span>666...</text:p>
          </table:table-cell>
        </table:table-row>
        <table:table-row>
          <table:table-cell table:style-name="Table1.A2" office:value-type="string">
            <text:p text:style-name="P28">011</text:p>
          </table:table-cell>
          <table:table-cell table:style-name="Table1.A2" office:value-type="string">
            <text:p text:style-name="P29">9600</text:p>
          </table:table-cell>
          <table:table-cell table:style-name="Table1.A2" office:value-type="string">
            <text:p text:style-name="P33">651</text:p>
          </table:table-cell>
          <table:table-cell table:style-name="Table1.D2" office:value-type="string">
            <text:p text:style-name="P35">0.041666...</text:p>
          </table:table-cell>
        </table:table-row>
        <table:table-row>
          <table:table-cell table:style-name="Table1.A2" office:value-type="string">
            <text:p text:style-name="P28">100</text:p>
          </table:table-cell>
          <table:table-cell table:style-name="Table1.A2" office:value-type="string">
            <text:p text:style-name="P29">19200</text:p>
          </table:table-cell>
          <table:table-cell table:style-name="Table1.A2" office:value-type="string">
            <text:p text:style-name="P33">32<text:span text:style-name="T25">6</text:span></text:p>
          </table:table-cell>
          <table:table-cell table:style-name="Table1.D2" office:value-type="string">
            <text:p text:style-name="P36">0.4791666...</text:p>
          </table:table-cell>
        </table:table-row>
        <table:table-row>
          <table:table-cell table:style-name="Table1.A2" office:value-type="string">
            <text:p text:style-name="P28">101</text:p>
          </table:table-cell>
          <table:table-cell table:style-name="Table1.A2" office:value-type="string">
            <text:p text:style-name="P29">38400</text:p>
          </table:table-cell>
          <table:table-cell table:style-name="Table1.A2" office:value-type="string">
            <text:p text:style-name="P33">16<text:span text:style-name="T26">3</text:span></text:p>
          </table:table-cell>
          <table:table-cell table:style-name="Table1.D2" office:value-type="string">
            <text:p text:style-name="P37">0.23958333...</text:p>
          </table:table-cell>
        </table:table-row>
        <table:table-row>
          <table:table-cell table:style-name="Table1.A2" office:value-type="string">
            <text:p text:style-name="P28">110</text:p>
          </table:table-cell>
          <table:table-cell table:style-name="Table1.A2" office:value-type="string">
            <text:p text:style-name="P29">57600</text:p>
          </table:table-cell>
          <table:table-cell table:style-name="Table1.A2" office:value-type="string">
            <text:p text:style-name="P33">10<text:span text:style-name="T27">9</text:span></text:p>
          </table:table-cell>
          <table:table-cell table:style-name="Table1.D2" office:value-type="string">
            <text:p text:style-name="P38">0.4930555...</text:p>
          </table:table-cell>
        </table:table-row>
        <table:table-row>
          <table:table-cell table:style-name="Table1.A2" office:value-type="string">
            <text:p text:style-name="P28">111</text:p>
          </table:table-cell>
          <table:table-cell table:style-name="Table1.A2" office:value-type="string">
            <text:p text:style-name="P29">115200</text:p>
          </table:table-cell>
          <table:table-cell table:style-name="Table1.A2" office:value-type="string">
            <text:p text:style-name="P33">54</text:p>
          </table:table-cell>
          <table:table-cell table:style-name="Table1.D2" office:value-type="string">
            <text:p text:style-name="P39">0.25347222...</text:p>
          </table:table-cell>
        </table:table-row>
      </table:table>
      <text:p text:style-name="P14"/>
      <text:p text:style-name="P14"/>
      <text:p text:style-name="P40">PartA Baud Rate Table</text:p>
      <text:p text:style-name="P14"/>
      <text:p text:style-name="P14"/>
      <text:p text:style-name="P41"><text:tab/></text:p>
      <text:p text:style-name="P41"><text:span text:style-name="T28"/></text:p>
      <text:p text:style-name="P41"><text:span text:style-name="T28"/></text:p>
      <text:p text:style-name="P41"><text:span text:style-name="T28"/></text:p>
      <text:p text:style-name="P41"><text:soft-page-break/><text:span text:style-name="T28"><text:tab/>Για την επαλήθευση </text:span><text:span text:style-name="T29">απλώς ελέγχουμε για κάθε διαφορετικό baud select, άν ο μετρητής λειτουργεί σωστά και άν τα σήματα sampling βγαίνουν σωστά.</text:span></text:p>
      <text:p text:style-name="P14"/>
      <text:p text:style-name="P14"><draw:frame draw:style-name="fr1" draw:name="Image5" text:anchor-type="char" svg:x="-0.0417in" svg:y="0.1327in" svg:width="6.9252in" svg:height="1.0772in" draw:z-index="4"><draw:image xlink:href="Pictures/100000010000061A000000F38C16FE6F.png" xlink:type="simple" xlink:show="embed" xlink:actuate="onLoad" draw:mime-type="image/png"/></draw:frame></text:p>
      <text:p text:style-name="P42">PartA Baud <text:span text:style-name="T30">Controller </text:span><text:span text:style-name="T31">Post-Synthesis Functional Simulation</text:span></text:p>
      <text:p text:style-name="P43"/>
      <text:p text:style-name="P44">Ό<text:span text:style-name="T32">πως φαίνεται και στις κυμματομρφές, μειώνουμε το baud select σήμα (αρχικά είναι το μέγιστο) “πατώντας” ταυτόχρονα και το reset. Η συχνότητα εμφάνισης του sample_ENABLE μειώνεται όπως θα περιμέναμε</text:span></text:p>
      <text:p text:style-name="P44"><text:tab/><text:span text:style-name="T32">Λόγω ασάφειας στην εκφώνηση το enable σήμα προστέθηκε μετά την πρώτη εξέταση σαν είσοδος, οπότε δέν καλύπτεται </text:span><text:span text:style-name="T33">απο το πλαίσιο δοκιμής. Η ορθή του λειτουργία όμως επιβεβαιώνεται απο την ορθή λειτουργία του αποστολέα και του δέκτη, στα οποία θα ελέγξουμε τα δικά τους enable σήματα, άρα και αυτό του baud controller κατα συνέπεια.</text:span></text:p>
      <text:p text:style-name="P14"/>
      <text:list text:continue-numbering="true" text:style-name="L3">
        <text:list-item>
          <text:p text:style-name="P25">Μέρος 2ο: <text:span text:style-name="T34">Υλοποίηση UART Αποστολέα (transmitter)</text:span></text:p>
        </text:list-item>
      </text:list>
      <text:p text:style-name="P45"/>
      <text:p text:style-name="P46"><text:tab/>Το κύκλωμα που φτιάξαμε στο 2ο κομμάτι της εργασίας υλοποιεί έναν αποστολέα δεδομένων ο οποίος συμμορφώνεται στο προτόκολλο UART. <text:span text:style-name="T35">Συγκεκριμένα, παίρνει σαν εισόδους του τον “χαρακτήρα” που θέλουμε να μεταδώσουμε (ένα δεδομένο 8-bit), το baud select που θα ρυθμίσει τον ρυθμό με τον οποίο θα στέλνουμε δεδομένα, καθώς και τα σήματα ελέγχου Tx_EN(enable) και Tx_WR(write), τα οποία ρυθμίζουν αν ο αποστολέας είναι ενεργός και αν του έχει δοθεί σήμα για να σταλεί αντίστοιχα, ενώ σαν εξόδους βγάζει το TxD (το bit που στέλνουμε), και το Tx_BUSY, το οποίο είναι ενεργό όταν στέλνονται δεδομένα.</text:span></text:p>
      <text:p text:style-name="P46"><text:tab/><text:span text:style-name="T36">Παρακάτω φαίνεται ένα flow diagramm για το</text:span><text:span text:style-name="T37">ν αποστολέα</text:span><text:span text:style-name="T36">. Λεπτομέρειες στην υλοποίηση εξηγούνται αναλυτικά μετά το διάγραμμα.</text:span></text:p>
      <text:p text:style-name="P46"/>
      <text:p text:style-name="P46"/>
      <text:p text:style-name="P46"><draw:frame draw:style-name="fr3" draw:name="Image2" text:anchor-type="char" svg:width="6.9252in" svg:height="2.1665in" draw:z-index="1"><draw:image xlink:href="Pictures/10000001000004E800000189363F92B9.png" xlink:type="simple" xlink:show="embed" xlink:actuate="onLoad" draw:mime-type="image/png"/></draw:frame></text:p>
      <text:p text:style-name="P47">PartB Dataflow Diagramm</text:p>
      <text:p text:style-name="P46"/>
      <text:p text:style-name="P46"><text:soft-page-break/></text:p>
      <text:p text:style-name="P48"><text:tab/><text:span text:style-name="T38">Αρχικά, για να ρυθμίσουμε τον ρυθμό αποστολής των δεδομένων και τον σωστό συγχρονισμό με τον δέκτη, θα χρησιμοποιήσουμε μία μονάδα baud_controller που υλοποιήσαμε προηγουμένως. </text:span></text:p>
      <text:p text:style-name="P49"><text:span text:style-name="T38"><text:tab/>Για την αποστολή των δεδομένων θα χρησιμοποιήσουμε μία μηχανή πεπερασμένων καταστάσεων (fsm). Αυτή θα αποτελείται απο </text:span><text:span text:style-name="T39">πέντε states, τα οποία θα καλύπτουν τα στάδια μετάδωσης: </text:span><text:span text:style-name="T40">IDLE START DATA PARITY STOP. </text:span><text:span text:style-name="T41">Αφού το bit που θα στέλνουμε εξαρτάται μόνο απο το στάδιο της αποστολής στο οποίο θα είμαστε, είναι λογικό η fsm που θα υλοποιήσουμε να είναι τύπου Moore </text:span><text:span text:style-name="T42">(προφανώς το TxD θα είναι έξοδος της fsm)</text:span><text:span text:style-name="T41">. </text:span><text:span text:style-name="T42">Η κύρια λογική της fsm υλοποιείται με δύο always blocks, ένα </text:span><text:span text:style-name="T43">συνδιαστικής</text:span><text:span text:style-name="T42"> λογικής, που θα θέτει τις εξόδους καθώς και το επόμενο state που θα πρέπει να πάρει, καθώς και ενα ακολουθιακής λογικής, που θα αναθέτει ανα κύκλο του ρολογιού το επόμενο state σαν το current state.</text:span></text:p>
      <text:p text:style-name="P49"><text:tab/><text:span text:style-name="T44">Θα αρχίσουμε να στέλνουμε δεδομένα όταν ανεβεί το σήμα Tx_WR, αρκεί να είναι ανοιχτός, δηλαδή αρκει το Tx_EN να είναι ίσο με ένα. </text:span><text:span text:style-name="T45">Μέχρι να ισχύει η συνθήκη Tx_EN = 1 &amp;&amp; Tx_WR = 1 </text:span><text:span text:style-name="T46">ο αποστολέας θα είναι ανενεργός, δηλαδή στο idle state. </text:span><text:span text:style-name="T47">Οταν είναι ανενεργός θα στέλνει σταθερό 1, ενώ το start bit που θα αποσταλεί θα είναι 0 και το stop bit 1.</text:span></text:p>
      <text:p text:style-name="P49"><text:tab/><text:span text:style-name="T48">Ο αποστολέας θα στέλνει νέο δεδομένο κάθε δεκαέξι παλμούς του Tx_sample_ENABLE (που είναι το sampling σήμα που θα έχει σαν έξοδο του το baud_controller). </text:span><text:span text:style-name="T49">Για να το επιτύχουμε αυτό θα υλοποιήσουμε σε μία νέα always block ακολουθιακής λογικής έναν μετρητή 4bit, ο οποίος θα αυξάνεται με κάθε νέο sampling σήμα που θα λάβουμε. Ό</text:span><text:span text:style-name="T50">ταν ο μετρητής γίνει ίσος με δεκάξι, θα ανοίγει ένα νέο σήμα switch για ένα κύκλο, το οποίο θα επιτρέψει την fsm να αλλάξει κατάσταση. Αξίζει να σημειωθεί πως για να είναι ο χρόνος αποστολής του start bit ανάλογος με τον χρόνο αποσολης των υπολοίπων σημάτων, ο μετρητής θα μηδενίζεται όταν είμαστε στο idle state.</text:span></text:p>
      <text:p text:style-name="P50"><text:tab/><text:span text:style-name="T51">Σε αντίθεση με τα υπόλοιπα states, στο data state </text:span><text:span text:style-name="T52">δεν θα στείλουμε μόνο ένα bit, αλλα όλο το περιεχόμενο του χαρακτήρα. Θα υλοποιήσουμε </text:span><text:span text:style-name="T49">σε μία νέα always block ακολουθιακής λογικής </text:span><text:span text:style-name="T52">έναν 3-bit μετρητη που θα προσμετράει bit που θα στείλουμε όσο είμαστε στο data, τον οποίο θα χρησιμοποιήσουμε και στην έκφραση TxD = Tx_DATA[writeCounter] (writeCounter ο μετρητής). </text:span><text:span text:style-name="T53">Ο μετρητής θα αυξάνεται μόνο όσο βρισκόμαστε στο data state.</text:span></text:p>
      <text:p text:style-name="P51"><text:tab/><text:span text:style-name="T53">Θα χρειαστεί επίσης να υπολογίσουμε το parity bit, κάτι το οποίο υλοποιείται με ένα xor reduction του </text:span><text:span text:style-name="T52">Tx_DATA, </text:span><text:span text:style-name="T54">επίσης σε μία νέα always block </text:span><text:span text:style-name="T55">ακολουθιακής</text:span><text:span text:style-name="T54"> λογικής </text:span><text:span text:style-name="T56">(</text:span><text:span text:style-name="T57">χ</text:span><text:span text:style-name="T58">ρησιμοποιούμε even parity</text:span><text:span text:style-name="T56">)</text:span><text:span text:style-name="T52">. </text:span><text:span text:style-name="T59">Για λόγους ευκολίας θα το υπολογίσουμε όταν όταν είμαστε στο data state.</text:span></text:p>
      <text:p text:style-name="P51"><text:tab/><text:span text:style-name="T60">Τέλος στο stop state θα στέλνουμε απλώς το bit εξόδου, δηλαδή εδώ 1. </text:span><text:span text:style-name="T61">Μετά την αποστολή του bit θα έχει τελειώσει τη μετάδωση ο αποστολέας οπότε θα επιστρέψει στο idle</text:span></text:p>
      <text:p text:style-name="P52"><text:tab/><text:span text:style-name="T62">Είσοδοι της fsm θα είναι τα switchEnable, writeCounter, parity, Tx_EN, Tx_WR, Tx_DATA. </text:span><text:span text:style-name="T63">Σαν εξόδους, πέρα απο το TxD και το Tx_BUSY, θα έχουμε και δύο </text:span><text:span text:style-name="T64">καταχωρητές</text:span><text:span text:style-name="T63">, τα οποία θα σηματοδοτούν </text:span><text:span text:style-name="T65">αν είμαστε στο idle η στο data state, για να μπορούν να </text:span><text:span text:style-name="T66">λειτουργούν οι μετρητές και το parity σωστά.</text:span></text:p>
      <text:p text:style-name="P53"><text:span text:style-name="T67"><text:tab/>Παρακάτω φαίνεται ένα διάγραμμα λειτουργίας της fsm. Εξυπακούεται πως η έξοδος state_i είναι συμβολική (για αναγνωσιμότητα), και οι πραγματικοί εξόδοι είναι οι καταχωρητές που περιγράφονται παραπάνω </text:span><text:span text:style-name="T68">(υπάρχουν όταν state_i != 0 στο σχήμα)</text:span><text:span text:style-name="T67">. </text:span><text:span text:style-name="T69">Το ιδιο θα ισχυει και στο 3ο μερος της εργασιας</text:span></text:p>
      <text:p text:style-name="P52"><text:tab/></text:p>
      <text:p text:style-name="P14"><draw:frame draw:style-name="fr1" draw:name="Image1" text:anchor-type="char" svg:x="0.9772in" svg:y="-0.2555in" svg:width="5.0638in" svg:height="8.4846in" draw:z-index="0"><draw:image xlink:href="Pictures/10000001000002A900000475DEC51B7F.png" xlink:type="simple" xlink:show="embed" xlink:actuate="onLoad" draw:mime-type="image/png"/></draw:frame><text:soft-page-break/></text:p>
      <text:p text:style-name="P14"/>
      <text:p text:style-name="P14"/>
      <text:p text:style-name="P14"/>
      <text:p text:style-name="P1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PartB Fsm Diagramm</text:p>
      <text:p text:style-name="P54"/>
      <text:p text:style-name="P54"/>
      <text:p text:style-name="P56"><text:span text:style-name="T28"/></text:p>
      <text:p text:style-name="P57"><text:soft-page-break/><text:span text:style-name="T28"><text:tab/>Για την επαλήθευση </text:span><text:span text:style-name="T70">θα δοκιμάσουμε να στείλουμε πέντε μυνήματα, εκ τον οποίων τα τέσσερα θα παραδωθούν κανονικά </text:span><text:span text:style-name="T71">(είναι αυτά που δώθηαν στην εκφώνηση ως παράδειγμα)</text:span><text:span text:style-name="T70">, ενώ το ένα δεν θα αποσταλλεί καθόλου επειδή το Tx_EN θα είναι ίσο με 0. </text:span><text:span text:style-name="T72">Θέτουμε το baud select = 7 για να το δοκιμάσουμε όσο το δυνατό περισσότερο στο μικρότερο χρονικό διάστημα </text:span><text:span text:style-name="T73">(το ίδιο θα κάνουμε και στα δύο επόμενα κομμάτια της εργασίας)</text:span><text:span text:style-name="T72">. </text:span></text:p>
      <text:p text:style-name="P56"><text:span text:style-name="T70"/></text:p>
      <text:p text:style-name="P56"><text:span text:style-name="T70"/></text:p>
      <text:p text:style-name="P56"><draw:frame draw:style-name="fr4" draw:name="Image6" text:anchor-type="char" svg:width="6.9252in" svg:height="0.9453in" draw:z-index="5"><draw:image xlink:href="Pictures/10000001000008AB0000012F0A1008AA.png" xlink:type="simple" xlink:show="embed" xlink:actuate="onLoad" draw:mime-type="image/png"/></draw:frame><text:span text:style-name="T70"/></text:p>
      <text:p text:style-name="P58"><text:span text:style-name="T74">Part</text:span><text:span text:style-name="T75">Β UART </text:span><text:span text:style-name="T76">T</text:span><text:span text:style-name="T75">ransmitter</text:span><text:span text:style-name="T30"> </text:span><text:span text:style-name="T31">Post-Synthesis Functional Simulation</text:span></text:p>
      <text:p text:style-name="P54"/>
      <text:p text:style-name="P54"><text:tab/></text:p>
      <text:p text:style-name="P54"><text:tab/><text:span text:style-name="T77">Βλέπουμε οτι στο παραπάνω οτι όντως τα μυνήματα στέλνονται κανονικά, με εξαίρεση το μεσαίο που έχουμε κλείσει το Tx_EN. </text:span><text:span text:style-name="T78">Στο τελευταίο μύνημα φαίνεται και η σωστή ανάθεση του parity. </text:span><text:span text:style-name="T79">Βλέπουμε επίσης τη σωστή ανάθεση του TxD και του Tx_DATA.</text:span></text:p>
      <text:p text:style-name="P54"/>
      <text:p text:style-name="P54"/>
      <text:list text:continue-numbering="true" text:style-name="L3">
        <text:list-item>
          <text:p text:style-name="P59">Μέρος 3ο: <text:span text:style-name="T34">Υλοποίηση UART </text:span><text:span text:style-name="T80">δέκτη (receiver)</text:span></text:p>
        </text:list-item>
      </text:list>
      <text:p text:style-name="P45"/>
      <text:p text:style-name="P60"><text:tab/><text:span text:style-name="T81">Σε αυτό το κομμάτι της εργασίας υλοποιούμε έναν UART δέκτη, που θα μπορεί να αποκωδικοποιήσει τα μυνήματα που θα στέλνει ο αποστολέας παραπάνω. </text:span><text:span text:style-name="T82">Αυτή τη φορά θα έχουμε ένα bit σαν είσοδο, απο το οποίο θα </text:span><text:span text:style-name="T83">ανα</text:span><text:span text:style-name="T82">κατασκευάσουμε έναν </text:span><text:span text:style-name="T83">8bit </text:span><text:span text:style-name="T82">χαρακτήρα. </text:span><text:span text:style-name="T84">Θα έχουμε πάλι στις εισόδους το Rx_EN και το baud_select, το οποίο θα πρέπει να έχει την ίδια τιμή με αυτό του αποστολέα. Πέρα απο το Rx_DATA, ο δέ</text:span><text:span text:style-name="T85">κτης επιστρέφει και κάποια σήματα ελέγχου σχετικά με τη ποιότητα των δεδομένων που λάβαμε, κοινώς τα Rx_FERROR, Rx_PERROR, Rx_VALID που υποδυκνείουν λάθος στο framing, λάθος στο parity και σωστή καταγραφή αντίστοιχα.</text:span></text:p>
      <text:p text:style-name="P61"><text:tab/><text:span text:style-name="T36">Παρακάτω φαίνεται ένα flow diagramm για το</text:span><text:span text:style-name="T37">ν</text:span><text:span text:style-name="T36"> </text:span><text:span text:style-name="T37">δέκτη</text:span><text:span text:style-name="T36">. Λεπτομέρειες στην υλοποίηση εξηγούνται αναλυτικά μετά το διάγραμμα. </text:span><text:span text:style-name="T86">Αξίζει να σημειωθεί πως το block της fsm περιλαμβάνει και ένα always block όπως θα εξηγηθεί και παρακάτω. Αυτό δεν είναι κομμάτι της πραγματικής fsm, το διάγραμμα όμως αφήνεται ως έχει για ευκολία στην αναγνωσιμότητα.</text:span></text:p>
      <text:p text:style-name="P61"/>
      <text:p text:style-name="P62"><draw:frame draw:style-name="fr3" draw:name="Image3" text:anchor-type="char" svg:width="6.9252in" svg:height="2.1665in" draw:z-index="2"><draw:image xlink:href="Pictures/10000001000004E80000018998CDA680.png" xlink:type="simple" xlink:show="embed" xlink:actuate="onLoad" draw:mime-type="image/png"/></draw:frame>Part<text:span text:style-name="T87">C</text:span> Dataflow Diagramm</text:p>
      <text:p text:style-name="P61"><text:soft-page-break/></text:p>
      <text:p text:style-name="P60"><text:span text:style-name="T85"><text:tab/> </text:span><text:span text:style-name="T88">Προφανώς θα χρησιμοποιήσουμε και εδώ μια μονάδα baud_controller, για να ευθυγραμμίσουμε σωστά τη δειγματοληψία που θα κάνει ο δέκτης στα αποσταλμένα δεδομένα.</text:span></text:p>
      <text:p text:style-name="P60"><text:tab/><text:span text:style-name="T88">Θα χρησιμοποιήσουμε και εδώ μια fsm, αλλα αυτή τη φορά θα προσθέσουμε τρία επιπλέον states </text:span><text:span text:style-name="T89">απο αυτά που θα έχουμε παραπάνω</text:span><text:span text:style-name="T88">: το VALID, το FERROR και το PERROR, </text:span><text:span text:style-name="T90">απο τα οποία θα εξαρτηθεί η ανάθεση των σημάτων ελέγχου που αναφέρθηκαν προηγουμένως. </text:span><text:span text:style-name="T91">Αφού η αποστολή γίνεται σε στάδια, στέκει πως και για τον δέκτη, οι εξόδοι του fsm θα εξαρτώτναι απο το στάδιο στο οποίο βρισκόμαστε, δηλαδή είναι και πάλι “βολικό” το fsm που θα υλοποιήσουμε να είναι τύπου moore. Η λογική του υλοποιείται όμοια με πρίν.</text:span></text:p>
      <text:p text:style-name="P60"><text:tab/><text:span text:style-name="T91">Επειδή επιθυμούμε να κρατήσουμε τα δεδομένα των εξόδων κατα τη διάρκεια πολλών διαφορετικών κύκλων, δεν θα τις χρησιμοποιήσουμε σαν εξόδους της fsm απευθείας, αλλά θα χρησιμοποιήσουμε μια always block ακολουθιακής λογικης, στην οποία θα γίνονται αναθέσεις ανάλογα </text:span><text:span text:style-name="T64">με το state στο οποίο βρισκόμαστε</text:span><text:span text:style-name="T91">. </text:span><text:span text:style-name="T64">Οι έξοδοι της fsm δηλαδή θα είναι </text:span><text:span text:style-name="T92">εφτά</text:span><text:span text:style-name="T64"> καταχωρητές, ο καθένα</text:span><text:span text:style-name="T93">ς</text:span><text:span text:style-name="T64"> απο αυτ</text:span><text:span text:style-name="T93">ούς θα παίρνει τη τιμή 1 μόνο για ένα state (π.χ. ένας καταχωρητής idle_i θα γίνεται 1 μόνο όταν είμαστε στο idle state). </text:span><text:span text:style-name="T92">Θα καλύπτουν έτσι όλα τα states εκτός απο το stop, για το οποίο δέν μας ενδιαφέρει να αναθέσουμε κάτι.</text:span></text:p>
      <text:p text:style-name="P60"><text:tab/><text:span text:style-name="T92">Θα μας χρειαστούν </text:span><text:span text:style-name="T58">οι always blocks που χρησιμοποιήσαμε προηγουμένως, με μερικές αλλαγές. Το σήμα switchEnable θα ανεβαίνει πλέον (για έναν κύκλο) στή μέση του μετρητή των sampling σημάτων και όχι όταν μεγιστοποιηθεί η τιμή του, επειδή η δειγματοληψία στη μέση της αποστολής είναι πιο σταθερή. Επίσης το parity το υπολογίζουμε με την έκφραση parity &lt;= ^Rx_DATA_buf + RxD στο στάδιο parity, οπου έχουμε όλα τα δεδομένα που μας αφορούν.</text:span></text:p>
      <text:p text:style-name="P63"><text:tab/><text:span text:style-name="T92">Η always που ευθύνεται για τις αναθέσεις εξόδων θα χρησιμοποιεί έναν buffer πρίν αναθέσει τα δεδομένα στον Rx_DATA </text:span><text:span text:style-name="T94">(τον </text:span><text:span text:style-name="T58">Rx_DATA_buf</text:span><text:span text:style-name="T94">)</text:span><text:span text:style-name="T92">, για να μπορεί να κρατήσει τα προηγούμενα σε περίπτωση λάθους. Αυτός και τα σήματα ελέγχου μηδενίζονται όταν είμαστε στο start state. Ό</text:span><text:span text:style-name="T95">σο είμαστε στο data state, θα έχουμε την έκφραση </text:span><text:span text:style-name="T92"><text:s/>Rx_DATA_buf[writeCounter] &lt;= RxD, </text:span><text:span text:style-name="T95">οπου ο <text:s/></text:span><text:span text:style-name="T92">writeCounter </text:span><text:span text:style-name="T95">θα έχει την ίδια λογική με αυτόν που χρησιμοποιήθηκε στον transmitter, όπως αναφέρθηκε πρίν. </text:span><text:span text:style-name="T96">Θα αναθέσουμε στα σήματα Rx_VALID, Rx_FERROR και Rx_PERROR την τιμή 1 όταν είμαστε στο valid, ferror και perror state αντίστοιχα. Όταν είμαστε στο valid state, θα αναθέσουμε τα δεδομένα του buffer στο Rx_DATA.</text:span></text:p>
      <text:p text:style-name="P64"><text:tab/><text:span text:style-name="T58">Για να ελέγξουμε για framing errors, κοιτάμε αν το start bit είναι όντως 0 όταν προχωράμε στην δειγματοληψία των δεδομένων, και αν το stop bit είναι όντως 1 στο τέλος. </text:span><text:span text:style-name="T56">Αν κάτι απο τα δύο δέν ισχύει, μεταβιβαζόμαστε στο FERROR state. Για να ελέγξουμε για parity errors, ελέγχουμε </text:span><text:span text:style-name="T97">αν η τιμή του parity είναι όντως ίση με 0 (</text:span><text:span text:style-name="T98">χ</text:span><text:span text:style-name="T58">ρησιμοποιούμε even parity</text:span><text:span text:style-name="T99">). Αν το παραπάνω δέν ισχύει μεταβιβαζόμαστε στο PERROR state. Αν τίποτα απο τα δύο δέν ισχύει μεταβιβαζόμαστε στο VALID state μετά απο το STOP state. </text:span><text:span text:style-name="T100">Αν βρεθούμε σε error κατάσταση π.χ. λόγω λάθος start bit, θα επιστρέψουμε απευθείας στο idle state, παρόλο που ο αποστολέας μπορεί να συνεχίζει να στέλνει δεδομένα. Είναι ευθύνη οποιουδήποτε χρήστη δηλαδή να κλείσει τον δέκτη μέχρι ο αποστολέας να σταματήσει τη μετάδωση, σε περίπτωση λάθους.</text:span><text:tab/></text:p>
      <text:p text:style-name="P65"><text:tab/>Ό<text:span text:style-name="T101">πως τα START, DATA, PARITY και STOP states στον αποστολέα ήταν υπεύθυνα για την αποστολή των δεδομένων όπως προβλέπει το UART πρωτόκολλο, έτσι και εδώ θα είναι υπεύθυνα για τη λήψη τους (στο μέσο της αποστολής), όπως και εξηγήθηκε πιο λεπτομερώς παραπάνω. Εδώ η μεταβίβαση απο το idle στο start state θα γίνει αν ο δέκτης είναι ενεργοποιημένος και λάβει το start bit, </text:span><text:span text:style-name="T102">δηλαδή όταν είναι αληθής η έκφραση RxD == 0 &amp;&amp; Rx_EN == 1. </text:span><text:span text:style-name="T103">Προφανώς εδώ τα START, STOP και PARITY </text:span><text:span text:style-name="T104">states μπορεί να μεταβιβάσουν την fsm σε error state, και η stop θα μεταβιβάσει την fsm στο valid state και όχι απευθείας στο idle. Αυτό πλέον το κάν</text:span><text:span text:style-name="T105">ουν</text:span><text:span text:style-name="T104"> το valid και τα error states.</text:span></text:p>
      <text:p text:style-name="P65"/>
      <text:p text:style-name="P65"/>
      <text:p text:style-name="P45"/>
      <text:p text:style-name="P45"/>
      <text:p text:style-name="P45"><draw:frame draw:style-name="fr1" draw:name="Image4" text:anchor-type="char" svg:x="1.8252in" svg:y="0in" svg:width="3.6083in" svg:height="8.3965in" draw:z-index="3"><draw:image xlink:href="Pictures/10000001000003310000076DD1E21A4F.png" xlink:type="simple" xlink:show="embed" xlink:actuate="onLoad" draw:mime-type="image/png"/></draw:frame><text:soft-page-break/></text:p>
      <text:p text:style-name="P66"/>
      <text:p text:style-name="P45"/>
      <text:p text:style-name="P45"/>
      <text:p text:style-name="P45"/>
      <text:p text:style-name="P45"/>
      <text:p text:style-name="P45"/>
      <text:p text:style-name="P45"/>
      <text:p text:style-name="P45"/>
      <text:p text:style-name="P45"/>
      <text:p text:style-name="P45"/>
      <text:p text:style-name="P4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7">­</text:p>
      <text:p text:style-name="P14"/>
      <text:p text:style-name="P14"/>
      <text:p text:style-name="P14"/>
      <text:p text:style-name="P14"/>
      <text:p text:style-name="P14"/>
      <text:p text:style-name="P14"/>
      <text:p text:style-name="P14"/>
      <text:p text:style-name="P14"/>
      <text:p text:style-name="P14"/>
      <text:p text:style-name="P14"/>
      <text:p text:style-name="P68"/>
      <text:p text:style-name="P68">Part<text:span text:style-name="T106">C</text:span> Fsm Diagramm</text:p>
      <text:p text:style-name="P14"/>
      <text:p text:style-name="P14"/>
      <text:p text:style-name="P14"/>
      <text:p text:style-name="P69"><text:soft-page-break/><text:span text:style-name="T28"><text:tab/></text:span><text:bookmark-start text:name="__DdeLink__3778_2332096822"/><text:span text:style-name="T28">Για την επαλήθευση</text:span><text:bookmark-end text:name="__DdeLink__3778_2332096822"/><text:span text:style-name="T28">, </text:span><text:span text:style-name="T72">θα στείλουμε μυνήματα bit-bit προσωμοιώνοντας τον χρόνο που θα έκανε ο αποστολέας να τα στείλει </text:span><text:span text:style-name="T107">(8640 ns = 54(baud max clock)*16(sample enable count)*10(clk period)), </text:span><text:span text:style-name="T108">και θα ελέγξουμε άν ο δέκτης όντως τα ανακατασκευάζει σωστά</text:span><text:span text:style-name="T107">. </text:span><text:span text:style-name="T108">Τα πρώτα δύο μυνήματα θα είναι σωστά, το τρίτο θα είναι με τον δέκτη κλειστό, το τέταρτο θα έχει λάθος parity bit και το πέμπτο θα σταλεί σε ένα πολύ μικρό χρονικό διάστημα, δηλαδή θα περιμένουμε ferror. Έ</text:span><text:span text:style-name="T109">τσι θα καλύψουμε πλήρως τη λειτουργία του δέκτη</text:span></text:p>
      <text:p text:style-name="P69"><text:span text:style-name="T108"/></text:p>
      <text:p text:style-name="P69"><text:span text:style-name="T108"/></text:p>
      <text:p text:style-name="P69"><draw:frame draw:style-name="fr4" draw:name="Image7" text:anchor-type="char" svg:width="6.9252in" svg:height="1.0055in" draw:z-index="6"><draw:image xlink:href="Pictures/10000001000008A8000001424D70C1CC.png" xlink:type="simple" xlink:show="embed" xlink:actuate="onLoad" draw:mime-type="image/png"/></draw:frame><text:span text:style-name="T108"/></text:p>
      <text:p text:style-name="P70"><text:span text:style-name="T74">Part</text:span><text:span text:style-name="T110">C</text:span><text:span text:style-name="T75"> UART </text:span><text:span text:style-name="T111">Receiver</text:span><text:span text:style-name="T30"> </text:span><text:span text:style-name="T31">Post-Synthesis Functional Simulation</text:span></text:p>
      <text:p text:style-name="P14"/>
      <text:p text:style-name="P14"/>
      <text:p text:style-name="P14"/>
      <text:p text:style-name="P71"><text:tab/><text:span text:style-name="T111">Aπο </text:span><text:span text:style-name="T112">τις παραπάνω κυμματομορφές, όντως επιβεβαιώνεται η ορθή λειτουργία του δέκτη. </text:span><text:span text:style-name="T113">Η έξοδος όντως αλλάζει μόνο αφού επιβεβαιωθεί οτι το μύνημα που στάλθηκε είναι σωστό, λόγο του buffer. Τα σήματα σφαλμάτων είναι όντως όπως τα περιμέναμ</text:span><text:span text:style-name="T114">ε.</text:span></text:p>
      <text:p text:style-name="P71"/>
      <text:p text:style-name="P14"/>
      <text:p text:style-name="P14"/>
      <text:p text:style-name="P14"/>
      <text:p text:style-name="P14"/>
      <text:p text:style-name="P14"/>
      <text:list text:continue-numbering="true" text:style-name="L3">
        <text:list-item>
          <text:p text:style-name="P25">Μέρος 4ο: Υλοποίηση UART Αποστολέα-Δέκτη για Σειριακή Μεταφορά Δεδομένων</text:p>
        </text:list-item>
      </text:list>
      <text:p text:style-name="P45"/>
      <text:p text:style-name="P45"><text:tab/><text:span text:style-name="T115">Σε αυτό το κομμάτι της εργασίας υλοποιούμε ένα top module στο οποίο θα κάνει intantiate έναν UART αποστολέα, καθώς και έναν UART δέκτη, </text:span><text:span text:style-name="T116">και συνδέει τις μονάδες μεταξύ τους με ένα καλώδιο</text:span><text:span text:style-name="T115">. </text:span><text:span text:style-name="T116">Απο τη στιγμή που δεν θα χρειαστεί να ελέγξουμε τον κώδικα στη πλακέτα, μπορούμε να παραλείψουμε τη σύνδεση του reset σε synchroniser και anti-bounce μονάδες για ευκολία. Μπορούμε επίσης να έχουμε τις εισόδους του αποστολέα και του δέκτη σαν εισόδους στο top, και τις εξόδους τους σάν εξόδους του αντίστοιχα, για καλύτερο έλεγχο στο testbench. </text:span><text:span text:style-name="T117">Παρακάτω φαίνεται το flow diagramm</text:span></text:p>
      <text:p text:style-name="P45"/>
      <text:p text:style-name="P45"><draw:frame draw:style-name="fr4" draw:name="Image8" text:anchor-type="char" svg:width="6.9252in" svg:height="0.9602in" draw:z-index="7"><draw:image xlink:href="Pictures/1000000100000BBE000001A1216CD7DF.png" xlink:type="simple" xlink:show="embed" xlink:actuate="onLoad" draw:mime-type="image/png"/></draw:frame><text:soft-page-break/></text:p>
      <text:p text:style-name="P72"><text:span text:style-name="T74">Part</text:span><text:span text:style-name="T118">D Dataflow Diagramm</text:span></text:p>
      <text:p text:style-name="P45"/>
      <text:p text:style-name="P73"><text:tab/> <text:span text:style-name="T119">Για την επαλήθευση, </text:span><text:span text:style-name="T120">στέλνουμε με τον αποστολέα έξι μυνήματα, 4 απο τα οποία θα σταλθούν κανονικά, ενώ δύο απο αυτά θα χαθούν γιατί θα είναι κλειστός ο αποστολέας και ο δέκτης αντίστοιχα. </text:span><text:span text:style-name="T110">Δεν μπορούμε να ελέγξουμε για πιθανά σφάλματα, αφού ξέρουμε πως ο αποστολέας παραδίδει τα μυνήματα σωστά.</text:span></text:p>
      <text:p text:style-name="P73"/>
      <text:p text:style-name="P73"/>
      <text:p text:style-name="P73"><draw:frame draw:style-name="fr4" draw:name="Image9" text:anchor-type="char" svg:width="6.9252in" svg:height="1.1in" draw:z-index="8"><draw:image xlink:href="Pictures/10000001000008950000015D97D2AE75.png" xlink:type="simple" xlink:show="embed" xlink:actuate="onLoad" draw:mime-type="image/png"/></draw:frame></text:p>
      <text:p text:style-name="P74"><text:span text:style-name="T74">Part</text:span><text:span text:style-name="T121">D</text:span><text:span text:style-name="T75"> </text:span><text:span text:style-name="T121">Top Module</text:span><text:span text:style-name="T30"> </text:span><text:span text:style-name="T31">Post-Synthesis Functional Simulation</text:span></text:p>
      <text:p text:style-name="P75"/>
      <text:p text:style-name="P76"><text:tab/>Aξίζει να σημειωθεί πως σε κανονική χρήση , θα ήταν πιο σωστό η αποστλή (ή μη) του επόμενου μυνήματος να εξαρτάται απο τα σήματα ελέγχου που είναι έξοδοι της μονάδας αντί να στέλνονται μετά απο σταθερή καθυστέρηση, αλλά στο πλαίσιο του ελέγχου της ορθής λειτουργίας της μονάδας η σταθερή καθυστέρηση αρκεί.</text:p>
      <text:p text:style-name="P45"/>
      <text:p text:style-name="P77"><text:span text:style-name="T122"/></text:p>
      <text:list text:style-name="L4">
        <text:list-item>
          <text:p text:style-name="P78">Συμπεράσματα:</text:p>
        </text:list-item>
      </text:list>
      <text:p text:style-name="P79"/>
      <text:p text:style-name="P80"><text:span text:style-name="T123"><text:tab/>Σε αυτή την εργασία </text:span><text:span text:style-name="T124">υλοποιήσαμε αρχικά έναν uart αποστολέα και έπειτα έναν uart δέκτη. Κατα την πορεία του εργαστηρίου χρειάστηκε να αλλάξουν ελαφρώς, κυρίως για τη σωστή λειτουργία της fsm, και την αποτροπή κακών πρακτικών όπως την μή ανάθεση όλων των εξόδων σε κάθε state ή την εξάρτηση </text:span><text:span text:style-name="T125">λογικής εκτός της fsm απο το state, ή λόγω απροσεξίας κατα την ανάγνωση της εκφώνησης. Η δοκιμές διεξάχθηκαν χωρίς ιδιαίτερες δυσκολίες, με εξαίρεση μερικές διορθώσεις που έπρεπε να γίνουν στα testbench για να αρχικοποιούνται σψστά οι εισόδοι πρίν τη δοκιμή. Κατα τη σύνθεση φάνηκαν λάθη τα οποία όμως ήταν απλά. Αξίζει να σημειωθεί πως ο συνθέτης βγάζει 3 warning σε όλα τα μέρη της εργασίας τα οποία αφορύν τη παράλληλη σύνθεση και το HSR_BOUNDARY_TOP, που μπορούν να αγνοηθού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1-10T15:37:05.104345500</meta:creation-date>
    <dc:date>2026-05-11T16:08:02.581207824</dc:date>
    <meta:editing-duration>PT11H36M56S</meta:editing-duration>
    <meta:editing-cycles>173</meta:editing-cycles>
    <meta:generator>LibreOffice/26.2.3.2$Linux_X86_64 LibreOffice_project/620$Build-2</meta:generator>
    <meta:document-statistic meta:table-count="1" meta:image-count="12" meta:object-count="0" meta:page-count="11" meta:paragraph-count="106" meta:word-count="2708" meta:character-count="16952" meta:non-whitespace-character-count="14300"/>
  </office:meta>
</office:document-meta>
</file>